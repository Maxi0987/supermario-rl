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93" style:master-page-name="MasterPage2" style:family="paragraph" style:name="P53">
      <style:paragraph-properties fo:text-align="justify" fo:margin-top="12pt" fo:margin-bottom="0pt"/>
      <style:text-properties fo:color="#2f5496" fo:font-family="Calibri Light" style:font-family-complex="Calibri Light" fo:font-size="16pt" fo:language="de" fo:country="AT"/>
    </style:style>
    <style:style style:family="text" style:name="T2644">
      <style:text-properties fo:color="#2f5496" fo:font-family="Calibri Light" style:font-family-complex="Calibri Light" fo:font-size="16pt" fo:language="de" fo:country="AT"/>
    </style:style>
    <style:style style:family="text" style:name="T2645">
      <style:text-properties fo:color="#2f5496" fo:font-family="Calibri Light" style:font-family-complex="Calibri Light" fo:font-size="16pt" fo:language="de" fo:country="AT"/>
    </style:style>
    <style:style style:family="text" style:name="T2646">
      <style:text-properties fo:color="#2f5496" fo:font-family="Calibri Light" style:font-family-complex="Calibri Light" fo:font-size="16pt" fo:language="de" fo:country="AT"/>
    </style:style>
    <style:style style:family="text" style:name="T2647">
      <style:text-properties fo:color="#2f5496" fo:font-family="Calibri Light" style:font-family-complex="Calibri Light" fo:font-size="16pt" fo:language="de" fo:country="AT"/>
    </style:style>
    <style:style style:parent-style-name="887" style:family="paragraph" style:name="P57">
      <style:paragraph-properties fo:text-align="justify"/>
      <style:text-properties fo:color="#000000" fo:font-family="Calibri" style:font-family-complex="Calibri" fo:font-size="11pt" fo:language="de" fo:country="AT"/>
    </style:style>
    <style:style style:family="text" style:name="T2648">
      <style:text-properties fo:color="#000000" fo:font-family="Calibri" style:font-family-complex="Calibri" fo:font-size="11pt" fo:language="de" fo:country="AT"/>
    </style:style>
    <style:style style:family="text" style:name="T2649">
      <style:text-properties fo:color="#000000" fo:font-family="Calibri" style:font-family-complex="Calibri" fo:font-size="11pt" fo:language="de" fo:country="AT"/>
    </style:style>
    <style:style style:family="text" style:name="T2650">
      <style:text-properties fo:color="#000000" fo:font-family="Calibri" style:font-family-complex="Calibri" fo:font-size="11pt" fo:language="de" fo:country="AT"/>
    </style:style>
    <style:style style:parent-style-name="900" style:family="paragraph" style:name="P58">
      <style:paragraph-properties fo:text-align="justify" fo:margin-left="1.27cm" fo:margin-right="0cm" fo:text-indent="0cm"/>
      <style:text-properties fo:color="#000000" fo:font-family="Calibri" style:font-family-complex="Calibri" fo:font-size="11pt" fo:language="de" fo:country="AT"/>
    </style:style>
    <style:style style:family="text" style:name="T2651">
      <style:text-properties fo:color="#000000" fo:font-family="Calibri" style:font-family-complex="Calibri" fo:font-size="11pt" fo:language="de" fo:country="AT" fo:font-weight="bold"/>
    </style:style>
    <style:style style:family="text" style:name="T2652">
      <style:text-properties fo:color="#000000" fo:font-family="Calibri" style:font-family-complex="Calibri" fo:font-size="11pt" fo:language="de" fo:country="AT"/>
    </style:style>
    <style:style style:family="text" style:name="T2653">
      <style:text-properties fo:color="#000000" fo:font-family="Calibri" style:font-family-complex="Calibri" fo:font-size="11pt" fo:language="de" fo:country="AT"/>
    </style:style>
    <style:style style:parent-style-name="900" style:list-style-name="WWNum5" style:family="paragraph" style:name="P59">
      <style:paragraph-properties fo:text-align="justify"/>
      <style:text-properties fo:color="#000000" fo:font-family="Calibri" style:font-family-complex="Calibri" fo:font-size="11pt" fo:language="de" fo:country="AT"/>
    </style:style>
    <style:style style:family="text" style:name="T2654">
      <style:text-properties fo:color="#000000" fo:font-family="Calibri" style:font-family-complex="Calibri" fo:font-size="11pt" fo:language="de" fo:country="AT"/>
    </style:style>
    <style:style style:family="text" style:name="T2655">
      <style:text-properties fo:color="#000000" fo:font-family="Calibri" style:font-family-complex="Calibri" fo:font-size="11pt" fo:language="de" fo:country="AT"/>
    </style:style>
    <style:style style:family="text" style:name="T2656">
      <style:text-properties fo:color="#000000" fo:font-family="Calibri" style:font-family-complex="Calibri" fo:font-size="11pt" fo:language="de" fo:country="AT"/>
    </style:style>
    <style:style style:parent-style-name="900" style:list-style-name="WWNum5" style:family="paragraph" style:name="P60">
      <style:paragraph-properties fo:text-align="justify"/>
      <style:text-properties fo:color="#000000" fo:font-family="Calibri" style:font-family-complex="Calibri" fo:font-size="11pt" fo:language="de" fo:country="AT"/>
    </style:style>
    <style:style style:family="text" style:name="T2657">
      <style:text-properties fo:color="#000000" fo:font-family="Calibri" style:font-family-complex="Calibri" fo:font-size="11pt" fo:language="de" fo:country="AT"/>
    </style:style>
    <style:style style:family="text" style:name="T2658">
      <style:text-properties fo:color="#000000" fo:font-family="Calibri" style:font-family-complex="Calibri" fo:font-size="11pt" fo:language="de" fo:country="AT" fo:font-weight="bold"/>
    </style:style>
    <style:style style:family="text" style:name="T2659">
      <style:text-properties fo:color="#000000" fo:font-family="Calibri" style:font-family-complex="Calibri" fo:font-size="11pt" fo:language="de" fo:country="AT"/>
    </style:style>
    <style:style style:family="text" style:name="T2660">
      <style:text-properties fo:color="#000000" fo:font-family="Calibri" style:font-family-complex="Calibri" fo:font-size="11pt" fo:language="de" fo:country="AT"/>
    </style:style>
    <style:style style:parent-style-name="900" style:list-style-name="WWNum5" style:family="paragraph" style:name="P61">
      <style:paragraph-properties fo:text-align="justify"/>
      <style:text-properties fo:color="#000000" fo:font-family="Calibri" style:font-family-complex="Calibri" fo:font-size="11pt" fo:language="de" fo:country="AT"/>
    </style:style>
    <style:style style:family="text" style:name="T2661">
      <style:text-properties fo:color="#000000" fo:font-family="Calibri" style:font-family-complex="Calibri" fo:font-size="11pt" fo:language="de" fo:country="AT"/>
    </style:style>
    <style:style style:family="text" style:name="T2662">
      <style:text-properties fo:color="#000000" fo:font-family="Times New Roman" style:font-family-complex="Times New Roman" fo:font-size="12pt" fo:language="de" fo:country="AT"/>
    </style:style>
    <style:style style:family="text" style:name="T2663">
      <style:text-properties fo:color="#000000" fo:font-family="Calibri" style:font-family-complex="Calibri" fo:font-size="11pt" fo:language="de" fo:country="AT"/>
    </style:style>
    <style:style style:family="paragraph" style:name="P62">
      <style:paragraph-properties/>
      <style:text-properties/>
    </style:style>
    <style:style style:family="text" style:name="T2664">
      <style:text-properties fo:color="#000000" fo:font-family="Calibri" style:font-family-complex="Calibri" fo:font-size="11pt" fo:language="de" fo:country="AT"/>
    </style:style>
    <style:style style:parent-style-name="894" style:family="paragraph" style:name="P63">
      <style:paragraph-properties fo:text-align="justify"/>
      <style:text-properties fo:color="#2f5496" fo:font-family="Calibri Light" style:font-family-complex="Calibri Light" fo:font-size="13pt" fo:language="de" fo:country="AT"/>
    </style:style>
    <style:style style:family="text" style:name="T2665">
      <style:text-properties fo:color="#2f5496" fo:font-family="Calibri Light" style:font-family-complex="Calibri Light" fo:font-size="13pt" fo:language="de" fo:country="AT"/>
    </style:style>
    <style:style style:family="text" style:name="T2666">
      <style:text-properties fo:color="#2f5496" fo:font-family="Calibri Light" style:font-family-complex="Calibri Light" fo:font-size="13pt" fo:language="de" fo:country="AT"/>
    </style:style>
    <style:style style:family="paragraph" style:name="P64">
      <style:paragraph-properties fo:margin-left="0cm" fo:margin-right="0cm" fo:text-indent="0cm" fo:border="none"/>
      <style:text-properties fo:font-family="Times New Roman" style:font-family-complex="Times New Roman" fo:font-size="12pt"/>
    </style:style>
    <style:style style:family="text" style:name="T2667">
      <style:text-properties fo:color="#000000" fo:font-family="Times New Roman" style:font-family-complex="Times New Roman" fo:font-size="12pt"/>
    </style:style>
    <style:style style:family="text" style:name="T2668">
      <style:text-properties fo:color="#000000" fo:font-family="Times New Roman" style:font-family-complex="Times New Roman" fo:font-size="12pt"/>
    </style:style>
    <style:style style:family="text" style:name="T2669">
      <style:text-properties fo:font-family="Times New Roman" style:font-family-complex="Times New Roman" fo:font-size="12pt"/>
    </style:style>
    <style:style style:family="paragraph" style:name="P6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2670">
      <style:text-properties fo:color="#000000" fo:font-family="Times New Roman" style:font-family-complex="Times New Roman" fo:font-size="12pt" fo:font-weight="bold"/>
    </style:style>
    <style:style style:family="text" style:name="T2671">
      <style:text-properties fo:color="#000000" fo:font-family="Times New Roman" style:font-family-complex="Times New Roman" fo:font-size="12pt"/>
    </style:style>
    <style:style style:family="text" style:name="T2672">
      <style:text-properties fo:color="#000000" fo:font-family="Times New Roman" style:font-family-complex="Times New Roman" fo:font-size="12pt"/>
    </style:style>
    <style:style style:family="paragraph" style:name="P6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2673">
      <style:text-properties fo:color="#000000" fo:font-family="Times New Roman" style:font-family-complex="Times New Roman" fo:font-size="12pt"/>
    </style:style>
    <style:style style:family="text" style:name="T2674">
      <style:text-properties fo:color="#000000" fo:font-family="Times New Roman" style:font-family-complex="Times New Roman" fo:font-size="12pt"/>
    </style:style>
    <style:style style:family="text" style:name="T2675">
      <style:text-properties fo:color="#000000" fo:font-family="Times New Roman" style:font-family-complex="Times New Roman" fo:font-size="12pt"/>
    </style:style>
    <style:style style:parent-style-name="900" style:list-style-name="WWNum46" style:family="paragraph" style:name="P67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676">
      <style:text-properties fo:color="#000000" fo:font-family="Courier New" style:font-family-complex="Courier New" fo:font-size="10pt" fo:language="de" fo:country="AT"/>
    </style:style>
    <style:style style:family="text" style:name="T2677">
      <style:text-properties fo:color="#000000" fo:font-family="Times New Roman" style:font-family-complex="Times New Roman" fo:font-size="12pt" fo:language="de" fo:country="AT"/>
    </style:style>
    <style:style style:family="text" style:name="T2678">
      <style:text-properties fo:color="#000000" fo:font-family="Courier New" style:font-family-complex="Courier New" fo:font-size="10pt" fo:language="de" fo:country="AT"/>
    </style:style>
    <style:style style:family="text" style:name="T2679">
      <style:text-properties fo:color="#000000" fo:font-family="Courier New" style:font-family-complex="Courier New" fo:font-size="10pt" fo:language="de" fo:country="AT"/>
    </style:style>
    <style:style style:parent-style-name="900" style:list-style-name="WWNum46" style:family="paragraph" style:name="P68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680">
      <style:text-properties fo:color="#000000" fo:font-family="Courier New" style:font-family-complex="Courier New" fo:font-size="10pt" fo:language="de" fo:country="AT"/>
    </style:style>
    <style:style style:family="text" style:name="T2681">
      <style:text-properties fo:color="#000000" fo:font-family="Times New Roman" style:font-family-complex="Times New Roman" fo:font-size="12pt" fo:language="de" fo:country="AT"/>
    </style:style>
    <style:style style:family="text" style:name="T2682">
      <style:text-properties fo:color="#000000" fo:font-family="Courier New" style:font-family-complex="Courier New" fo:font-size="10pt" fo:language="de" fo:country="AT"/>
    </style:style>
    <style:style style:family="text" style:name="T2683">
      <style:text-properties fo:color="#000000" fo:font-family="Courier New" style:font-family-complex="Courier New" fo:font-size="10pt" fo:language="de" fo:country="AT"/>
    </style:style>
    <style:style style:parent-style-name="900" style:list-style-name="WWNum46" style:family="paragraph" style:name="P69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684">
      <style:text-properties fo:color="#000000" fo:font-family="Courier New" style:font-family-complex="Courier New" fo:font-size="10pt" fo:language="de" fo:country="AT"/>
    </style:style>
    <style:style style:family="text" style:name="T2685">
      <style:text-properties fo:color="#000000" fo:font-family="Courier New" style:font-family-complex="Courier New" fo:font-size="10pt" fo:language="de" fo:country="AT"/>
    </style:style>
    <style:style style:family="text" style:name="T2686">
      <style:text-properties fo:color="#000000" fo:font-family="Courier New" style:font-family-complex="Courier New" fo:font-size="10pt" fo:language="de" fo:country="AT"/>
    </style:style>
    <style:style style:parent-style-name="900" style:list-style-name="WWNum46" style:family="paragraph" style:name="P70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687">
      <style:text-properties fo:color="#000000" fo:font-family="Courier New" style:font-family-complex="Courier New" fo:font-size="10pt" fo:language="de" fo:country="AT"/>
    </style:style>
    <style:style style:family="text" style:name="T2688">
      <style:text-properties fo:color="#000000" fo:font-family="Courier New" style:font-family-complex="Courier New" fo:font-size="10pt" fo:language="de" fo:country="AT"/>
    </style:style>
    <style:style style:family="text" style:name="T2689">
      <style:text-properties fo:color="#000000" fo:font-family="Courier New" style:font-family-complex="Courier New" fo:font-size="10pt" fo:language="de" fo:country="AT"/>
    </style:style>
    <style:style style:parent-style-name="900" style:list-style-name="WWNum46" style:family="paragraph" style:name="P71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690">
      <style:text-properties fo:color="#000000" fo:font-family="Times New Roman" style:font-family-complex="Times New Roman" fo:font-size="12pt" fo:language="de" fo:country="AT"/>
    </style:style>
    <style:style style:family="text" style:name="T2691">
      <style:text-properties fo:color="#000000" fo:font-family="Times New Roman" style:font-family-complex="Times New Roman" fo:font-size="12pt" fo:language="de" fo:country="AT"/>
    </style:style>
    <style:style style:family="text" style:name="T2692">
      <style:text-properties fo:color="#000000" fo:font-family="Times New Roman" style:font-family-complex="Times New Roman" fo:font-size="12pt" fo:language="de" fo:country="AT"/>
    </style:style>
    <style:style style:family="paragraph" style:name="P72">
      <style:paragraph-properties fo:margin-left="0cm" fo:margin-right="0cm" fo:text-indent="0cm" fo:border="none"/>
      <style:text-properties fo:font-family="Times New Roman" style:font-family-complex="Times New Roman" fo:font-size="12pt"/>
    </style:style>
    <style:style style:family="text" style:name="T2693">
      <style:text-properties fo:font-family="Times New Roman" style:font-family-complex="Times New Roman" fo:font-size="12pt"/>
    </style:style>
    <style:style style:family="text" style:name="T2694">
      <style:text-properties fo:font-family="Times New Roman" style:font-family-complex="Times New Roman" fo:font-size="12pt"/>
    </style:style>
    <style:style style:family="text" style:name="T2695">
      <style:text-properties fo:font-family="Times New Roman" style:font-family-complex="Times New Roman" fo:font-size="12pt"/>
    </style:style>
    <style:style style:family="paragraph" style:name="P73">
      <style:paragraph-properties fo:margin-left="0cm" fo:margin-right="0cm" fo:text-indent="0cm" fo:border="none"/>
      <style:text-properties fo:font-family="Times New Roman" style:font-family-complex="Times New Roman" fo:font-size="12pt"/>
    </style:style>
    <style:style style:family="text" style:name="T2696">
      <style:text-properties fo:color="#000000" fo:font-family="Times New Roman" style:font-family-complex="Times New Roman" fo:font-size="12pt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697">
      <style:text-properties fo:color="#000000" fo:font-family="Times New Roman" style:font-family-complex="Times New Roman" fo:font-size="12pt"/>
    </style:style>
    <style:style style:family="text" style:name="T2698">
      <style:text-properties fo:font-family="Times New Roman" style:font-family-complex="Times New Roman" fo:font-size="12pt"/>
    </style:style>
    <style:style style:family="paragraph" style:name="P74">
      <style:paragraph-properties fo:margin-left="0cm" fo:margin-right="0cm" fo:text-indent="0cm" fo:border="none"/>
      <style:text-properties fo:font-family="Times New Roman" style:font-family-complex="Times New Roman" fo:font-size="12pt"/>
    </style:style>
    <style:style style:family="text" style:name="T2699">
      <style:text-properties fo:font-family="Times New Roman" style:font-family-complex="Times New Roman" fo:font-size="12pt"/>
    </style:style>
    <style:style style:family="text" style:name="T2700">
      <style:text-properties fo:font-family="Times New Roman" style:font-family-complex="Times New Roman" fo:font-size="12pt"/>
    </style:style>
    <style:style style:family="text" style:name="T2701">
      <style:text-properties fo:font-family="Times New Roman" style:font-family-complex="Times New Roman" fo:font-size="12pt"/>
    </style:style>
    <style:style style:family="paragraph" style:name="P75">
      <style:paragraph-properties fo:margin-left="0cm" fo:margin-right="0cm" fo:text-indent="0cm" fo:border="none"/>
      <style:text-properties fo:color="#000000" fo:font-family="Times New Roman" style:font-family-complex="Times New Roman" fo:font-size="12pt" fo:font-style="italic"/>
    </style:style>
    <style:style style:family="text" style:name="T2702">
      <style:text-properties fo:color="#000000" fo:font-family="Times New Roman" style:font-family-complex="Times New Roman" fo:font-size="12pt" fo:language="de" fo:country="AT" fo:font-style="italic"/>
    </style:style>
    <style:style style:family="text" style:name="T2703">
      <style:text-properties fo:color="#000000" fo:font-family="Times New Roman" style:font-family-complex="Times New Roman" fo:font-size="12pt" fo:font-style="italic"/>
    </style:style>
    <style:style style:family="text" style:name="T2704">
      <style:text-properties fo:color="#000000" fo:font-family="Times New Roman" style:font-family-complex="Times New Roman" fo:font-size="12pt" fo:font-style="italic"/>
    </style:style>
    <style:style style:family="paragraph" style:name="P76">
      <style:paragraph-properties fo:margin-left="0cm" fo:margin-right="0cm" fo:text-indent="0cm" fo:border="none"/>
      <style:text-properties fo:color="#000000" fo:font-family="Times New Roman" style:font-family-complex="Times New Roman" fo:font-size="12pt" fo:font-style="italic"/>
    </style:style>
    <style:style style:family="text" style:name="T2705">
      <style:text-properties fo:color="#000000" fo:font-family="Times New Roman" style:font-family-complex="Times New Roman" fo:font-size="12pt" fo:font-style="italic"/>
    </style:style>
    <style:style style:family="text" style:name="T2706">
      <style:text-properties fo:color="#000000" fo:font-family="Times New Roman" style:font-family-complex="Times New Roman" fo:font-size="12pt" fo:font-style="italic"/>
    </style:style>
    <style:style style:parent-style-name="900" style:list-style-name="WWNum56" style:family="paragraph" style:name="P77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07">
      <style:text-properties fo:color="#000000" fo:font-family="Times New Roman" style:font-family-complex="Times New Roman" fo:font-size="12pt" fo:language="de" fo:country="AT"/>
    </style:style>
    <style:style style:family="text" style:name="T2708">
      <style:text-properties fo:color="#000000" fo:font-family="Times New Roman" style:font-family-complex="Times New Roman" fo:font-size="12pt" fo:language="de" fo:country="AT"/>
    </style:style>
    <style:style style:family="text" style:name="T2709">
      <style:text-properties fo:color="#000000" fo:font-family="Courier New" style:font-family-complex="Courier New" fo:font-size="10pt" fo:language="de" fo:country="AT"/>
    </style:style>
    <style:style style:family="text" style:name="T2710">
      <style:text-properties fo:color="#000000" fo:font-family="Times New Roman" style:font-family-complex="Times New Roman" fo:font-size="12pt" fo:language="de" fo:country="AT"/>
    </style:style>
    <style:style style:family="text" style:name="T2711">
      <style:text-properties fo:color="#000000" fo:font-family="Courier New" style:font-family-complex="Courier New" fo:font-size="10pt" fo:language="de" fo:country="AT"/>
    </style:style>
    <style:style style:family="text" style:name="T2712">
      <style:text-properties fo:color="#000000" fo:font-family="Times New Roman" style:font-family-complex="Times New Roman" fo:font-size="12pt" fo:language="de" fo:country="AT"/>
    </style:style>
    <style:style style:family="text" style:name="T2713">
      <style:text-properties fo:color="#000000" fo:font-family="Courier New" style:font-family-complex="Courier New" fo:font-size="10pt" fo:language="de" fo:country="AT"/>
    </style:style>
    <style:style style:family="text" style:name="T2714">
      <style:text-properties fo:color="#000000" fo:font-family="Times New Roman" style:font-family-complex="Times New Roman" fo:font-size="12pt" fo:language="de" fo:country="AT"/>
    </style:style>
    <style:style style:family="text" style:name="T2715">
      <style:text-properties fo:color="#000000" fo:font-family="Times New Roman" style:font-family-complex="Times New Roman" fo:font-size="12pt" fo:language="de" fo:country="AT"/>
    </style:style>
    <style:style style:family="text" style:name="T2716">
      <style:text-properties fo:color="#000000" fo:font-family="Times New Roman" style:font-family-complex="Times New Roman" fo:font-size="12pt" fo:language="de" fo:country="AT"/>
    </style:style>
    <style:style style:parent-style-name="900" style:list-style-name="WWNum57" style:family="paragraph" style:name="P78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17">
      <style:text-properties fo:color="#000000" fo:font-family="Times New Roman" style:font-family-complex="Times New Roman" fo:font-size="12pt" fo:language="de" fo:country="AT"/>
    </style:style>
    <style:style style:family="text" style:name="T2718">
      <style:text-properties fo:color="#000000" fo:font-family="Courier New" style:font-family-complex="Courier New" fo:font-size="10pt" fo:language="de" fo:country="AT"/>
    </style:style>
    <style:style style:family="text" style:name="T2719">
      <style:text-properties fo:color="#000000" fo:font-family="Times New Roman" style:font-family-complex="Times New Roman" fo:font-size="12pt" fo:language="de" fo:country="AT"/>
    </style:style>
    <style:style style:family="text" style:name="T2720">
      <style:text-properties fo:color="#000000" fo:font-family="Courier New" style:font-family-complex="Courier New" fo:font-size="10pt" fo:language="de" fo:country="AT"/>
    </style:style>
    <style:style style:family="text" style:name="T2721">
      <style:text-properties fo:color="#000000" fo:font-family="Times New Roman" style:font-family-complex="Times New Roman" fo:font-size="12pt" fo:language="de" fo:country="AT"/>
    </style:style>
    <style:style style:family="text" style:name="T2722">
      <style:text-properties fo:color="#000000" fo:font-family="Times New Roman" style:font-family-complex="Times New Roman" fo:font-size="12pt" fo:language="de" fo:country="AT"/>
    </style:style>
    <style:style style:family="paragraph" style:name="P79">
      <style:paragraph-properties fo:margin-left="0cm" fo:margin-right="0cm" fo:text-indent="0cm" fo:border="none"/>
      <style:text-properties fo:color="#000000" fo:font-family="Times New Roman" style:font-family-complex="Times New Roman" fo:font-size="12pt" fo:font-weight="bold"/>
    </style:style>
    <style:style style:family="text" style:name="T2723">
      <style:text-properties fo:color="#000000" fo:font-family="Times New Roman" style:font-family-complex="Times New Roman" fo:font-size="12pt" fo:font-weight="bold"/>
    </style:style>
    <style:style style:family="text" style:name="T2724">
      <style:text-properties fo:color="#000000" fo:font-family="Times New Roman" style:font-family-complex="Times New Roman" fo:font-size="12pt" fo:font-weight="bold"/>
    </style:style>
    <style:style style:family="text" style:name="T2725">
      <style:text-properties fo:color="#000000" fo:font-family="Times New Roman" style:font-family-complex="Times New Roman" fo:font-size="12pt" fo:font-weight="bold"/>
    </style:style>
    <style:style style:family="paragraph" style:name="P80">
      <style:paragraph-properties fo:margin-left="0cm" fo:margin-right="0cm" fo:text-indent="0cm" fo:border="none"/>
      <style:text-properties fo:color="#000000" fo:font-family="Times New Roman" style:font-family-complex="Times New Roman" fo:font-size="12pt" fo:font-weight="bold"/>
    </style:style>
    <style:style style:family="text" style:name="T2726">
      <style:text-properties fo:color="#000000" fo:font-family="Times New Roman" style:font-family-complex="Times New Roman" fo:font-size="12pt" fo:font-weight="bold"/>
    </style:style>
    <style:style style:family="text" style:name="T2727">
      <style:text-properties fo:color="#000000" fo:font-family="Times New Roman" style:font-family-complex="Times New Roman" fo:font-size="12pt" fo:font-weight="bold"/>
    </style:style>
    <style:style style:parent-style-name="900" style:list-style-name="WWNum48" style:family="paragraph" style:name="P81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28">
      <style:text-properties fo:color="#000000" fo:font-family="Times New Roman" style:font-family-complex="Times New Roman" fo:font-size="12pt" fo:language="de" fo:country="AT"/>
    </style:style>
    <style:style style:family="text" style:name="T2729">
      <style:text-properties fo:color="#000000" fo:font-family="Times New Roman" style:font-family-complex="Times New Roman" fo:font-size="12pt" fo:language="de" fo:country="AT"/>
    </style:style>
    <style:style style:family="text" style:name="T2730">
      <style:text-properties fo:color="#000000" fo:font-family="Times New Roman" style:font-family-complex="Times New Roman" fo:font-size="12pt" fo:language="de" fo:country="AT"/>
    </style:style>
    <style:style style:parent-style-name="900" style:list-style-name="WWNum48" style:family="paragraph" style:name="P82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31">
      <style:text-properties fo:color="#000000" fo:font-family="Times New Roman" style:font-family-complex="Times New Roman" fo:font-size="12pt" fo:language="de" fo:country="AT"/>
    </style:style>
    <style:style style:family="text" style:name="T2732">
      <style:text-properties fo:color="#000000" fo:font-family="Times New Roman" style:font-family-complex="Times New Roman" fo:font-size="12pt" fo:language="de" fo:country="AT"/>
    </style:style>
    <style:style style:family="text" style:name="T2733">
      <style:text-properties fo:color="#000000" fo:font-family="Times New Roman" style:font-family-complex="Times New Roman" fo:font-size="12pt" fo:language="de" fo:country="AT"/>
    </style:style>
    <style:style style:parent-style-name="900" style:list-style-name="WWNum48" style:family="paragraph" style:name="P83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34">
      <style:text-properties fo:color="#000000" fo:font-family="Times New Roman" style:font-family-complex="Times New Roman" fo:font-size="12pt" fo:language="de" fo:country="AT"/>
    </style:style>
    <style:style style:family="text" style:name="T2735">
      <style:text-properties fo:color="#000000" fo:font-family="Courier New" style:font-family-complex="Courier New" fo:font-size="10pt" fo:language="de" fo:country="AT"/>
    </style:style>
    <style:style style:family="text" style:name="T2736">
      <style:text-properties fo:color="#000000" fo:font-family="Times New Roman" style:font-family-complex="Times New Roman" fo:font-size="12pt" fo:language="de" fo:country="AT"/>
    </style:style>
    <style:style style:family="text" style:name="T2737">
      <style:text-properties fo:color="#000000" fo:font-family="Times New Roman" style:font-family-complex="Times New Roman" fo:font-size="12pt" fo:language="de" fo:country="AT"/>
    </style:style>
    <style:style style:family="text" style:name="T2738">
      <style:text-properties fo:color="#000000" fo:font-family="Times New Roman" style:font-family-complex="Times New Roman" fo:font-size="12pt" fo:language="de" fo:country="AT"/>
    </style:style>
    <style:style style:family="text" style:name="T2739">
      <style:text-properties fo:color="#000000" fo:font-family="Times New Roman" style:font-family-complex="Times New Roman" fo:font-size="12pt" fo:language="de" fo:country="AT"/>
    </style:style>
    <style:style style:family="text" style:name="T2740">
      <style:text-properties fo:color="#000000" fo:font-family="Times New Roman" style:font-family-complex="Times New Roman" fo:font-size="12pt" fo:language="de" fo:country="AT"/>
    </style:style>
    <style:style style:family="text" style:name="T2741">
      <style:text-properties fo:color="#000000" fo:font-family="Times New Roman" style:font-family-complex="Times New Roman" fo:font-size="12pt" fo:language="de" fo:country="AT"/>
    </style:style>
    <style:style style:family="paragraph" style:name="P84">
      <style:paragraph-properties fo:margin-left="0cm" fo:margin-right="0cm" fo:text-indent="0cm" fo:break-before="page" fo:border="none"/>
      <style:text-properties fo:color="#000000" fo:font-family="Times New Roman" style:font-family-complex="Times New Roman" fo:font-size="12pt" fo:font-weight="bold"/>
    </style:style>
    <style:style style:family="text" style:name="T2742">
      <style:text-properties fo:color="#000000" fo:font-family="Times New Roman" style:font-family-complex="Times New Roman" fo:font-size="12pt" fo:language="de" fo:country="AT" fo:font-weight="bold"/>
    </style:style>
    <style:style style:family="text" style:name="T2743">
      <style:text-properties fo:color="#000000" fo:font-family="Times New Roman" style:font-family-complex="Times New Roman" fo:font-size="12pt" fo:font-weight="bold"/>
    </style:style>
    <style:style style:family="paragraph" style:name="P85">
      <style:paragraph-properties fo:margin-left="1.251cm" fo:text-indent="0cm"/>
      <style:text-properties fo:color="#000000" fo:font-family="Calibri" style:font-family-complex="Calibri" fo:font-size="11pt" fo:language="de" fo:country="AT"/>
    </style:style>
    <style:style style:family="text" style:name="T2744">
      <style:text-properties fo:color="#000000" fo:font-family="Calibri" style:font-family-complex="Calibri" fo:font-size="11pt" fo:language="de" fo:country="AT"/>
    </style:style>
    <style:style style:family="text" style:name="T2745">
      <style:text-properties fo:color="#000000" fo:font-family="Calibri" style:font-family-complex="Calibri" fo:font-size="11pt" fo:language="de" fo:country="AT"/>
    </style:style>
    <style:style style:parent-style-name="900" style:list-style-name="WWNum50" style:family="paragraph" style:name="P86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46">
      <style:text-properties fo:color="#000000" fo:font-family="Times New Roman" style:font-family-complex="Times New Roman" fo:font-size="12pt" fo:language="de" fo:country="AT"/>
    </style:style>
    <style:style style:family="text" style:name="T2747">
      <style:text-properties fo:color="#000000" fo:font-family="Times New Roman" style:font-family-complex="Times New Roman" fo:font-size="12pt" fo:language="de" fo:country="AT"/>
    </style:style>
    <style:style style:family="text" style:name="T2748">
      <style:text-properties fo:color="#000000" fo:font-family="Times New Roman" style:font-family-complex="Times New Roman" fo:font-size="12pt" fo:language="de" fo:country="AT"/>
    </style:style>
    <style:style style:family="paragraph" style:name="P87">
      <style:paragraph-properties fo:margin-left="0cm" fo:margin-right="0cm" fo:text-indent="0cm" fo:border="none"/>
      <style:text-properties fo:color="#000000" fo:font-family="Times New Roman" style:font-family-complex="Times New Roman" fo:font-size="12pt" fo:language="de" fo:country="AT"/>
    </style:style>
    <style:style style:family="text" style:name="T2749">
      <style:text-properties fo:color="#000000" fo:font-family="Times New Roman" style:font-family-complex="Times New Roman" fo:font-size="12pt" fo:language="de" fo:country="AT"/>
    </style:style>
    <style:style style:family="text" style:name="T2750">
      <style:text-properties fo:color="#000000" fo:font-family="Times New Roman" style:font-family-complex="Times New Roman" fo:font-size="12pt" fo:language="de" fo:country="AT"/>
    </style:style>
    <style:style style:parent-style-name="900" style:list-style-name="WWNum50" style:family="paragraph" style:name="P88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51">
      <style:text-properties fo:color="#000000" fo:font-family="Times New Roman" style:font-family-complex="Times New Roman" fo:font-size="12pt" fo:language="de" fo:country="AT"/>
    </style:style>
    <style:style style:family="text" style:name="T2752">
      <style:text-properties fo:color="#000000" fo:font-family="Calibri" style:font-family-complex="Calibri" fo:font-size="11pt" fo:language="de" fo:country="AT"/>
    </style:style>
    <style:style style:family="text" style:name="T2753">
      <style:text-properties fo:color="#000000" fo:font-family="Calibri" style:font-family-complex="Calibri" fo:font-size="11pt" fo:language="de" fo:country="AT"/>
    </style:style>
    <style:style style:family="text" style:name="T2754">
      <style:text-properties fo:color="#000000" fo:font-family="Calibri" style:font-family-complex="Calibri" fo:font-size="11pt" fo:language="de" fo:country="AT"/>
    </style:style>
    <style:style style:family="paragraph" style:name="P89">
      <style:paragraph-properties fo:margin-left="0cm" fo:margin-right="0cm" fo:text-indent="0cm" fo:border="none"/>
      <style:text-properties fo:color="#000000" fo:font-family="Times New Roman" style:font-family-complex="Times New Roman" fo:font-size="12pt" fo:language="de" fo:country="AT"/>
    </style:style>
    <style:style style:family="text" style:name="T2755">
      <style:text-properties fo:color="#000000" fo:font-family="Times New Roman" style:font-family-complex="Times New Roman" fo:font-size="12pt" fo:language="de" fo:country="AT"/>
    </style:style>
    <style:style style:family="text" style:name="T2756">
      <style:text-properties fo:color="#000000" fo:font-family="Times New Roman" style:font-family-complex="Times New Roman" fo:font-size="12pt" fo:language="de" fo:country="AT"/>
    </style:style>
    <style:style style:family="paragraph" style:name="P90">
      <style:paragraph-properties fo:margin-left="0cm" fo:margin-right="0cm" fo:text-indent="0cm" fo:border="none"/>
      <style:text-properties fo:color="#000000" fo:font-family="Times New Roman" style:font-family-complex="Times New Roman" fo:font-size="12pt" fo:language="de" fo:country="AT"/>
    </style:style>
    <style:style style:family="text" style:name="T2757">
      <style:text-properties fo:color="#000000" fo:font-family="Times New Roman" style:font-family-complex="Times New Roman" fo:font-size="12pt" fo:language="de" fo:country="AT"/>
    </style:style>
    <style:style style:family="text" style:name="T2758">
      <style:text-properties fo:color="#000000" fo:font-family="Times New Roman" style:font-family-complex="Times New Roman" fo:font-size="12pt" fo:language="de" fo:country="AT"/>
    </style:style>
    <style:style style:family="paragraph" style:name="P91">
      <style:paragraph-properties fo:margin-left="0cm" fo:margin-right="0cm" fo:text-indent="0cm" fo:border="none"/>
      <style:text-properties fo:color="#000000" fo:font-family="Times New Roman" style:font-family-complex="Times New Roman" fo:font-size="12pt" fo:language="de" fo:country="AT" fo:font-weight="bold"/>
    </style:style>
    <style:style style:family="text" style:name="T2759">
      <style:text-properties fo:color="#000000" fo:font-family="Times New Roman" style:font-family-complex="Times New Roman" fo:font-size="12pt" fo:font-weight="bold"/>
    </style:style>
    <style:style style:family="text" style:name="T2760">
      <style:text-properties fo:color="#000000" fo:font-family="Times New Roman" style:font-family-complex="Times New Roman" fo:font-size="12pt" fo:language="de" fo:country="AT" fo:font-weight="bold"/>
    </style:style>
    <style:style style:family="text" style:name="T2761">
      <style:text-properties fo:color="#000000" fo:font-family="Times New Roman" style:font-family-complex="Times New Roman" fo:font-size="12pt" fo:font-weight="bold"/>
    </style:style>
    <style:style style:family="text" style:name="T2762">
      <style:text-properties fo:color="#000000" fo:font-family="Times New Roman" style:font-family-complex="Times New Roman" fo:font-size="12pt" fo:font-weight="bold"/>
    </style:style>
    <style:style style:family="text" style:name="T2763">
      <style:text-properties fo:color="#000000" fo:font-family="Times New Roman" style:font-family-complex="Times New Roman" fo:font-size="12pt" fo:font-weight="bold"/>
    </style:style>
    <style:style style:family="text" style:name="T2764">
      <style:text-properties fo:color="#000000" fo:font-family="Times New Roman" style:font-family-complex="Times New Roman" fo:font-size="12pt" fo:font-weight="bold"/>
    </style:style>
    <style:style style:family="text" style:name="T2765">
      <style:text-properties fo:color="#000000" fo:font-family="Times New Roman" style:font-family-complex="Times New Roman" fo:font-size="12pt" fo:font-weight="bold"/>
    </style:style>
    <style:style style:family="paragraph" style:name="P92">
      <style:paragraph-properties fo:margin-left="0cm" fo:margin-right="0cm" fo:text-indent="0cm" fo:border="none"/>
      <style:text-properties fo:color="#000000" fo:font-family="Times New Roman" style:font-family-complex="Times New Roman" fo:font-size="12pt" fo:font-weight="bold"/>
    </style:style>
    <style:style style:family="text" style:name="T2766">
      <style:text-properties fo:color="#000000" fo:font-family="Times New Roman" style:font-family-complex="Times New Roman" fo:font-size="12pt" fo:language="de" fo:country="AT" fo:font-weight="bold"/>
    </style:style>
    <style:style style:family="text" style:name="T2767">
      <style:text-properties fo:color="#000000" fo:font-family="Times New Roman" style:font-family-complex="Times New Roman" fo:font-size="12pt" fo:language="de" fo:country="AT" fo:font-weight="bold"/>
    </style:style>
    <style:style style:parent-style-name="900" style:list-style-name="WWNum50" style:family="paragraph" style:name="P93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68">
      <style:text-properties fo:color="#000000" fo:font-family="Times New Roman" style:font-family-complex="Times New Roman" fo:font-size="12pt" fo:language="de" fo:country="AT"/>
    </style:style>
    <style:style style:family="text" style:name="T2769">
      <style:text-properties fo:color="#000000" fo:font-family="Times New Roman" style:font-family-complex="Times New Roman" fo:font-size="12pt" fo:language="de" fo:country="AT"/>
    </style:style>
    <style:style style:family="text" style:name="T2770">
      <style:text-properties fo:color="#000000" fo:font-family="Times New Roman" style:font-family-complex="Times New Roman" fo:font-size="12pt" fo:language="de" fo:country="AT"/>
    </style:style>
    <style:style style:parent-style-name="900" style:list-style-name="WWNum50" style:family="paragraph" style:name="P94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71">
      <style:text-properties fo:color="#000000" fo:font-family="Times New Roman" style:font-family-complex="Times New Roman" fo:font-size="12pt" fo:language="de" fo:country="AT"/>
    </style:style>
    <style:style style:family="text" style:name="T2772">
      <style:text-properties fo:color="#000000" fo:font-family="Courier New" style:font-family-complex="Courier New" fo:font-size="10pt" fo:language="de" fo:country="AT"/>
    </style:style>
    <style:style style:family="text" style:name="T2773">
      <style:text-properties fo:color="#000000" fo:font-family="Times New Roman" style:font-family-complex="Times New Roman" fo:font-size="12pt" fo:language="de" fo:country="AT"/>
    </style:style>
    <style:style style:family="text" style:name="T2774">
      <style:text-properties fo:color="#000000" fo:font-family="Courier New" style:font-family-complex="Courier New" fo:font-size="10pt" fo:language="de" fo:country="AT"/>
    </style:style>
    <style:style style:family="text" style:name="T2775">
      <style:text-properties fo:color="#000000" fo:font-family="Times New Roman" style:font-family-complex="Times New Roman" fo:font-size="12pt" fo:language="de" fo:country="AT"/>
    </style:style>
    <style:style style:family="text" style:name="T2776">
      <style:text-properties fo:color="#000000" fo:font-family="Courier New" style:font-family-complex="Courier New" fo:font-size="10pt" fo:language="de" fo:country="AT"/>
    </style:style>
    <style:style style:family="text" style:name="T2777">
      <style:text-properties fo:color="#000000" fo:font-family="Times New Roman" style:font-family-complex="Times New Roman" fo:font-size="12pt" fo:language="de" fo:country="AT"/>
    </style:style>
    <style:style style:family="text" style:name="T2778">
      <style:text-properties fo:color="#000000" fo:font-family="Courier New" style:font-family-complex="Courier New" fo:font-size="10pt" fo:language="de" fo:country="AT"/>
    </style:style>
    <style:style style:family="text" style:name="T2779">
      <style:text-properties fo:color="#000000" fo:font-family="Times New Roman" style:font-family-complex="Times New Roman" fo:font-size="12pt" fo:language="de" fo:country="AT"/>
    </style:style>
    <style:style style:family="text" style:name="T2780">
      <style:text-properties fo:color="#000000" fo:font-family="Times New Roman" style:font-family-complex="Times New Roman" fo:font-size="12pt" fo:language="de" fo:country="AT"/>
    </style:style>
    <style:style style:family="text" style:name="T2781">
      <style:text-properties fo:color="#000000" fo:font-family="Times New Roman" style:font-family-complex="Times New Roman" fo:font-size="12pt" fo:language="de" fo:country="AT"/>
    </style:style>
    <style:style style:parent-style-name="900" style:list-style-name="WWNum50" style:family="paragraph" style:name="P95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82">
      <style:text-properties fo:color="#000000" fo:font-family="Times New Roman" style:font-family-complex="Times New Roman" fo:font-size="12pt" fo:language="de" fo:country="AT"/>
    </style:style>
    <style:style style:family="text" style:name="T2783">
      <style:text-properties fo:color="#000000" fo:font-family="Times New Roman" style:font-family-complex="Times New Roman" fo:font-size="12pt" fo:language="de" fo:country="AT"/>
    </style:style>
    <style:style style:family="text" style:name="T2784">
      <style:text-properties fo:color="#000000" fo:font-family="Times New Roman" style:font-family-complex="Times New Roman" fo:font-size="12pt" fo:language="de" fo:country="AT"/>
    </style:style>
    <style:style style:parent-style-name="900" style:list-style-name="WWNum50" style:family="paragraph" style:name="P96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85">
      <style:text-properties fo:color="#000000" fo:font-family="Times New Roman" style:font-family-complex="Times New Roman" fo:font-size="12pt" fo:language="de" fo:country="AT"/>
    </style:style>
    <style:style style:family="text" style:name="T2786">
      <style:text-properties fo:color="#000000" fo:font-family="Times New Roman" style:font-family-complex="Times New Roman" fo:font-size="12pt" fo:language="de" fo:country="AT"/>
    </style:style>
    <style:style style:family="text" style:name="T2787">
      <style:text-properties fo:color="#000000" fo:font-family="Times New Roman" style:font-family-complex="Times New Roman" fo:font-size="12pt" fo:language="de" fo:country="AT"/>
    </style:style>
    <style:style style:family="paragraph" style:name="P97">
      <style:paragraph-properties fo:margin-left="1.251cm" fo:margin-right="0cm" fo:text-indent="0cm" fo:border="none"/>
      <style:text-properties fo:font-family="Times New Roman" style:font-family-complex="Times New Roman" fo:font-size="12pt"/>
    </style:style>
    <style:style style:family="text" style:name="T2788">
      <style:text-properties fo:color="#000000" fo:font-family="Times New Roman" style:font-family-complex="Times New Roman" fo:font-size="12pt"/>
    </style:style>
    <style:style style:family="text" style:name="T2789">
      <style:text-properties fo:color="#000000" fo:font-family="Times New Roman" style:font-family-complex="Times New Roman" fo:font-size="12pt"/>
    </style:style>
    <style:style style:family="text" style:name="T2790">
      <style:text-properties fo:font-family="Times New Roman" style:font-family-complex="Times New Roman" fo:font-size="12pt"/>
    </style:style>
    <style:style style:family="paragraph" style:name="P98">
      <style:paragraph-properties fo:margin-left="0cm" fo:margin-right="0cm" fo:text-indent="0cm" fo:border="none"/>
      <style:text-properties fo:color="#000000" fo:font-family="Times New Roman" style:font-family-complex="Times New Roman" fo:font-size="12pt" fo:font-weight="bold"/>
    </style:style>
    <style:style style:family="text" style:name="T2791">
      <style:text-properties fo:color="#000000" fo:font-family="Times New Roman" style:font-family-complex="Times New Roman" fo:font-size="12pt" fo:font-weight="bold"/>
    </style:style>
    <style:style style:family="text" style:name="T2792">
      <style:text-properties fo:color="#000000" fo:font-family="Times New Roman" style:font-family-complex="Times New Roman" fo:font-size="12pt" fo:font-weight="bold"/>
    </style:style>
    <style:style style:family="text" style:name="T2793">
      <style:text-properties fo:color="#000000" fo:font-family="Times New Roman" style:font-family-complex="Times New Roman" fo:font-size="12pt" fo:font-weight="bold"/>
    </style:style>
    <style:style style:family="paragraph" style:name="P99">
      <style:paragraph-properties fo:margin-left="0cm" fo:margin-right="0cm" fo:text-indent="0cm" fo:border="none"/>
      <style:text-properties fo:color="#000000" fo:font-family="Times New Roman" style:font-family-complex="Times New Roman" fo:font-size="12pt" fo:font-weight="bold"/>
    </style:style>
    <style:style style:family="text" style:name="T2794">
      <style:text-properties fo:color="#000000" fo:font-family="Times New Roman" style:font-family-complex="Times New Roman" fo:font-size="12pt" fo:font-weight="bold"/>
    </style:style>
    <style:style style:family="text" style:name="T2795">
      <style:text-properties fo:color="#000000" fo:font-family="Times New Roman" style:font-family-complex="Times New Roman" fo:font-size="12pt" fo:font-weight="bold"/>
    </style:style>
    <style:style style:parent-style-name="900" style:list-style-name="WWNum63" style:family="paragraph" style:name="P100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96">
      <style:text-properties fo:color="#000000" fo:font-family="Times New Roman" style:font-family-complex="Times New Roman" fo:font-size="12pt" fo:language="de" fo:country="AT"/>
    </style:style>
    <style:style style:family="text" style:name="T2797">
      <style:text-properties fo:color="#000000" fo:font-family="Times New Roman" style:font-family-complex="Times New Roman" fo:font-size="12pt" fo:language="de" fo:country="AT"/>
    </style:style>
    <style:style style:family="text" style:name="T2798">
      <style:text-properties fo:color="#000000" fo:font-family="Times New Roman" style:font-family-complex="Times New Roman" fo:font-size="12pt" fo:language="de" fo:country="AT"/>
    </style:style>
    <style:style style:parent-style-name="900" style:list-style-name="WWNum63" style:family="paragraph" style:name="P101">
      <style:paragraph-properties fo:margin-left="0cm" fo:margin-right="0cm" fo:text-indent="0cm" fo:border="none"/>
      <style:text-properties fo:color="#000000" fo:font-family="Calibri" style:font-family-complex="Calibri" fo:font-size="11pt" fo:language="de" fo:country="AT"/>
    </style:style>
    <style:style style:family="text" style:name="T2799">
      <style:text-properties fo:color="#000000" fo:font-family="Times New Roman" style:font-family-complex="Times New Roman" fo:font-size="12pt" fo:language="de" fo:country="AT"/>
    </style:style>
    <style:style style:family="text" style:name="T2800">
      <style:text-properties fo:color="#000000" fo:font-family="Times New Roman" style:font-family-complex="Times New Roman" fo:font-size="12pt" fo:language="de" fo:country="AT"/>
    </style:style>
    <style:style style:family="text" style:name="T2801">
      <style:text-properties fo:color="#000000" fo:font-family="Times New Roman" style:font-family-complex="Times New Roman" fo:font-size="12pt" fo:language="de" fo:country="AT"/>
    </style:style>
    <style:style style:parent-style-name="900" style:family="paragraph" style:name="P102">
      <style:paragraph-properties fo:text-align="justify" fo:margin-left="1.27cm" fo:margin-right="0cm" fo:text-indent="0cm"/>
      <style:text-properties fo:color="#000000" fo:font-family="Calibri" style:font-family-complex="Calibri" fo:font-size="11pt" fo:language="de" fo:country="AT"/>
    </style:style>
    <style:style style:family="text" style:name="T2802">
      <style:text-properties fo:color="#000000" fo:font-family="Calibri" style:font-family-complex="Calibri" fo:font-size="11pt" fo:language="de" fo:country="AT"/>
    </style:style>
    <style:style style:family="text" style:name="T2803">
      <style:text-properties fo:color="#000000" fo:font-family="Calibri" style:font-family-complex="Calibri" fo:font-size="11pt" fo:language="de" fo:country="AT"/>
    </style:style>
    <style:style style:family="text" style:name="T2804">
      <style:text-properties fo:color="#000000" fo:font-family="Calibri" style:font-family-complex="Calibri" fo:font-size="11pt" fo:language="de" fo:country="AT"/>
    </style:style>
    <style:style style:family="text" style:name="T2805">
      <style:text-properties fo:color="#000000" fo:font-family="Calibri" style:font-family-complex="Calibri" fo:font-size="11pt" fo:language="de" fo:country="AT"/>
    </style:style>
    <style:style style:family="text" style:name="T2806">
      <style:text-properties fo:color="#000000" fo:font-family="Calibri" style:font-family-complex="Calibri" fo:font-size="11pt" fo:language="de" fo:country="AT"/>
    </style:style>
    <style:style style:family="text" style:name="T2807">
      <style:text-properties fo:color="#000000" fo:font-family="Calibri" style:font-family-complex="Calibri" fo:font-size="11pt" fo:language="de" fo:country="AT"/>
    </style:style>
    <style:style style:family="paragraph" style:name="P103">
      <style:paragraph-properties fo:margin-left="0cm" fo:margin-right="0cm" fo:text-indent="0cm"/>
      <style:text-properties fo:color="#000000" fo:font-family="Calibri" style:font-family-complex="Calibri" fo:font-size="11pt" fo:language="de" fo:country="AT"/>
    </style:style>
    <style:style style:family="text" style:name="T2808">
      <style:text-properties fo:color="#000000" fo:font-family="Calibri" style:font-family-complex="Calibri" fo:font-size="11pt" fo:language="de" fo:country="AT"/>
    </style:style>
    <style:style style:family="text" style:name="T2809">
      <style:text-properties fo:color="#000000" fo:font-family="Calibri" style:font-family-complex="Calibri" fo:font-size="11pt" fo:language="de" fo:country="AT"/>
    </style:style>
    <style:style style:family="text" style:name="T2810">
      <style:text-properties fo:color="#000000" fo:font-family="Calibri" style:font-family-complex="Calibri" fo:font-size="11pt" fo:language="de" fo:country="AT"/>
    </style:style>
  </office:automatic-styles>
  <office:body>
    <office:text text:use-soft-page-breaks="true">
      <text:list>
        <text:list-item>
          <text:p text:style-name="P53"><text:span text:style-name="T2644">Arbeitsaufträge KISY – </text:span><text:span text:style-name="T2645">Deep RL Agent mit Gymnasium</text:span><text:span text:style-name="T2646"/><text:span text:style-name="T2647"/></text:p>
        </text:list-item>
      </text:list>
      <text:p text:style-name="P57"><text:span text:style-name="T2648"/><text:span text:style-name="T2649"/><text:span text:style-name="T2650"/></text:p>
      <text:p text:style-name="P58"><text:span text:style-name="T2651">Abgabe:</text:span><text:span text:style-name="T2652"/><text:span text:style-name="T2653"/></text:p>
      <text:list text:style-name="WWNum5" text:continue-numbering="true">
        <text:list-item>
          <text:p text:style-name="P59"><text:span text:style-name="T2654">Text-Dokument mit den gelösten Theorieaufgaben</text:span><text:span text:style-name="T2655"/><text:span text:style-name="T2656"/></text:p>
        </text:list-item>
        <text:list-item>
          <text:p text:style-name="P60"><text:span text:style-name="T2657">Github-Link mit </text:span><text:span text:style-name="T2658">dokumentierter</text:span><text:span text:style-name="T2659"> Implementierung </text:span><text:span text:style-name="T2660"/></text:p>
        </text:list-item>
        <text:list-item>
          <text:p text:style-name="P61"><text:span text:style-name="T2661"/><text:span text:style-name="T2662">Video vom Trainingsprozess und vom Spielverlauf mit dem Agenten</text:span><text:span text:style-name="T2663"/><text:span/></text:p>
        </text:list-item>
      </text:list>
      <text:p text:style-name="P62"><text:span text:style-name="T2664"><text:s/></text:span><text:span/></text:p>
      <text:list>
        <text:list-item>
          <text:p text:style-name="P63"><text:span text:style-name="T2665">Aufgaben Theorie und Praxis </text:span><text:span text:style-name="T2666"/></text:p>
        </text:list-item>
      </text:list>
      <text:p text:style-name="P64"><text:span text:style-name="T2667"/><text:span text:style-name="T2668"/><text:span text:style-name="T2669"/></text:p>
      <text:p text:style-name="P65"><text:span text:style-name="T2670">Wähle eine Umgebung (Spiel):<text:line-break/></text:span><text:span text:style-name="T2671"/><text:span text:style-name="T2672"/></text:p>
      <text:p text:style-name="P66"><text:span text:style-name="T2673">Ihr könnt eine der folgenden Umgebungen nutzen:</text:span><text:span text:style-name="T2674"/><text:span text:style-name="T2675"/></text:p>
      <text:list text:style-name="WWNum46" text:continue-numbering="true">
        <text:list-item>
          <text:p text:style-name="P67"><text:span text:style-name="T2676">LunarLander-v2</text:span><text:span text:style-name="T2677"> (Mondlandung)</text:span><text:span text:style-name="T2678"/><text:span text:style-name="T2679"/></text:p>
        </text:list-item>
        <text:list-item>
          <text:p text:style-name="P68"><text:span text:style-name="T2680">Atari Breakout</text:span><text:span text:style-name="T2681"> (Ball-Block-Spiel)</text:span><text:span text:style-name="T2682"/><text:span text:style-name="T2683"/></text:p>
        </text:list-item>
        <text:list-item>
          <text:p text:style-name="P69"><text:span text:style-name="T2684">Flappy Bird</text:span><text:span text:style-name="T2685"/><text:span text:style-name="T2686"/></text:p>
        </text:list-item>
        <text:list-item>
          <text:p text:style-name="P70"><text:span text:style-name="T2687">Mario AI Gym</text:span><text:span text:style-name="T2688"/><text:span text:style-name="T2689"/></text:p>
        </text:list-item>
        <text:list-item>
          <text:p text:style-name="P71"><text:span text:style-name="T2690">oder eine eigene/selbstgebaute Umgebung (z. B. Snake)</text:span><text:span text:style-name="T2691"/><text:span text:style-name="T2692"/></text:p>
        </text:list-item>
      </text:list>
      <text:p text:style-name="P72"><text:span text:style-name="T2693"/><text:span text:style-name="T2694"/><text:span text:style-name="T2695"/></text:p>
      <text:p text:style-name="P73"><text:span text:style-name="T2696"/><text:span/><draw:frame draw:name="Object" draw:style-name="gr5" text:anchor-type="as-char" svg:width="6.547cm" svg:height="4.426cm" svg:x="0cm" svg:y="0cm"><draw:image xlink:href="Pictures/image2.png" xlink:type="simple" xlink:show="embed" xlink:actuate="onLoad"/></draw:frame><text:span/><draw:frame draw:name="Object" draw:style-name="gr6" text:anchor-type="as-char" svg:width="5.781cm" svg:height="4.426cm" svg:x="0cm" svg:y="0cm"><draw:image xlink:href="Pictures/image3.png" xlink:type="simple" xlink:show="embed" xlink:actuate="onLoad"/></draw:frame><text:span/><draw:frame draw:name="Object" draw:style-name="gr7" text:anchor-type="as-char" svg:width="5.023cm" svg:height="4.426cm" svg:x="0cm" svg:y="0cm"><draw:image xlink:href="Pictures/image4.png" xlink:type="simple" xlink:show="embed" xlink:actuate="onLoad"/></draw:frame><text:span text:style-name="T2697"/><text:span text:style-name="T2698"/></text:p>
      <text:p text:style-name="P74"><text:span text:style-name="T2699"/><text:span text:style-name="T2700"/><text:span text:style-name="T2701"/></text:p>
      <text:p text:style-name="P75"><text:span text:style-name="T2702">Hinweise:</text:span><text:span text:style-name="T2703"/><text:span text:style-name="T2704"/></text:p>
      <text:p text:style-name="P76"><text:span text:style-name="T2705"/><text:span text:style-name="T2706"/></text:p>
      <text:list text:style-name="WWNum56" text:continue-numbering="true">
        <text:list-item>
          <text:p text:style-name="P77"><text:span text:style-name="T2707"/><text:span text:style-name="T2708">Für Breakout oder Mario benötigt ihr ggf. Zusatzpakete (</text:span><text:span text:style-name="T2709">gymnasium[atari]</text:span><text:span text:style-name="T2710">, </text:span><text:span text:style-name="T2711">super-mario-bros</text:span><text:span text:style-name="T2712">, </text:span><text:span text:style-name="T2713">nes-py</text:span><text:span text:style-name="T2714">)</text:span><text:span text:style-name="T2715"/><text:span text:style-name="T2716"/></text:p>
        </text:list-item>
      </text:list>
      <text:list text:style-name="WWNum57" text:continue-numbering="true">
        <text:list-item>
          <text:p text:style-name="P78"><text:span text:style-name="T2717">Verwendet </text:span><text:span text:style-name="T2718">gymnasium</text:span><text:span text:style-name="T2719">, Installation mit </text:span><text:span text:style-name="T2720">pip install gymnasium</text:span><text:span text:style-name="T2721"/><text:span text:style-name="T2722"/></text:p>
        </text:list-item>
      </text:list>
      <text:p text:style-name="P79"><text:span text:style-name="T2723">Spielumgebung starten und testen:</text:span><text:span text:style-name="T2724"/><text:span text:style-name="T2725"/></text:p>
      <text:p text:style-name="P80"><text:span text:style-name="T2726"/><text:span text:style-name="T2727"/></text:p>
      <text:list text:style-name="WWNum48" text:continue-numbering="true">
        <text:list-item>
          <text:p text:style-name="P81"><text:span text:style-name="T2728">Bringt die Spielumgebung zum Laufen, inklusive grafischer Darstellung (GUI).</text:span><text:span text:style-name="T2729"/><text:span text:style-name="T2730"/></text:p>
        </text:list-item>
        <text:list-item>
          <text:p text:style-name="P82"><text:span text:style-name="T2731">Die Umgebung soll anfangs manuell oder zufällig spielbar sein.</text:span><text:span text:style-name="T2732"/><text:span text:style-name="T2733"/></text:p>
        </text:list-item>
        <text:list-item>
          <text:p text:style-name="P83"><text:span text:style-name="T2734">Verwendet beispielsweise </text:span><text:span text:style-name="T2735">env.render()</text:span><text:span text:style-name="T2736"> zur Anzeige des Spiels.</text:span><text:span text:style-name="T2737"/><text:span text:style-name="T2738"/><text:span text:style-name="T2739"><text:soft-page-break/></text:span><text:span text:style-name="T2740"/><text:span text:style-name="T2741"/></text:p>
        </text:list-item>
      </text:list>
      <text:p text:style-name="P84"><text:span text:style-name="T2742">Deep Q-Learning definieren</text:span><text:span text:style-name="T2743"/></text:p>
      <text:p text:style-name="P85"><text:span text:style-name="T2744"/><text:span text:style-name="T2745"/></text:p>
      <text:list text:style-name="WWNum50" text:continue-numbering="true">
        <text:list-item>
          <text:p text:style-name="P86"><text:span text:style-name="T2746">Erläutere für dein gewähltes Spiel, welche Features du theoretisch wählen könntest. Erkläre dann (inkl. Skizze/Screenshot vom Spiel), für welche Features du dich entschieden hast und warum du genau diese Auswahl an Features gewählt hast. </text:span><text:span text:style-name="T2747"/><text:span text:style-name="T2748"/></text:p>
        </text:list-item>
      </text:list>
      <text:p text:style-name="P87"><text:span text:style-name="T2749"/><text:span text:style-name="T2750"/></text:p>
      <text:list text:style-name="WWNum50" text:continue-numbering="true">
        <text:list-item>
          <text:p text:style-name="P88"><text:span text:style-name="T2751">Erläutere für dein Spiel an einem konkreten, numerischen Beispiel, welche Aktion das (ausreichend trainierte) neuronale Netz für einen von dir bestimmten Zustand wählen würde (inkl. Skizze/Screenshot)</text:span><text:span text:style-name="T2752">. </text:span><text:span text:style-name="T2753"/><text:span text:style-name="T2754"/></text:p>
        </text:list-item>
      </text:list>
      <text:p text:style-name="P89"><text:span text:style-name="T2755"/><text:span text:style-name="T2756"/></text:p>
      <text:p text:style-name="P90"><text:span text:style-name="T2757"/><text:span text:style-name="T2758"/></text:p>
      <text:p text:style-name="P91"><text:span text:style-name="T2759">Deep Q-Learning</text:span><text:span text:style-name="T2760"> implementieren</text:span><text:span text:style-name="T2761"/><text:span text:style-name="T2762"/><text:span text:style-name="T2763"/><text:span text:style-name="T2764"/><text:span text:style-name="T2765"/></text:p>
      <text:p text:style-name="P92"><text:span text:style-name="T2766"/><text:span text:style-name="T2767"/></text:p>
      <text:list text:style-name="WWNum50" text:continue-numbering="true">
        <text:list-item>
          <text:p text:style-name="P93"><text:span text:style-name="T2768">Entwickelt einen Agenten, der mit einem neuronalen Netz (Q-Network) lernt.</text:span><text:span text:style-name="T2769"/><text:span text:style-name="T2770"/></text:p>
        </text:list-item>
        <text:list-item>
          <text:p text:style-name="P94"><text:span text:style-name="T2771">Nutzt dazu entweder eigene Implementationen oder Bibliotheken wie </text:span><text:span text:style-name="T2772">Stable-Baselines3</text:span><text:span text:style-name="T2773">, </text:span><text:span text:style-name="T2774">PyTorch</text:span><text:span text:style-name="T2775">, </text:span><text:span text:style-name="T2776">TensorFlow</text:span><text:span text:style-name="T2777"> oder </text:span><text:span text:style-name="T2778">Keras</text:span><text:span text:style-name="T2779">.</text:span><text:span text:style-name="T2780"/><text:span text:style-name="T2781"/></text:p>
        </text:list-item>
        <text:list-item>
          <text:p text:style-name="P95"><text:span text:style-name="T2782">Der Agent soll durch Ausprobieren (Trial-and-Error) lernen, das Spiel zu meistern.</text:span><text:span text:style-name="T2783"/><text:span text:style-name="T2784"/></text:p>
        </text:list-item>
        <text:list-item>
          <text:p text:style-name="P96"><text:span text:style-name="T2785">Verwendet dabei zentrale Konzepte wie Replay Buffer, Epsilon-Greedy-Strategie und die Q-Learning-Formel.</text:span><text:span text:style-name="T2786"/><text:span text:style-name="T2787"/></text:p>
        </text:list-item>
      </text:list>
      <text:p text:style-name="P97"><text:span text:style-name="T2788"/><text:span text:style-name="T2789"/><text:span text:style-name="T2790"/></text:p>
      <text:p text:style-name="P98"><text:span text:style-name="T2791">Training dokumentieren</text:span><text:span text:style-name="T2792"/><text:span text:style-name="T2793"/></text:p>
      <text:p text:style-name="P99"><text:span text:style-name="T2794"/><text:span text:style-name="T2795"/></text:p>
      <text:list text:style-name="WWNum63" text:continue-numbering="true">
        <text:list-item>
          <text:p text:style-name="P100"><text:span text:style-name="T2796">Zeichnet den Lernfortschritt auf (z. B. Gesamtreward pro Episode).</text:span><text:span text:style-name="T2797"/><text:span text:style-name="T2798"/></text:p>
        </text:list-item>
        <text:list-item>
          <text:p text:style-name="P101"><text:span text:style-name="T2799">Erstelle ein Video vom Training sowie vom trainierten Agenten.</text:span><text:span text:style-name="T2800"/><text:span text:style-name="T2801"/></text:p>
        </text:list-item>
      </text:list>
      <text:p text:style-name="P102"><text:span text:style-name="T2802"><text:s/></text:span><text:span text:style-name="T2803"/><text:span text:style-name="T2804"/><text:span text:style-name="T2805"/><text:span text:style-name="T2806"/><text:span/><text:span text:style-name="T2807"/></text:p>
      <text:p text:style-name="P103"><text:span text:style-name="T2808"/><text:span text:style-name="T2809"/><text:span text:style-name="T28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24">
      <style:paragraph-properties/>
      <style:text-properties fo:font-size="10pt"/>
    </style:style>
    <style:style style:display-name="DStyle_text" style:family="text" style:name="825">
      <style:paragraph-properties/>
    </style:style>
    <style:style style:parent-style-name="824" style:display-name="DStyle_paragraph" style:family="paragraph" style:name="826">
      <style:paragraph-properties/>
      <style:text-properties fo:font-size="10pt"/>
    </style:style>
    <style:style style:parent-style-name="824" style:display-name="DStyle_text" style:family="text" style:name="827">
      <style:paragraph-properties/>
    </style:style>
    <style:style style:parent-style-name="826" style:display-name="DStyle_paragraph" style:family="paragraph" style:name="828">
      <style:paragraph-properties/>
      <style:text-properties fo:font-size="10pt"/>
    </style:style>
    <style:style style:parent-style-name="824" style:display-name="DStyle_text" style:family="text" style:name="829">
      <style:paragraph-properties/>
    </style:style>
    <style:style style:parent-style-name="828" style:display-name="DStyle_paragraph" style:family="paragraph" style:name="830">
      <style:paragraph-properties/>
      <style:text-properties fo:font-size="10pt"/>
    </style:style>
    <style:style style:parent-style-name="824" style:display-name="DStyle_text" style:family="text" style:name="831">
      <style:paragraph-properties/>
    </style:style>
    <style:style style:class="default" style:display-name="Normal" style:family="paragraph" style:name="832">
      <style:paragraph-properties/>
      <style:text-properties/>
    </style:style>
    <style:style style:parent-style-name="832" style:display-name="Heading 5" style:family="paragraph" style:name="833">
      <style:paragraph-properties fo:margin-top="4pt" fo:margin-bottom="2pt"/>
      <style:text-properties fo:color="#0f4761" fo:font-family="Arial" style:font-family-complex="Arial"/>
    </style:style>
    <style:style style:parent-style-name="832" style:display-name="Heading 6" style:family="paragraph" style:name="834">
      <style:paragraph-properties fo:margin-top="2pt" fo:margin-bottom="0pt"/>
      <style:text-properties fo:color="#595959" fo:font-family="Arial" style:font-family-complex="Arial" fo:font-style="italic"/>
    </style:style>
    <style:style style:parent-style-name="832" style:display-name="Heading 7" style:family="paragraph" style:name="835">
      <style:paragraph-properties fo:margin-top="2pt" fo:margin-bottom="0pt"/>
      <style:text-properties fo:color="#595959" fo:font-family="Arial" style:font-family-complex="Arial"/>
    </style:style>
    <style:style style:parent-style-name="832" style:display-name="Heading 8" style:family="paragraph" style:name="836">
      <style:paragraph-properties fo:margin-bottom="0pt"/>
      <style:text-properties fo:color="#272727" fo:font-family="Arial" style:font-family-complex="Arial" fo:font-style="italic"/>
    </style:style>
    <style:style style:parent-style-name="832" style:display-name="Heading 9" style:family="paragraph" style:name="837">
      <style:paragraph-properties fo:margin-bottom="0pt"/>
      <style:text-properties fo:color="#272727" fo:font-family="Arial" style:font-family-complex="Arial" fo:font-style="italic"/>
    </style:style>
    <style:style style:parent-style-name="908" style:display-name="Heading 1 Char" style:family="text" style:name="838">
      <style:paragraph-properties/>
      <style:text-properties fo:color="#0f4761" fo:font-family="Arial" style:font-family-complex="Arial" fo:font-size="20pt"/>
    </style:style>
    <style:style style:parent-style-name="908" style:display-name="Heading 2 Char" style:family="text" style:name="839">
      <style:paragraph-properties/>
      <style:text-properties fo:color="#0f4761" fo:font-family="Arial" style:font-family-complex="Arial" fo:font-size="16pt"/>
    </style:style>
    <style:style style:parent-style-name="908" style:display-name="Heading 3 Char" style:family="text" style:name="840">
      <style:paragraph-properties/>
      <style:text-properties fo:color="#0f4761" fo:font-family="Arial" style:font-family-complex="Arial" fo:font-size="14pt"/>
    </style:style>
    <style:style style:parent-style-name="908" style:display-name="Heading 4 Char" style:family="text" style:name="841">
      <style:paragraph-properties/>
      <style:text-properties fo:color="#0f4761" fo:font-family="Arial" style:font-family-complex="Arial" fo:font-style="italic"/>
    </style:style>
    <style:style style:parent-style-name="908" style:display-name="Heading 5 Char" style:family="text" style:name="842">
      <style:paragraph-properties/>
      <style:text-properties fo:color="#0f4761" fo:font-family="Arial" style:font-family-complex="Arial"/>
    </style:style>
    <style:style style:parent-style-name="908" style:display-name="Heading 6 Char" style:family="text" style:name="843">
      <style:paragraph-properties/>
      <style:text-properties fo:color="#595959" fo:font-family="Arial" style:font-family-complex="Arial" fo:font-style="italic"/>
    </style:style>
    <style:style style:parent-style-name="908" style:display-name="Heading 7 Char" style:family="text" style:name="844">
      <style:paragraph-properties/>
      <style:text-properties fo:color="#595959" fo:font-family="Arial" style:font-family-complex="Arial"/>
    </style:style>
    <style:style style:parent-style-name="908" style:display-name="Heading 8 Char" style:family="text" style:name="845">
      <style:paragraph-properties/>
      <style:text-properties fo:color="#272727" fo:font-family="Arial" style:font-family-complex="Arial" fo:font-style="italic"/>
    </style:style>
    <style:style style:parent-style-name="908" style:display-name="Heading 9 Char" style:family="text" style:name="846">
      <style:paragraph-properties/>
      <style:text-properties fo:color="#272727" fo:font-family="Arial" style:font-family-complex="Arial" fo:font-style="italic"/>
    </style:style>
    <style:style style:parent-style-name="832" style:display-name="Title" style:family="paragraph" style:name="847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908" style:display-name="Title Char" style:family="text" style:name="848">
      <style:paragraph-properties/>
      <style:text-properties fo:font-family="Arial" style:font-family-complex="Arial" fo:font-size="28pt" fo:letter-spacing="-0.5pt"/>
    </style:style>
    <style:style style:parent-style-name="832" style:display-name="Subtitle" style:family="paragraph" style:name="849">
      <style:paragraph-properties/>
      <style:text-properties fo:color="#595959" fo:font-size="14pt" fo:letter-spacing="0.75pt"/>
    </style:style>
    <style:style style:parent-style-name="908" style:display-name="Subtitle Char" style:family="text" style:name="850">
      <style:paragraph-properties/>
      <style:text-properties fo:color="#595959" fo:font-size="14pt" fo:letter-spacing="0.75pt"/>
    </style:style>
    <style:style style:parent-style-name="832" style:display-name="Quote" style:family="paragraph" style:name="851">
      <style:paragraph-properties fo:text-align="center" fo:margin-top="8pt"/>
      <style:text-properties fo:color="#404040" fo:font-style="italic"/>
    </style:style>
    <style:style style:parent-style-name="908" style:display-name="Quote Char" style:family="text" style:name="852">
      <style:paragraph-properties/>
      <style:text-properties fo:color="#404040" fo:font-style="italic"/>
    </style:style>
    <style:style style:parent-style-name="832" style:display-name="Intense Quote" style:family="paragraph" style:name="853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908" style:display-name="Intense Quote Char" style:family="text" style:name="854">
      <style:paragraph-properties/>
      <style:text-properties fo:color="#0f4761" fo:font-style="italic"/>
    </style:style>
    <style:style style:parent-style-name="908" style:display-name="Intense Reference" style:family="text" style:name="855">
      <style:paragraph-properties/>
      <style:text-properties fo:font-variant="small-caps" fo:color="#0f4761" fo:letter-spacing="0.25pt" fo:font-weight="bold"/>
    </style:style>
    <style:style style:parent-style-name="908" style:display-name="Subtle Emphasis" style:family="text" style:name="856">
      <style:paragraph-properties/>
      <style:text-properties fo:color="#404040" fo:font-style="italic"/>
    </style:style>
    <style:style style:parent-style-name="908" style:display-name="Emphasis" style:family="text" style:name="857">
      <style:paragraph-properties/>
      <style:text-properties fo:font-style="italic"/>
    </style:style>
    <style:style style:parent-style-name="908" style:display-name="Strong" style:family="text" style:name="858">
      <style:paragraph-properties/>
      <style:text-properties fo:font-weight="bold"/>
    </style:style>
    <style:style style:parent-style-name="908" style:display-name="Subtle Reference" style:family="text" style:name="859">
      <style:paragraph-properties/>
      <style:text-properties fo:font-variant="small-caps" fo:color="#5a5a5a"/>
    </style:style>
    <style:style style:parent-style-name="908" style:display-name="Book Title" style:family="text" style:name="860">
      <style:paragraph-properties/>
      <style:text-properties fo:letter-spacing="0.25pt" fo:font-style="italic" fo:font-weight="bold"/>
    </style:style>
    <style:style style:parent-style-name="908" style:display-name="Header Char" style:family="text" style:name="861">
      <style:paragraph-properties/>
    </style:style>
    <style:style style:parent-style-name="908" style:display-name="Footer Char" style:family="text" style:name="862">
      <style:paragraph-properties/>
    </style:style>
    <style:style style:parent-style-name="832" style:display-name="footnote text" style:family="paragraph" style:name="863">
      <style:paragraph-properties fo:line-height="100%" fo:margin-bottom="0pt"/>
      <style:text-properties fo:font-size="10pt"/>
    </style:style>
    <style:style style:parent-style-name="908" style:display-name="Footnote Text Char" style:family="text" style:name="864">
      <style:paragraph-properties/>
      <style:text-properties fo:font-size="10pt"/>
    </style:style>
    <style:style style:parent-style-name="908" style:display-name="footnote reference" style:family="text" style:name="865">
      <style:paragraph-properties/>
      <style:text-properties style:text-position="super 58%"/>
    </style:style>
    <style:style style:parent-style-name="832" style:display-name="endnote text" style:family="paragraph" style:name="866">
      <style:paragraph-properties fo:line-height="100%" fo:margin-bottom="0pt"/>
      <style:text-properties fo:font-size="10pt"/>
    </style:style>
    <style:style style:parent-style-name="908" style:display-name="Endnote Text Char" style:family="text" style:name="867">
      <style:paragraph-properties/>
      <style:text-properties fo:font-size="10pt"/>
    </style:style>
    <style:style style:parent-style-name="908" style:display-name="endnote reference" style:family="text" style:name="868">
      <style:paragraph-properties/>
      <style:text-properties style:text-position="super 58%"/>
    </style:style>
    <style:style style:parent-style-name="908" style:display-name="Hyperlink" style:family="text" style:name="86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32" style:display-name="Internet link" style:family="text" style:name="87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32" style:display-name="Internet link" style:family="text" style:name="87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32" style:display-name="Internet link" style:family="text" style:name="87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32" style:display-name="Internet link" style:family="text" style:name="87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08" style:display-name="FollowedHyperlink" style:family="text" style:name="874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32" style:display-name="toc 1" style:family="paragraph" style:name="875">
      <style:paragraph-properties fo:margin-bottom="5pt"/>
    </style:style>
    <style:style style:parent-style-name="832" style:display-name="toc 2" style:family="paragraph" style:name="876">
      <style:paragraph-properties fo:margin-left="0.3881cm" fo:margin-right="0cm" fo:text-indent="0cm" fo:margin-bottom="5pt"/>
    </style:style>
    <style:style style:parent-style-name="832" style:display-name="toc 3" style:family="paragraph" style:name="877">
      <style:paragraph-properties fo:margin-left="0.7762cm" fo:margin-right="0cm" fo:text-indent="0cm" fo:margin-bottom="5pt"/>
    </style:style>
    <style:style style:parent-style-name="832" style:display-name="toc 4" style:family="paragraph" style:name="878">
      <style:paragraph-properties fo:margin-left="1.164cm" fo:margin-right="0cm" fo:text-indent="0cm" fo:margin-bottom="5pt"/>
    </style:style>
    <style:style style:parent-style-name="832" style:display-name="toc 5" style:family="paragraph" style:name="879">
      <style:paragraph-properties fo:margin-left="1.552cm" fo:margin-right="0cm" fo:text-indent="0cm" fo:margin-bottom="5pt"/>
    </style:style>
    <style:style style:parent-style-name="832" style:display-name="toc 6" style:family="paragraph" style:name="880">
      <style:paragraph-properties fo:margin-left="1.94cm" fo:margin-right="0cm" fo:text-indent="0cm" fo:margin-bottom="5pt"/>
    </style:style>
    <style:style style:parent-style-name="832" style:display-name="toc 7" style:family="paragraph" style:name="881">
      <style:paragraph-properties fo:margin-left="2.328cm" fo:margin-right="0cm" fo:text-indent="0cm" fo:margin-bottom="5pt"/>
    </style:style>
    <style:style style:parent-style-name="832" style:display-name="toc 8" style:family="paragraph" style:name="882">
      <style:paragraph-properties fo:margin-left="2.717cm" fo:margin-right="0cm" fo:text-indent="0cm" fo:margin-bottom="5pt"/>
    </style:style>
    <style:style style:parent-style-name="832" style:display-name="toc 9" style:family="paragraph" style:name="883">
      <style:paragraph-properties fo:margin-left="3.105cm" fo:margin-right="0cm" fo:text-indent="0cm" fo:margin-bottom="5pt"/>
    </style:style>
    <style:style style:parent-style-name="832" style:display-name="TOC Heading" style:family="paragraph" style:name="884">
      <style:paragraph-properties/>
    </style:style>
    <style:style style:parent-style-name="832" style:display-name="table of figures" style:family="paragraph" style:name="885">
      <style:paragraph-properties fo:margin-bottom="0pt"/>
    </style:style>
    <style:style style:parent-style-name="832" style:display-name="DStyle_paragraph" style:family="paragraph" style:name="886">
      <style:paragraph-properties/>
      <style:text-properties fo:color="#000000" fo:font-family="Calibri" style:font-family-complex="Calibri" fo:font-size="11pt" fo:language="de" fo:country="AT"/>
    </style:style>
    <style:style style:parent-style-name="886" style:display-name="Standard" style:family="paragraph" style:name="887">
      <style:paragraph-properties fo:text-align="left" fo:margin-top="0pt" fo:margin-bottom="8pt"/>
      <style:text-properties fo:color="#000000" fo:font-family="Calibri" style:font-family-complex="Calibri" fo:font-size="11pt" fo:language="de" fo:country="AT"/>
    </style:style>
    <style:style style:parent-style-name="887" style:display-name="Heading" style:family="paragraph" style:name="888">
      <style:paragraph-properties fo:margin-top="12pt" fo:margin-bottom="6pt"/>
      <style:text-properties fo:font-family="Liberation Sans" style:font-family-complex="Liberation Sans" fo:font-size="14pt"/>
    </style:style>
    <style:style style:parent-style-name="887" style:display-name="Text body" style:family="paragraph" style:name="889">
      <style:paragraph-properties fo:line-height="115%" fo:margin-top="0pt" fo:margin-bottom="7pt"/>
    </style:style>
    <style:style style:parent-style-name="889" style:display-name="List" style:family="paragraph" style:name="890">
      <style:paragraph-properties/>
    </style:style>
    <style:style style:parent-style-name="887" style:display-name="Caption" style:family="paragraph" style:name="891">
      <style:paragraph-properties fo:margin-top="6pt" fo:margin-bottom="6pt"/>
      <style:text-properties fo:font-size="12pt" fo:font-style="italic"/>
    </style:style>
    <style:style style:parent-style-name="887" style:display-name="Index" style:family="paragraph" style:name="892">
      <style:paragraph-properties/>
    </style:style>
    <style:style style:parent-style-name="887" style:display-name="Heading 1" style:family="paragraph" style:name="893">
      <style:paragraph-properties fo:margin-top="12pt" fo:margin-bottom="0pt"/>
      <style:text-properties fo:color="#2f5496" fo:font-family="Calibri Light" style:font-family-complex="Calibri Light" fo:font-size="16pt"/>
    </style:style>
    <style:style style:parent-style-name="887" style:display-name="Heading 2" style:family="paragraph" style:name="894">
      <style:paragraph-properties fo:margin-top="2pt" fo:margin-bottom="0pt"/>
      <style:text-properties fo:color="#2f5496" fo:font-family="Calibri Light" style:font-family-complex="Calibri Light" fo:font-size="13pt"/>
    </style:style>
    <style:style style:parent-style-name="887" style:display-name="Heading 3" style:family="paragraph" style:name="895">
      <style:paragraph-properties fo:margin-top="2pt" fo:margin-bottom="0pt"/>
      <style:text-properties fo:color="#1f3763" fo:font-family="Calibri Light" style:font-family-complex="Calibri Light" fo:font-size="12pt"/>
    </style:style>
    <style:style style:parent-style-name="888" style:display-name="Heading 4" style:family="paragraph" style:name="896">
      <style:paragraph-properties fo:margin-top="6pt" fo:margin-bottom="6pt"/>
      <style:text-properties fo:font-family="Liberation Serif" style:font-family-complex="Liberation Serif" fo:font-size="12pt" fo:font-weight="bold"/>
    </style:style>
    <style:style style:parent-style-name="887" style:display-name="Header and Footer" style:family="paragraph" style:name="897">
      <style:paragraph-properties/>
    </style:style>
    <style:style style:parent-style-name="887" style:display-name="Header" style:family="paragraph" style:name="898">
      <style:paragraph-properties fo:margin-top="0pt" fo:margin-bottom="0pt">
        <style:tab-stops>
          <style:tab-stop style:position="8cm" style:type="center"/>
          <style:tab-stop style:position="16cm" style:type="right"/>
        </style:tab-stops>
      </style:paragraph-properties>
    </style:style>
    <style:style style:parent-style-name="887" style:display-name="Footer" style:family="paragraph" style:name="899">
      <style:paragraph-properties fo:margin-top="0pt" fo:margin-bottom="0pt">
        <style:tab-stops>
          <style:tab-stop style:position="8cm" style:type="center"/>
          <style:tab-stop style:position="16cm" style:type="right"/>
        </style:tab-stops>
      </style:paragraph-properties>
    </style:style>
    <style:style style:parent-style-name="887" style:display-name="List Paragraph" style:family="paragraph" style:name="900">
      <style:paragraph-properties fo:margin-left="1.27cm" fo:margin-right="0cm" fo:text-indent="0cm"/>
      <style:text-properties/>
    </style:style>
    <style:style style:parent-style-name="887" style:display-name="Footnote" style:family="paragraph" style:name="901">
      <style:paragraph-properties fo:margin-top="0pt" fo:margin-bottom="0pt"/>
      <style:text-properties fo:font-size="10pt"/>
    </style:style>
    <style:style style:parent-style-name="887" style:display-name="Balloon Text" style:family="paragraph" style:name="902">
      <style:paragraph-properties fo:margin-top="0pt" fo:margin-bottom="0pt"/>
      <style:text-properties fo:font-family="Segoe UI" style:font-family-complex="Segoe UI" fo:font-size="9pt"/>
    </style:style>
    <style:style style:parent-style-name="887" style:display-name="Normal (Web)" style:family="paragraph" style:name="903">
      <style:paragraph-properties fo:margin-top="5pt" fo:margin-bottom="5pt"/>
      <style:text-properties fo:font-family="Times New Roman" style:font-family-complex="Times New Roman" fo:font-size="12pt"/>
    </style:style>
    <style:style style:parent-style-name="886" style:display-name="No Spacing" style:family="paragraph" style:name="904">
      <style:paragraph-properties fo:text-align="left" fo:margin-top="0pt" fo:margin-bottom="0pt"/>
      <style:text-properties fo:color="#000000" fo:font-family="Calibri" style:font-family-complex="Calibri" fo:font-size="11pt" fo:language="de" fo:country="AT"/>
    </style:style>
    <style:style style:parent-style-name="887" style:display-name="Frame contents" style:family="paragraph" style:name="905">
      <style:paragraph-properties/>
    </style:style>
    <style:style style:parent-style-name="887" style:display-name="Preformatted Text" style:family="paragraph" style:name="906">
      <style:paragraph-properties fo:margin-top="0pt" fo:margin-bottom="0pt"/>
      <style:text-properties fo:font-family="Liberation Mono" style:font-family-complex="Liberation Mono" fo:font-size="10pt"/>
    </style:style>
    <style:style style:parent-style-name="891" style:display-name="Figure" style:family="paragraph" style:name="907">
      <style:paragraph-properties/>
    </style:style>
    <style:style style:class="default" style:display-name="Default Paragraph Font" style:family="text" style:name="908">
      <style:paragraph-properties/>
    </style:style>
    <style:style style:parent-style-name="908" style:display-name="Kopfzeile Zchn" style:family="text" style:name="909">
      <style:paragraph-properties/>
    </style:style>
    <style:style style:parent-style-name="908" style:display-name="Fußzeile Zchn" style:family="text" style:name="910">
      <style:paragraph-properties/>
    </style:style>
    <style:style style:parent-style-name="908" style:display-name="Intense Emphasis" style:family="text" style:name="911">
      <style:paragraph-properties/>
      <style:text-properties fo:color="#4472c4" fo:font-style="italic"/>
    </style:style>
    <style:style style:parent-style-name="908" style:display-name="Überschrift 2 Zchn" style:family="text" style:name="912">
      <style:paragraph-properties/>
      <style:text-properties fo:color="#2f5496" fo:font-family="Calibri Light" style:font-family-complex="Calibri Light" fo:font-size="13pt"/>
    </style:style>
    <style:style style:parent-style-name="908" style:display-name="Überschrift 1 Zchn" style:family="text" style:name="913">
      <style:paragraph-properties/>
      <style:text-properties fo:color="#2f5496" fo:font-family="Calibri Light" style:font-family-complex="Calibri Light" fo:font-size="16pt"/>
    </style:style>
    <style:style style:parent-style-name="908" style:display-name="Fußnotentext Zchn" style:family="text" style:name="914">
      <style:paragraph-properties/>
      <style:text-properties fo:font-size="10pt"/>
    </style:style>
    <style:style style:parent-style-name="908" style:display-name="Footnote Symbol" style:family="text" style:name="915">
      <style:paragraph-properties/>
      <style:text-properties style:text-position="super 58%"/>
    </style:style>
    <style:style style:parent-style-name="832" style:display-name="Footnote anchor" style:family="text" style:name="916">
      <style:paragraph-properties/>
      <style:text-properties style:text-position="super 58%"/>
    </style:style>
    <style:style style:parent-style-name="908" style:display-name="Sprechblasentext Zchn" style:family="text" style:name="917">
      <style:paragraph-properties/>
      <style:text-properties fo:font-family="Segoe UI" style:font-family-complex="Segoe UI" fo:font-size="9pt"/>
    </style:style>
    <style:style style:parent-style-name="908" style:display-name="Internet link" style:family="text" style:name="9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08" style:display-name="Unresolved Mention" style:family="text" style:name="919">
      <style:paragraph-properties/>
      <style:text-properties fo:color="#605e5c" fo:background-color="#e1dfdd"/>
    </style:style>
    <style:style style:parent-style-name="908" style:display-name="mw-mmv-title" style:family="text" style:name="920">
      <style:paragraph-properties/>
    </style:style>
    <style:style style:parent-style-name="908" style:display-name="Überschrift 3 Zchn" style:family="text" style:name="921">
      <style:paragraph-properties/>
      <style:text-properties fo:color="#1f3763" fo:font-family="Calibri Light" style:font-family-complex="Calibri Light" fo:font-size="12pt"/>
    </style:style>
    <style:style style:parent-style-name="908" style:display-name="Visited Internet Link" style:family="text" style:name="92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32" style:display-name="Strong Emphasis (WW)" style:family="text" style:name="923">
      <style:paragraph-properties/>
      <style:text-properties fo:font-weight="bold"/>
    </style:style>
    <style:style style:parent-style-name="832" style:display-name="Source Text" style:family="text" style:name="924">
      <style:paragraph-properties/>
      <style:text-properties fo:font-family="Liberation Mono" style:font-family-complex="Liberation Mono"/>
    </style:style>
    <style:style style:parent-style-name="832" style:display-name="Numbering Symbols" style:family="text" style:name="925">
      <style:paragraph-properties/>
    </style:style>
    <style:style style:parent-style-name="832" style:display-name="Bullet Symbols" style:family="text" style:name="926">
      <style:paragraph-properties/>
      <style:text-properties fo:font-family="OpenSymbol" style:font-family-complex="OpenSymbol"/>
    </style:style>
    <style:style style:parent-style-name="832" style:display-name="ListLabel 1" style:family="text" style:name="927">
      <style:paragraph-properties/>
    </style:style>
    <style:style style:parent-style-name="832" style:display-name="ListLabel 2" style:family="text" style:name="928">
      <style:paragraph-properties/>
    </style:style>
    <style:style style:parent-style-name="832" style:display-name="ListLabel 3" style:family="text" style:name="929">
      <style:paragraph-properties/>
    </style:style>
    <style:style style:parent-style-name="832" style:display-name="ListLabel 4" style:family="text" style:name="930">
      <style:paragraph-properties/>
    </style:style>
    <style:style style:parent-style-name="832" style:display-name="ListLabel 5" style:family="text" style:name="931">
      <style:paragraph-properties/>
    </style:style>
    <style:style style:parent-style-name="832" style:display-name="ListLabel 6" style:family="text" style:name="932">
      <style:paragraph-properties/>
    </style:style>
    <style:style style:parent-style-name="832" style:display-name="ListLabel 7" style:family="text" style:name="933">
      <style:paragraph-properties/>
    </style:style>
    <style:style style:parent-style-name="832" style:display-name="ListLabel 8" style:family="text" style:name="934">
      <style:paragraph-properties/>
    </style:style>
    <style:style style:parent-style-name="832" style:display-name="ListLabel 9" style:family="text" style:name="935">
      <style:paragraph-properties/>
    </style:style>
    <style:style style:parent-style-name="832" style:display-name="ListLabel 10" style:family="text" style:name="936">
      <style:paragraph-properties/>
    </style:style>
    <style:style style:parent-style-name="832" style:display-name="ListLabel 11" style:family="text" style:name="937">
      <style:paragraph-properties/>
    </style:style>
    <style:style style:parent-style-name="832" style:display-name="ListLabel 12" style:family="text" style:name="938">
      <style:paragraph-properties/>
    </style:style>
    <style:style style:parent-style-name="832" style:display-name="ListLabel 13" style:family="text" style:name="939">
      <style:paragraph-properties/>
    </style:style>
    <style:style style:parent-style-name="832" style:display-name="ListLabel 14" style:family="text" style:name="940">
      <style:paragraph-properties/>
    </style:style>
    <style:style style:parent-style-name="832" style:display-name="ListLabel 15" style:family="text" style:name="941">
      <style:paragraph-properties/>
    </style:style>
    <style:style style:parent-style-name="832" style:display-name="ListLabel 16" style:family="text" style:name="942">
      <style:paragraph-properties/>
    </style:style>
    <style:style style:parent-style-name="832" style:display-name="ListLabel 17" style:family="text" style:name="943">
      <style:paragraph-properties/>
    </style:style>
    <style:style style:parent-style-name="832" style:display-name="ListLabel 18" style:family="text" style:name="944">
      <style:paragraph-properties/>
    </style:style>
    <style:style style:parent-style-name="832" style:display-name="ListLabel 19" style:family="text" style:name="945">
      <style:paragraph-properties/>
    </style:style>
    <style:style style:parent-style-name="832" style:display-name="ListLabel 20" style:family="text" style:name="946">
      <style:paragraph-properties/>
    </style:style>
    <style:style style:parent-style-name="832" style:display-name="ListLabel 21" style:family="text" style:name="947">
      <style:paragraph-properties/>
    </style:style>
    <style:style style:parent-style-name="832" style:display-name="ListLabel 22" style:family="text" style:name="948">
      <style:paragraph-properties/>
    </style:style>
    <style:style style:parent-style-name="832" style:display-name="ListLabel 23" style:family="text" style:name="949">
      <style:paragraph-properties/>
    </style:style>
    <style:style style:parent-style-name="832" style:display-name="ListLabel 24" style:family="text" style:name="950">
      <style:paragraph-properties/>
    </style:style>
    <style:style style:parent-style-name="832" style:display-name="ListLabel 25" style:family="text" style:name="951">
      <style:paragraph-properties/>
    </style:style>
    <style:style style:parent-style-name="832" style:display-name="ListLabel 26" style:family="text" style:name="952">
      <style:paragraph-properties/>
    </style:style>
    <style:style style:parent-style-name="832" style:display-name="ListLabel 27" style:family="text" style:name="953">
      <style:paragraph-properties/>
    </style:style>
    <style:style style:parent-style-name="832" style:display-name="ListLabel 28" style:family="text" style:name="954">
      <style:paragraph-properties/>
    </style:style>
    <style:style style:parent-style-name="832" style:display-name="ListLabel 29" style:family="text" style:name="955">
      <style:paragraph-properties/>
    </style:style>
    <style:style style:parent-style-name="832" style:display-name="ListLabel 30" style:family="text" style:name="956">
      <style:paragraph-properties/>
    </style:style>
    <style:style style:parent-style-name="832" style:display-name="ListLabel 31" style:family="text" style:name="957">
      <style:paragraph-properties/>
    </style:style>
    <style:style style:parent-style-name="832" style:display-name="ListLabel 32" style:family="text" style:name="958">
      <style:paragraph-properties/>
    </style:style>
    <style:style style:parent-style-name="832" style:display-name="ListLabel 33" style:family="text" style:name="959">
      <style:paragraph-properties/>
    </style:style>
    <style:style style:parent-style-name="832" style:display-name="ListLabel 34" style:family="text" style:name="960">
      <style:paragraph-properties/>
    </style:style>
    <style:style style:parent-style-name="832" style:display-name="ListLabel 35" style:family="text" style:name="961">
      <style:paragraph-properties/>
    </style:style>
    <style:style style:parent-style-name="832" style:display-name="ListLabel 36" style:family="text" style:name="962">
      <style:paragraph-properties/>
    </style:style>
    <style:style style:parent-style-name="832" style:display-name="ListLabel 37" style:family="text" style:name="963">
      <style:paragraph-properties/>
    </style:style>
    <style:style style:parent-style-name="832" style:display-name="ListLabel 38" style:family="text" style:name="964">
      <style:paragraph-properties/>
    </style:style>
    <style:style style:parent-style-name="832" style:display-name="ListLabel 39" style:family="text" style:name="965">
      <style:paragraph-properties/>
    </style:style>
    <style:style style:parent-style-name="832" style:display-name="ListLabel 40" style:family="text" style:name="966">
      <style:paragraph-properties/>
    </style:style>
    <style:style style:parent-style-name="832" style:display-name="ListLabel 41" style:family="text" style:name="967">
      <style:paragraph-properties/>
    </style:style>
    <style:style style:parent-style-name="832" style:display-name="ListLabel 42" style:family="text" style:name="968">
      <style:paragraph-properties/>
    </style:style>
    <style:style style:parent-style-name="832" style:display-name="ListLabel 43" style:family="text" style:name="969">
      <style:paragraph-properties/>
    </style:style>
    <style:style style:parent-style-name="832" style:display-name="ListLabel 44" style:family="text" style:name="970">
      <style:paragraph-properties/>
    </style:style>
    <style:style style:parent-style-name="832" style:display-name="ListLabel 45" style:family="text" style:name="971">
      <style:paragraph-properties/>
    </style:style>
    <style:style style:parent-style-name="832" style:display-name="ListLabel 46" style:family="text" style:name="972">
      <style:paragraph-properties/>
    </style:style>
    <style:style style:parent-style-name="832" style:display-name="ListLabel 47" style:family="text" style:name="973">
      <style:paragraph-properties/>
    </style:style>
    <style:style style:parent-style-name="832" style:display-name="ListLabel 48" style:family="text" style:name="974">
      <style:paragraph-properties/>
    </style:style>
    <style:style style:parent-style-name="832" style:display-name="ListLabel 49" style:family="text" style:name="975">
      <style:paragraph-properties/>
    </style:style>
    <style:style style:parent-style-name="832" style:display-name="ListLabel 50" style:family="text" style:name="976">
      <style:paragraph-properties/>
    </style:style>
    <style:style style:parent-style-name="832" style:display-name="ListLabel 51" style:family="text" style:name="977">
      <style:paragraph-properties/>
    </style:style>
    <style:style style:parent-style-name="832" style:display-name="ListLabel 52" style:family="text" style:name="978">
      <style:paragraph-properties/>
    </style:style>
    <style:style style:parent-style-name="832" style:display-name="ListLabel 53" style:family="text" style:name="979">
      <style:paragraph-properties/>
    </style:style>
    <style:style style:parent-style-name="832" style:display-name="ListLabel 54" style:family="text" style:name="980">
      <style:paragraph-properties/>
    </style:style>
    <style:style style:parent-style-name="832" style:display-name="ListLabel 55" style:family="text" style:name="981">
      <style:paragraph-properties/>
    </style:style>
    <style:style style:parent-style-name="832" style:display-name="ListLabel 56" style:family="text" style:name="982">
      <style:paragraph-properties/>
    </style:style>
    <style:style style:parent-style-name="832" style:display-name="ListLabel 57" style:family="text" style:name="983">
      <style:paragraph-properties/>
    </style:style>
    <style:style style:parent-style-name="832" style:display-name="ListLabel 58" style:family="text" style:name="984">
      <style:paragraph-properties/>
    </style:style>
    <style:style style:parent-style-name="832" style:display-name="ListLabel 59" style:family="text" style:name="985">
      <style:paragraph-properties/>
    </style:style>
    <style:style style:parent-style-name="832" style:display-name="ListLabel 60" style:family="text" style:name="986">
      <style:paragraph-properties/>
    </style:style>
    <style:style style:parent-style-name="832" style:display-name="ListLabel 61" style:family="text" style:name="987">
      <style:paragraph-properties/>
    </style:style>
    <style:style style:parent-style-name="832" style:display-name="ListLabel 62" style:family="text" style:name="988">
      <style:paragraph-properties/>
    </style:style>
    <style:style style:parent-style-name="832" style:display-name="ListLabel 63" style:family="text" style:name="989">
      <style:paragraph-properties/>
    </style:style>
    <style:style style:parent-style-name="832" style:display-name="ListLabel 64" style:family="text" style:name="990">
      <style:paragraph-properties/>
    </style:style>
    <style:style style:parent-style-name="832" style:display-name="ListLabel 65" style:family="text" style:name="991">
      <style:paragraph-properties/>
    </style:style>
    <style:style style:parent-style-name="832" style:display-name="ListLabel 66" style:family="text" style:name="992">
      <style:paragraph-properties/>
    </style:style>
    <style:style style:parent-style-name="832" style:display-name="ListLabel 67" style:family="text" style:name="993">
      <style:paragraph-properties/>
    </style:style>
    <style:style style:parent-style-name="832" style:display-name="ListLabel 68" style:family="text" style:name="994">
      <style:paragraph-properties/>
    </style:style>
    <style:style style:parent-style-name="832" style:display-name="ListLabel 69" style:family="text" style:name="995">
      <style:paragraph-properties/>
    </style:style>
    <style:style style:parent-style-name="832" style:display-name="ListLabel 70" style:family="text" style:name="996">
      <style:paragraph-properties/>
    </style:style>
    <style:style style:parent-style-name="832" style:display-name="ListLabel 71" style:family="text" style:name="997">
      <style:paragraph-properties/>
    </style:style>
    <style:style style:parent-style-name="832" style:display-name="ListLabel 72" style:family="text" style:name="998">
      <style:paragraph-properties/>
    </style:style>
    <style:style style:parent-style-name="832" style:display-name="ListLabel 73" style:family="text" style:name="999">
      <style:paragraph-properties/>
    </style:style>
    <style:style style:parent-style-name="832" style:display-name="ListLabel 74" style:family="text" style:name="1000">
      <style:paragraph-properties/>
    </style:style>
    <style:style style:parent-style-name="832" style:display-name="ListLabel 75" style:family="text" style:name="1001">
      <style:paragraph-properties/>
    </style:style>
    <style:style style:parent-style-name="832" style:display-name="ListLabel 76" style:family="text" style:name="1002">
      <style:paragraph-properties/>
    </style:style>
    <style:style style:parent-style-name="832" style:display-name="ListLabel 77" style:family="text" style:name="1003">
      <style:paragraph-properties/>
    </style:style>
    <style:style style:parent-style-name="832" style:display-name="ListLabel 78" style:family="text" style:name="1004">
      <style:paragraph-properties/>
    </style:style>
    <style:style style:parent-style-name="832" style:display-name="ListLabel 79" style:family="text" style:name="1005">
      <style:paragraph-properties/>
    </style:style>
    <style:style style:parent-style-name="832" style:display-name="ListLabel 80" style:family="text" style:name="1006">
      <style:paragraph-properties/>
    </style:style>
    <style:style style:parent-style-name="832" style:display-name="ListLabel 81" style:family="text" style:name="1007">
      <style:paragraph-properties/>
    </style:style>
    <style:style style:parent-style-name="832" style:display-name="ListLabel 82" style:family="text" style:name="1008">
      <style:paragraph-properties/>
    </style:style>
    <style:style style:parent-style-name="832" style:display-name="ListLabel 83" style:family="text" style:name="1009">
      <style:paragraph-properties/>
    </style:style>
    <style:style style:parent-style-name="832" style:display-name="ListLabel 84" style:family="text" style:name="1010">
      <style:paragraph-properties/>
    </style:style>
    <style:style style:parent-style-name="832" style:display-name="ListLabel 85" style:family="text" style:name="1011">
      <style:paragraph-properties/>
    </style:style>
    <style:style style:parent-style-name="832" style:display-name="ListLabel 86" style:family="text" style:name="1012">
      <style:paragraph-properties/>
    </style:style>
    <style:style style:parent-style-name="832" style:display-name="ListLabel 87" style:family="text" style:name="1013">
      <style:paragraph-properties/>
    </style:style>
    <style:style style:parent-style-name="832" style:display-name="ListLabel 88" style:family="text" style:name="1014">
      <style:paragraph-properties/>
    </style:style>
    <style:style style:parent-style-name="832" style:display-name="ListLabel 89" style:family="text" style:name="1015">
      <style:paragraph-properties/>
    </style:style>
    <style:style style:parent-style-name="832" style:display-name="ListLabel 90" style:family="text" style:name="1016">
      <style:paragraph-properties/>
    </style:style>
    <style:style style:parent-style-name="832" style:display-name="ListLabel 91" style:family="text" style:name="1017">
      <style:paragraph-properties/>
    </style:style>
    <style:style style:parent-style-name="832" style:display-name="ListLabel 92" style:family="text" style:name="1018">
      <style:paragraph-properties/>
    </style:style>
    <style:style style:parent-style-name="832" style:display-name="ListLabel 93" style:family="text" style:name="1019">
      <style:paragraph-properties/>
    </style:style>
    <style:style style:parent-style-name="832" style:display-name="ListLabel 94" style:family="text" style:name="1020">
      <style:paragraph-properties/>
    </style:style>
    <style:style style:parent-style-name="832" style:display-name="ListLabel 95" style:family="text" style:name="1021">
      <style:paragraph-properties/>
    </style:style>
    <style:style style:parent-style-name="832" style:display-name="ListLabel 96" style:family="text" style:name="1022">
      <style:paragraph-properties/>
    </style:style>
    <style:style style:parent-style-name="832" style:display-name="ListLabel 97" style:family="text" style:name="1023">
      <style:paragraph-properties/>
    </style:style>
    <style:style style:parent-style-name="832" style:display-name="ListLabel 98" style:family="text" style:name="1024">
      <style:paragraph-properties/>
    </style:style>
    <style:style style:parent-style-name="832" style:display-name="ListLabel 99" style:family="text" style:name="1025">
      <style:paragraph-properties/>
    </style:style>
    <style:style style:parent-style-name="832" style:display-name="ListLabel 100" style:family="text" style:name="1026">
      <style:paragraph-properties/>
    </style:style>
    <style:style style:parent-style-name="832" style:display-name="ListLabel 101" style:family="text" style:name="1027">
      <style:paragraph-properties/>
    </style:style>
    <style:style style:parent-style-name="832" style:display-name="ListLabel 102" style:family="text" style:name="1028">
      <style:paragraph-properties/>
    </style:style>
    <style:style style:parent-style-name="832" style:display-name="ListLabel 103" style:family="text" style:name="1029">
      <style:paragraph-properties/>
    </style:style>
    <style:style style:parent-style-name="832" style:display-name="ListLabel 104" style:family="text" style:name="1030">
      <style:paragraph-properties/>
    </style:style>
    <style:style style:parent-style-name="832" style:display-name="ListLabel 105" style:family="text" style:name="1031">
      <style:paragraph-properties/>
    </style:style>
    <style:style style:parent-style-name="832" style:display-name="ListLabel 106" style:family="text" style:name="1032">
      <style:paragraph-properties/>
    </style:style>
    <style:style style:parent-style-name="832" style:display-name="ListLabel 107" style:family="text" style:name="1033">
      <style:paragraph-properties/>
    </style:style>
    <style:style style:parent-style-name="832" style:display-name="ListLabel 108" style:family="text" style:name="1034">
      <style:paragraph-properties/>
    </style:style>
    <style:style style:parent-style-name="832" style:display-name="ListLabel 109" style:family="text" style:name="1035">
      <style:paragraph-properties/>
    </style:style>
    <style:style style:parent-style-name="832" style:display-name="ListLabel 110" style:family="text" style:name="1036">
      <style:paragraph-properties/>
    </style:style>
    <style:style style:parent-style-name="832" style:display-name="ListLabel 111" style:family="text" style:name="1037">
      <style:paragraph-properties/>
    </style:style>
    <style:style style:parent-style-name="832" style:display-name="ListLabel 112" style:family="text" style:name="1038">
      <style:paragraph-properties/>
    </style:style>
    <style:style style:parent-style-name="832" style:display-name="ListLabel 113" style:family="text" style:name="1039">
      <style:paragraph-properties/>
    </style:style>
    <style:style style:parent-style-name="832" style:display-name="ListLabel 114" style:family="text" style:name="1040">
      <style:paragraph-properties/>
    </style:style>
    <style:style style:parent-style-name="832" style:display-name="ListLabel 115" style:family="text" style:name="1041">
      <style:paragraph-properties/>
    </style:style>
    <style:style style:parent-style-name="832" style:display-name="ListLabel 116" style:family="text" style:name="1042">
      <style:paragraph-properties/>
    </style:style>
    <style:style style:parent-style-name="832" style:display-name="ListLabel 117" style:family="text" style:name="1043">
      <style:paragraph-properties/>
    </style:style>
    <style:style style:parent-style-name="832" style:display-name="ListLabel 118" style:family="text" style:name="1044">
      <style:paragraph-properties/>
    </style:style>
    <style:style style:parent-style-name="832" style:display-name="ListLabel 119" style:family="text" style:name="1045">
      <style:paragraph-properties/>
    </style:style>
    <style:style style:parent-style-name="832" style:display-name="ListLabel 120" style:family="text" style:name="1046">
      <style:paragraph-properties/>
    </style:style>
    <style:style style:parent-style-name="832" style:display-name="ListLabel 121" style:family="text" style:name="1047">
      <style:paragraph-properties/>
    </style:style>
    <style:style style:parent-style-name="832" style:display-name="ListLabel 122" style:family="text" style:name="1048">
      <style:paragraph-properties/>
    </style:style>
    <style:style style:parent-style-name="832" style:display-name="ListLabel 123" style:family="text" style:name="1049">
      <style:paragraph-properties/>
    </style:style>
    <style:style style:parent-style-name="832" style:display-name="ListLabel 124" style:family="text" style:name="1050">
      <style:paragraph-properties/>
    </style:style>
    <style:style style:parent-style-name="832" style:display-name="ListLabel 125" style:family="text" style:name="1051">
      <style:paragraph-properties/>
    </style:style>
    <style:style style:parent-style-name="832" style:display-name="ListLabel 126" style:family="text" style:name="1052">
      <style:paragraph-properties/>
    </style:style>
    <style:style style:parent-style-name="832" style:display-name="ListLabel 127" style:family="text" style:name="1053">
      <style:paragraph-properties/>
    </style:style>
    <style:style style:parent-style-name="832" style:display-name="ListLabel 128" style:family="text" style:name="1054">
      <style:paragraph-properties/>
    </style:style>
    <style:style style:parent-style-name="832" style:display-name="ListLabel 129" style:family="text" style:name="1055">
      <style:paragraph-properties/>
    </style:style>
    <style:style style:parent-style-name="832" style:display-name="ListLabel 130" style:family="text" style:name="1056">
      <style:paragraph-properties/>
    </style:style>
    <style:style style:parent-style-name="832" style:display-name="ListLabel 131" style:family="text" style:name="1057">
      <style:paragraph-properties/>
    </style:style>
    <style:style style:parent-style-name="832" style:display-name="ListLabel 132" style:family="text" style:name="1058">
      <style:paragraph-properties/>
    </style:style>
    <style:style style:parent-style-name="832" style:display-name="ListLabel 133" style:family="text" style:name="1059">
      <style:paragraph-properties/>
    </style:style>
    <style:style style:parent-style-name="832" style:display-name="ListLabel 134" style:family="text" style:name="1060">
      <style:paragraph-properties/>
    </style:style>
    <style:style style:parent-style-name="832" style:display-name="ListLabel 135" style:family="text" style:name="1061">
      <style:paragraph-properties/>
    </style:style>
    <style:style style:parent-style-name="832" style:display-name="ListLabel 136" style:family="text" style:name="1062">
      <style:paragraph-properties/>
    </style:style>
    <style:style style:parent-style-name="832" style:display-name="ListLabel 137" style:family="text" style:name="1063">
      <style:paragraph-properties/>
    </style:style>
    <style:style style:parent-style-name="832" style:display-name="ListLabel 138" style:family="text" style:name="1064">
      <style:paragraph-properties/>
    </style:style>
    <style:style style:parent-style-name="832" style:display-name="ListLabel 139" style:family="text" style:name="1065">
      <style:paragraph-properties/>
    </style:style>
    <style:style style:parent-style-name="832" style:display-name="ListLabel 140" style:family="text" style:name="1066">
      <style:paragraph-properties/>
    </style:style>
    <style:style style:parent-style-name="832" style:display-name="ListLabel 141" style:family="text" style:name="1067">
      <style:paragraph-properties/>
    </style:style>
    <style:style style:parent-style-name="832" style:display-name="ListLabel 142" style:family="text" style:name="1068">
      <style:paragraph-properties/>
    </style:style>
    <style:style style:parent-style-name="832" style:display-name="ListLabel 143" style:family="text" style:name="1069">
      <style:paragraph-properties/>
    </style:style>
    <style:style style:parent-style-name="832" style:display-name="ListLabel 144" style:family="text" style:name="1070">
      <style:paragraph-properties/>
    </style:style>
    <style:style style:parent-style-name="832" style:display-name="ListLabel 145" style:family="text" style:name="1071">
      <style:paragraph-properties/>
    </style:style>
    <style:style style:parent-style-name="832" style:display-name="ListLabel 146" style:family="text" style:name="1072">
      <style:paragraph-properties/>
    </style:style>
    <style:style style:parent-style-name="832" style:display-name="ListLabel 147" style:family="text" style:name="1073">
      <style:paragraph-properties/>
    </style:style>
    <style:style style:parent-style-name="832" style:display-name="ListLabel 148" style:family="text" style:name="1074">
      <style:paragraph-properties/>
    </style:style>
    <style:style style:parent-style-name="832" style:display-name="ListLabel 149" style:family="text" style:name="1075">
      <style:paragraph-properties/>
    </style:style>
    <style:style style:parent-style-name="832" style:display-name="ListLabel 150" style:family="text" style:name="1076">
      <style:paragraph-properties/>
    </style:style>
    <style:style style:parent-style-name="832" style:display-name="ListLabel 151" style:family="text" style:name="1077">
      <style:paragraph-properties/>
    </style:style>
    <style:style style:parent-style-name="832" style:display-name="ListLabel 152" style:family="text" style:name="1078">
      <style:paragraph-properties/>
    </style:style>
    <style:style style:parent-style-name="832" style:display-name="ListLabel 153" style:family="text" style:name="1079">
      <style:paragraph-properties/>
    </style:style>
    <style:style style:parent-style-name="832" style:display-name="ListLabel 154" style:family="text" style:name="1080">
      <style:paragraph-properties/>
    </style:style>
    <style:style style:parent-style-name="832" style:display-name="ListLabel 155" style:family="text" style:name="1081">
      <style:paragraph-properties/>
    </style:style>
    <style:style style:parent-style-name="832" style:display-name="ListLabel 156" style:family="text" style:name="1082">
      <style:paragraph-properties/>
    </style:style>
    <style:style style:parent-style-name="832" style:display-name="ListLabel 157" style:family="text" style:name="1083">
      <style:paragraph-properties/>
    </style:style>
    <style:style style:parent-style-name="832" style:display-name="ListLabel 158" style:family="text" style:name="1084">
      <style:paragraph-properties/>
    </style:style>
    <style:style style:parent-style-name="832" style:display-name="ListLabel 159" style:family="text" style:name="1085">
      <style:paragraph-properties/>
    </style:style>
    <style:style style:parent-style-name="832" style:display-name="ListLabel 160" style:family="text" style:name="1086">
      <style:paragraph-properties/>
    </style:style>
    <style:style style:parent-style-name="832" style:display-name="ListLabel 161" style:family="text" style:name="1087">
      <style:paragraph-properties/>
    </style:style>
    <style:style style:parent-style-name="832" style:display-name="ListLabel 162" style:family="text" style:name="1088">
      <style:paragraph-properties/>
    </style:style>
    <style:style style:parent-style-name="832" style:display-name="ListLabel 163" style:family="text" style:name="1089">
      <style:paragraph-properties/>
    </style:style>
    <style:style style:parent-style-name="832" style:display-name="ListLabel 164" style:family="text" style:name="1090">
      <style:paragraph-properties/>
    </style:style>
    <style:style style:parent-style-name="832" style:display-name="ListLabel 165" style:family="text" style:name="1091">
      <style:paragraph-properties/>
    </style:style>
    <style:style style:parent-style-name="832" style:display-name="ListLabel 166" style:family="text" style:name="1092">
      <style:paragraph-properties/>
    </style:style>
    <style:style style:parent-style-name="832" style:display-name="ListLabel 167" style:family="text" style:name="1093">
      <style:paragraph-properties/>
    </style:style>
    <style:style style:parent-style-name="832" style:display-name="ListLabel 168" style:family="text" style:name="1094">
      <style:paragraph-properties/>
    </style:style>
    <style:style style:parent-style-name="832" style:display-name="ListLabel 169" style:family="text" style:name="1095">
      <style:paragraph-properties/>
    </style:style>
    <style:style style:parent-style-name="832" style:display-name="ListLabel 170" style:family="text" style:name="1096">
      <style:paragraph-properties/>
    </style:style>
    <style:style style:parent-style-name="832" style:display-name="ListLabel 171" style:family="text" style:name="1097">
      <style:paragraph-properties/>
    </style:style>
    <style:style style:parent-style-name="832" style:display-name="ListLabel 172" style:family="text" style:name="1098">
      <style:paragraph-properties/>
    </style:style>
    <style:style style:parent-style-name="832" style:display-name="ListLabel 173" style:family="text" style:name="1099">
      <style:paragraph-properties/>
    </style:style>
    <style:style style:parent-style-name="832" style:display-name="ListLabel 174" style:family="text" style:name="1100">
      <style:paragraph-properties/>
    </style:style>
    <style:style style:parent-style-name="832" style:display-name="ListLabel 175" style:family="text" style:name="1101">
      <style:paragraph-properties/>
    </style:style>
    <style:style style:parent-style-name="832" style:display-name="ListLabel 176" style:family="text" style:name="1102">
      <style:paragraph-properties/>
    </style:style>
    <style:style style:parent-style-name="832" style:display-name="ListLabel 177" style:family="text" style:name="1103">
      <style:paragraph-properties/>
    </style:style>
    <style:style style:parent-style-name="832" style:display-name="ListLabel 178" style:family="text" style:name="1104">
      <style:paragraph-properties/>
    </style:style>
    <style:style style:parent-style-name="832" style:display-name="ListLabel 179" style:family="text" style:name="1105">
      <style:paragraph-properties/>
    </style:style>
    <style:style style:parent-style-name="832" style:display-name="ListLabel 180" style:family="text" style:name="1106">
      <style:paragraph-properties/>
    </style:style>
    <style:style style:parent-style-name="832" style:display-name="ListLabel 181" style:family="text" style:name="1107">
      <style:paragraph-properties/>
    </style:style>
    <style:style style:parent-style-name="832" style:display-name="ListLabel 182" style:family="text" style:name="1108">
      <style:paragraph-properties/>
    </style:style>
    <style:style style:parent-style-name="832" style:display-name="ListLabel 183" style:family="text" style:name="1109">
      <style:paragraph-properties/>
    </style:style>
    <style:style style:parent-style-name="832" style:display-name="ListLabel 184" style:family="text" style:name="1110">
      <style:paragraph-properties/>
    </style:style>
    <style:style style:parent-style-name="832" style:display-name="ListLabel 185" style:family="text" style:name="1111">
      <style:paragraph-properties/>
    </style:style>
    <style:style style:parent-style-name="832" style:display-name="ListLabel 186" style:family="text" style:name="1112">
      <style:paragraph-properties/>
    </style:style>
    <style:style style:parent-style-name="832" style:display-name="ListLabel 187" style:family="text" style:name="1113">
      <style:paragraph-properties/>
    </style:style>
    <style:style style:parent-style-name="832" style:display-name="ListLabel 188" style:family="text" style:name="1114">
      <style:paragraph-properties/>
    </style:style>
    <style:style style:parent-style-name="832" style:display-name="ListLabel 189" style:family="text" style:name="1115">
      <style:paragraph-properties/>
    </style:style>
    <style:style style:parent-style-name="832" style:display-name="ListLabel 190" style:family="text" style:name="1116">
      <style:paragraph-properties/>
    </style:style>
    <style:style style:parent-style-name="832" style:display-name="ListLabel 191" style:family="text" style:name="1117">
      <style:paragraph-properties/>
    </style:style>
    <style:style style:parent-style-name="832" style:display-name="ListLabel 192" style:family="text" style:name="1118">
      <style:paragraph-properties/>
    </style:style>
    <style:style style:parent-style-name="832" style:display-name="ListLabel 193" style:family="text" style:name="1119">
      <style:paragraph-properties/>
    </style:style>
    <style:style style:parent-style-name="832" style:display-name="ListLabel 194" style:family="text" style:name="1120">
      <style:paragraph-properties/>
    </style:style>
    <style:style style:parent-style-name="832" style:display-name="ListLabel 195" style:family="text" style:name="1121">
      <style:paragraph-properties/>
    </style:style>
    <style:style style:parent-style-name="832" style:display-name="ListLabel 196" style:family="text" style:name="1122">
      <style:paragraph-properties/>
    </style:style>
    <style:style style:parent-style-name="832" style:display-name="ListLabel 197" style:family="text" style:name="1123">
      <style:paragraph-properties/>
    </style:style>
    <style:style style:parent-style-name="832" style:display-name="ListLabel 198" style:family="text" style:name="1124">
      <style:paragraph-properties/>
    </style:style>
    <style:style style:parent-style-name="832" style:display-name="ListLabel 199" style:family="text" style:name="1125">
      <style:paragraph-properties/>
    </style:style>
    <style:style style:parent-style-name="832" style:display-name="ListLabel 200" style:family="text" style:name="1126">
      <style:paragraph-properties/>
    </style:style>
    <style:style style:parent-style-name="832" style:display-name="ListLabel 201" style:family="text" style:name="1127">
      <style:paragraph-properties/>
    </style:style>
    <style:style style:parent-style-name="832" style:display-name="ListLabel 202" style:family="text" style:name="1128">
      <style:paragraph-properties/>
    </style:style>
    <style:style style:parent-style-name="832" style:display-name="ListLabel 203" style:family="text" style:name="1129">
      <style:paragraph-properties/>
    </style:style>
    <style:style style:parent-style-name="832" style:display-name="ListLabel 204" style:family="text" style:name="1130">
      <style:paragraph-properties/>
    </style:style>
    <style:style style:parent-style-name="832" style:display-name="ListLabel 205" style:family="text" style:name="1131">
      <style:paragraph-properties/>
    </style:style>
    <style:style style:parent-style-name="832" style:display-name="ListLabel 206" style:family="text" style:name="1132">
      <style:paragraph-properties/>
    </style:style>
    <style:style style:parent-style-name="832" style:display-name="ListLabel 207" style:family="text" style:name="1133">
      <style:paragraph-properties/>
    </style:style>
    <style:style style:parent-style-name="832" style:display-name="ListLabel 208" style:family="text" style:name="1134">
      <style:paragraph-properties/>
    </style:style>
    <style:style style:parent-style-name="832" style:display-name="ListLabel 209" style:family="text" style:name="1135">
      <style:paragraph-properties/>
    </style:style>
    <style:style style:parent-style-name="832" style:display-name="ListLabel 210" style:family="text" style:name="1136">
      <style:paragraph-properties/>
    </style:style>
    <style:style style:parent-style-name="832" style:display-name="ListLabel 211" style:family="text" style:name="1137">
      <style:paragraph-properties/>
    </style:style>
    <style:style style:parent-style-name="832" style:display-name="ListLabel 212" style:family="text" style:name="1138">
      <style:paragraph-properties/>
    </style:style>
    <style:style style:parent-style-name="832" style:display-name="ListLabel 213" style:family="text" style:name="1139">
      <style:paragraph-properties/>
    </style:style>
    <style:style style:parent-style-name="832" style:display-name="ListLabel 214" style:family="text" style:name="1140">
      <style:paragraph-properties/>
    </style:style>
    <style:style style:parent-style-name="832" style:display-name="ListLabel 215" style:family="text" style:name="1141">
      <style:paragraph-properties/>
    </style:style>
    <style:style style:parent-style-name="832" style:display-name="ListLabel 216" style:family="text" style:name="1142">
      <style:paragraph-properties/>
    </style:style>
    <style:style style:parent-style-name="832" style:display-name="ListLabel 217" style:family="text" style:name="1143">
      <style:paragraph-properties/>
    </style:style>
    <style:style style:parent-style-name="832" style:display-name="ListLabel 218" style:family="text" style:name="1144">
      <style:paragraph-properties/>
    </style:style>
    <style:style style:parent-style-name="832" style:display-name="ListLabel 219" style:family="text" style:name="1145">
      <style:paragraph-properties/>
    </style:style>
    <style:style style:parent-style-name="832" style:display-name="ListLabel 220" style:family="text" style:name="1146">
      <style:paragraph-properties/>
    </style:style>
    <style:style style:parent-style-name="832" style:display-name="ListLabel 221" style:family="text" style:name="1147">
      <style:paragraph-properties/>
    </style:style>
    <style:style style:parent-style-name="832" style:display-name="ListLabel 222" style:family="text" style:name="1148">
      <style:paragraph-properties/>
    </style:style>
    <style:style style:parent-style-name="832" style:display-name="ListLabel 223" style:family="text" style:name="1149">
      <style:paragraph-properties/>
    </style:style>
    <style:style style:parent-style-name="832" style:display-name="ListLabel 224" style:family="text" style:name="1150">
      <style:paragraph-properties/>
    </style:style>
    <style:style style:parent-style-name="832" style:display-name="ListLabel 225" style:family="text" style:name="1151">
      <style:paragraph-properties/>
    </style:style>
    <style:style style:parent-style-name="832" style:display-name="ListLabel 226" style:family="text" style:name="1152">
      <style:paragraph-properties/>
    </style:style>
    <style:style style:parent-style-name="832" style:display-name="ListLabel 227" style:family="text" style:name="1153">
      <style:paragraph-properties/>
    </style:style>
    <style:style style:parent-style-name="832" style:display-name="ListLabel 228" style:family="text" style:name="1154">
      <style:paragraph-properties/>
    </style:style>
    <style:style style:parent-style-name="832" style:display-name="ListLabel 229" style:family="text" style:name="1155">
      <style:paragraph-properties/>
    </style:style>
    <style:style style:parent-style-name="832" style:display-name="ListLabel 230" style:family="text" style:name="1156">
      <style:paragraph-properties/>
    </style:style>
    <style:style style:parent-style-name="832" style:display-name="ListLabel 231" style:family="text" style:name="1157">
      <style:paragraph-properties/>
    </style:style>
    <style:style style:parent-style-name="832" style:display-name="ListLabel 232" style:family="text" style:name="1158">
      <style:paragraph-properties/>
    </style:style>
    <style:style style:parent-style-name="832" style:display-name="ListLabel 233" style:family="text" style:name="1159">
      <style:paragraph-properties/>
    </style:style>
    <style:style style:parent-style-name="832" style:display-name="ListLabel 234" style:family="text" style:name="1160">
      <style:paragraph-properties/>
    </style:style>
    <style:style style:parent-style-name="832" style:display-name="ListLabel 235" style:family="text" style:name="1161">
      <style:paragraph-properties/>
    </style:style>
    <style:style style:parent-style-name="832" style:display-name="ListLabel 236" style:family="text" style:name="1162">
      <style:paragraph-properties/>
    </style:style>
    <style:style style:parent-style-name="832" style:display-name="ListLabel 237" style:family="text" style:name="1163">
      <style:paragraph-properties/>
    </style:style>
    <style:style style:parent-style-name="832" style:display-name="ListLabel 238" style:family="text" style:name="1164">
      <style:paragraph-properties/>
    </style:style>
    <style:style style:parent-style-name="832" style:display-name="ListLabel 239" style:family="text" style:name="1165">
      <style:paragraph-properties/>
    </style:style>
    <style:style style:parent-style-name="832" style:display-name="ListLabel 240" style:family="text" style:name="1166">
      <style:paragraph-properties/>
    </style:style>
    <style:style style:parent-style-name="832" style:display-name="ListLabel 241" style:family="text" style:name="1167">
      <style:paragraph-properties/>
    </style:style>
    <style:style style:parent-style-name="832" style:display-name="ListLabel 242" style:family="text" style:name="1168">
      <style:paragraph-properties/>
    </style:style>
    <style:style style:parent-style-name="832" style:display-name="ListLabel 243" style:family="text" style:name="1169">
      <style:paragraph-properties/>
    </style:style>
    <style:style style:parent-style-name="832" style:display-name="ListLabel 244" style:family="text" style:name="1170">
      <style:paragraph-properties/>
    </style:style>
    <style:style style:parent-style-name="832" style:display-name="ListLabel 245" style:family="text" style:name="1171">
      <style:paragraph-properties/>
    </style:style>
    <style:style style:parent-style-name="832" style:display-name="ListLabel 246" style:family="text" style:name="1172">
      <style:paragraph-properties/>
    </style:style>
    <style:style style:parent-style-name="832" style:display-name="ListLabel 247" style:family="text" style:name="1173">
      <style:paragraph-properties/>
    </style:style>
    <style:style style:parent-style-name="832" style:display-name="ListLabel 248" style:family="text" style:name="1174">
      <style:paragraph-properties/>
    </style:style>
    <style:style style:parent-style-name="832" style:display-name="ListLabel 249" style:family="text" style:name="1175">
      <style:paragraph-properties/>
    </style:style>
    <style:style style:parent-style-name="832" style:display-name="ListLabel 250" style:family="text" style:name="1176">
      <style:paragraph-properties/>
    </style:style>
    <style:style style:parent-style-name="832" style:display-name="ListLabel 251" style:family="text" style:name="1177">
      <style:paragraph-properties/>
    </style:style>
    <style:style style:parent-style-name="832" style:display-name="ListLabel 252" style:family="text" style:name="1178">
      <style:paragraph-properties/>
    </style:style>
    <style:style style:parent-style-name="832" style:display-name="ListLabel 253" style:family="text" style:name="1179">
      <style:paragraph-properties/>
    </style:style>
    <style:style style:parent-style-name="832" style:display-name="ListLabel 254" style:family="text" style:name="1180">
      <style:paragraph-properties/>
      <style:text-properties fo:font-weight="normal"/>
    </style:style>
    <style:style style:parent-style-name="832" style:display-name="ListLabel 255" style:family="text" style:name="1181">
      <style:paragraph-properties/>
      <style:text-properties fo:font-weight="normal"/>
    </style:style>
    <style:style style:parent-style-name="832" style:display-name="ListLabel 256" style:family="text" style:name="1182">
      <style:paragraph-properties/>
      <style:text-properties fo:color="#000000" fo:font-family="Liberation Mono" style:font-family-complex="Liberation Mono" fo:font-size="11pt" fo:language="de" fo:country="AT" fo:font-weight="normal"/>
    </style:style>
    <style:style style:parent-style-name="832" style:display-name="Strong Emphasis" style:family="text" style:name="1183">
      <style:paragraph-properties/>
      <style:text-properties fo:font-weight="bold"/>
    </style:style>
    <style:style style:parent-style-name="832" style:display-name="T1" style:family="text" style:name="1184">
      <style:paragraph-properties/>
    </style:style>
    <style:style style:parent-style-name="832" style:display-name="T2" style:family="text" style:name="1185">
      <style:paragraph-properties/>
    </style:style>
    <style:style style:parent-style-name="832" style:display-name="T3" style:family="text" style:name="1186">
      <style:paragraph-properties/>
    </style:style>
    <style:style style:parent-style-name="832" style:display-name="T4" style:family="text" style:name="1187">
      <style:paragraph-properties/>
    </style:style>
    <style:style style:parent-style-name="832" style:display-name="T5" style:family="text" style:name="1188">
      <style:paragraph-properties/>
    </style:style>
    <style:style style:parent-style-name="832" style:display-name="T6" style:family="text" style:name="1189">
      <style:paragraph-properties/>
    </style:style>
    <style:style style:parent-style-name="832" style:display-name="T7" style:family="text" style:name="1190">
      <style:paragraph-properties/>
    </style:style>
    <style:style style:parent-style-name="832" style:display-name="T8" style:family="text" style:name="1191">
      <style:paragraph-properties/>
    </style:style>
    <style:style style:parent-style-name="832" style:display-name="T9" style:family="text" style:name="1192">
      <style:paragraph-properties/>
    </style:style>
    <style:style style:parent-style-name="832" style:display-name="T10" style:family="text" style:name="1193">
      <style:paragraph-properties/>
      <style:text-properties fo:font-family="Symbol" style:font-family-complex="Symbol"/>
    </style:style>
    <style:style style:parent-style-name="832" style:display-name="T11" style:family="text" style:name="1194">
      <style:paragraph-properties/>
      <style:text-properties fo:font-family="Symbol" style:font-family-complex="Symbol"/>
    </style:style>
    <style:style style:parent-style-name="832" style:display-name="T12" style:family="text" style:name="1195">
      <style:paragraph-properties/>
      <style:text-properties fo:font-family="Symbol" style:font-family-complex="Symbol"/>
    </style:style>
    <style:style style:parent-style-name="832" style:display-name="T13" style:family="text" style:name="1196">
      <style:paragraph-properties/>
      <style:text-properties fo:font-family="Symbol" style:font-family-complex="Symbol"/>
    </style:style>
    <style:style style:parent-style-name="832" style:display-name="T14" style:family="text" style:name="1197">
      <style:paragraph-properties/>
      <style:text-properties fo:font-family="Symbol" style:font-family-complex="Symbol"/>
    </style:style>
    <style:style style:parent-style-name="832" style:display-name="T15" style:family="text" style:name="1198">
      <style:paragraph-properties/>
      <style:text-properties fo:font-family="Symbol" style:font-family-complex="Symbol"/>
    </style:style>
    <style:style style:parent-style-name="832" style:display-name="T16" style:family="text" style:name="1199">
      <style:paragraph-properties/>
      <style:text-properties fo:font-family="Symbol" style:font-family-complex="Symbol"/>
    </style:style>
    <style:style style:parent-style-name="832" style:display-name="T17" style:family="text" style:name="1200">
      <style:paragraph-properties/>
      <style:text-properties fo:font-family="Symbol" style:font-family-complex="Symbol"/>
    </style:style>
    <style:style style:parent-style-name="832" style:display-name="T18" style:family="text" style:name="1201">
      <style:paragraph-properties/>
      <style:text-properties fo:font-family="Symbol" style:font-family-complex="Symbol"/>
    </style:style>
    <style:style style:parent-style-name="832" style:display-name="T19" style:family="text" style:name="1202">
      <style:paragraph-properties/>
      <style:text-properties fo:font-family="Symbol" style:font-family-complex="Symbol"/>
    </style:style>
    <style:style style:parent-style-name="832" style:display-name="T20" style:family="text" style:name="1203">
      <style:paragraph-properties/>
      <style:text-properties fo:font-family="Symbol" style:font-family-complex="Symbol"/>
    </style:style>
    <style:style style:parent-style-name="832" style:display-name="T21" style:family="text" style:name="1204">
      <style:paragraph-properties/>
      <style:text-properties fo:font-family="Symbol" style:font-family-complex="Symbol"/>
    </style:style>
    <style:style style:parent-style-name="832" style:display-name="T22" style:family="text" style:name="1205">
      <style:paragraph-properties/>
      <style:text-properties fo:font-family="Symbol" style:font-family-complex="Symbol"/>
    </style:style>
    <style:style style:parent-style-name="832" style:display-name="T23" style:family="text" style:name="1206">
      <style:paragraph-properties/>
      <style:text-properties fo:font-family="Symbol" style:font-family-complex="Symbol"/>
    </style:style>
    <style:style style:parent-style-name="832" style:display-name="T24" style:family="text" style:name="1207">
      <style:paragraph-properties/>
      <style:text-properties fo:font-family="Symbol" style:font-family-complex="Symbol"/>
    </style:style>
    <style:style style:parent-style-name="832" style:display-name="T25" style:family="text" style:name="1208">
      <style:paragraph-properties/>
      <style:text-properties fo:font-family="Symbol" style:font-family-complex="Symbol"/>
    </style:style>
    <style:style style:parent-style-name="832" style:display-name="T26" style:family="text" style:name="1209">
      <style:paragraph-properties/>
      <style:text-properties fo:font-family="Symbol" style:font-family-complex="Symbol"/>
    </style:style>
    <style:style style:parent-style-name="832" style:display-name="T27" style:family="text" style:name="1210">
      <style:paragraph-properties/>
      <style:text-properties fo:font-family="Symbol" style:font-family-complex="Symbol"/>
    </style:style>
    <style:style style:parent-style-name="832" style:display-name="T28" style:family="text" style:name="1211">
      <style:paragraph-properties/>
    </style:style>
    <style:style style:parent-style-name="832" style:display-name="T29" style:family="text" style:name="1212">
      <style:paragraph-properties/>
    </style:style>
    <style:style style:parent-style-name="832" style:display-name="T30" style:family="text" style:name="1213">
      <style:paragraph-properties/>
    </style:style>
    <style:style style:parent-style-name="832" style:display-name="T31" style:family="text" style:name="1214">
      <style:paragraph-properties/>
    </style:style>
    <style:style style:parent-style-name="832" style:display-name="T32" style:family="text" style:name="1215">
      <style:paragraph-properties/>
    </style:style>
    <style:style style:parent-style-name="832" style:display-name="T33" style:family="text" style:name="1216">
      <style:paragraph-properties/>
    </style:style>
    <style:style style:parent-style-name="832" style:display-name="T34" style:family="text" style:name="1217">
      <style:paragraph-properties/>
    </style:style>
    <style:style style:parent-style-name="832" style:display-name="T35" style:family="text" style:name="1218">
      <style:paragraph-properties/>
    </style:style>
    <style:style style:parent-style-name="832" style:display-name="T36" style:family="text" style:name="1219">
      <style:paragraph-properties/>
    </style:style>
    <style:style style:parent-style-name="832" style:display-name="T37" style:family="text" style:name="1220">
      <style:paragraph-properties/>
      <style:text-properties fo:font-family="Symbol" style:font-family-complex="Symbol"/>
    </style:style>
    <style:style style:parent-style-name="832" style:display-name="T38" style:family="text" style:name="1221">
      <style:paragraph-properties/>
      <style:text-properties fo:font-family="OpenSymbol" style:font-family-complex="OpenSymbol"/>
    </style:style>
    <style:style style:parent-style-name="832" style:display-name="T39" style:family="text" style:name="1222">
      <style:paragraph-properties/>
      <style:text-properties fo:font-family="OpenSymbol" style:font-family-complex="OpenSymbol"/>
    </style:style>
    <style:style style:parent-style-name="832" style:display-name="T40" style:family="text" style:name="1223">
      <style:paragraph-properties/>
      <style:text-properties fo:font-family="Symbol" style:font-family-complex="Symbol"/>
    </style:style>
    <style:style style:parent-style-name="832" style:display-name="T41" style:family="text" style:name="1224">
      <style:paragraph-properties/>
      <style:text-properties fo:font-family="OpenSymbol" style:font-family-complex="OpenSymbol"/>
    </style:style>
    <style:style style:parent-style-name="832" style:display-name="T42" style:family="text" style:name="1225">
      <style:paragraph-properties/>
      <style:text-properties fo:font-family="OpenSymbol" style:font-family-complex="OpenSymbol"/>
    </style:style>
    <style:style style:parent-style-name="832" style:display-name="T43" style:family="text" style:name="1226">
      <style:paragraph-properties/>
      <style:text-properties fo:font-family="Symbol" style:font-family-complex="Symbol"/>
    </style:style>
    <style:style style:parent-style-name="832" style:display-name="T44" style:family="text" style:name="1227">
      <style:paragraph-properties/>
      <style:text-properties fo:font-family="OpenSymbol" style:font-family-complex="OpenSymbol"/>
    </style:style>
    <style:style style:parent-style-name="832" style:display-name="T45" style:family="text" style:name="1228">
      <style:paragraph-properties/>
      <style:text-properties fo:font-family="OpenSymbol" style:font-family-complex="OpenSymbol"/>
    </style:style>
    <style:style style:parent-style-name="832" style:display-name="T46" style:family="text" style:name="1229">
      <style:paragraph-properties/>
      <style:text-properties fo:font-family="Symbol" style:font-family-complex="Symbol"/>
    </style:style>
    <style:style style:parent-style-name="832" style:display-name="T47" style:family="text" style:name="1230">
      <style:paragraph-properties/>
      <style:text-properties fo:font-family="Symbol" style:font-family-complex="Symbol"/>
    </style:style>
    <style:style style:parent-style-name="832" style:display-name="T48" style:family="text" style:name="1231">
      <style:paragraph-properties/>
      <style:text-properties fo:font-family="Symbol" style:font-family-complex="Symbol"/>
    </style:style>
    <style:style style:parent-style-name="832" style:display-name="T49" style:family="text" style:name="1232">
      <style:paragraph-properties/>
      <style:text-properties fo:font-family="Symbol" style:font-family-complex="Symbol"/>
    </style:style>
    <style:style style:parent-style-name="832" style:display-name="T50" style:family="text" style:name="1233">
      <style:paragraph-properties/>
      <style:text-properties fo:font-family="Symbol" style:font-family-complex="Symbol"/>
    </style:style>
    <style:style style:parent-style-name="832" style:display-name="T51" style:family="text" style:name="1234">
      <style:paragraph-properties/>
      <style:text-properties fo:font-family="Symbol" style:font-family-complex="Symbol"/>
    </style:style>
    <style:style style:parent-style-name="832" style:display-name="T52" style:family="text" style:name="1235">
      <style:paragraph-properties/>
      <style:text-properties fo:font-family="Symbol" style:font-family-complex="Symbol"/>
    </style:style>
    <style:style style:parent-style-name="832" style:display-name="T53" style:family="text" style:name="1236">
      <style:paragraph-properties/>
      <style:text-properties fo:font-family="Symbol" style:font-family-complex="Symbol"/>
    </style:style>
    <style:style style:parent-style-name="832" style:display-name="T54" style:family="text" style:name="1237">
      <style:paragraph-properties/>
      <style:text-properties fo:font-family="Symbol" style:font-family-complex="Symbol"/>
    </style:style>
    <style:style style:parent-style-name="832" style:display-name="T55" style:family="text" style:name="1238">
      <style:paragraph-properties/>
      <style:text-properties fo:font-family="Symbol" style:font-family-complex="Symbol"/>
    </style:style>
    <style:style style:parent-style-name="832" style:display-name="T56" style:family="text" style:name="1239">
      <style:paragraph-properties/>
      <style:text-properties fo:font-family="Symbol" style:font-family-complex="Symbol"/>
    </style:style>
    <style:style style:parent-style-name="832" style:display-name="T57" style:family="text" style:name="1240">
      <style:paragraph-properties/>
      <style:text-properties fo:font-family="Symbol" style:font-family-complex="Symbol"/>
    </style:style>
    <style:style style:parent-style-name="832" style:display-name="T58" style:family="text" style:name="1241">
      <style:paragraph-properties/>
      <style:text-properties fo:font-family="Symbol" style:font-family-complex="Symbol"/>
    </style:style>
    <style:style style:parent-style-name="832" style:display-name="T59" style:family="text" style:name="1242">
      <style:paragraph-properties/>
      <style:text-properties fo:font-family="Symbol" style:font-family-complex="Symbol"/>
    </style:style>
    <style:style style:parent-style-name="832" style:display-name="T60" style:family="text" style:name="1243">
      <style:paragraph-properties/>
      <style:text-properties fo:font-family="Symbol" style:font-family-complex="Symbol"/>
    </style:style>
    <style:style style:parent-style-name="832" style:display-name="T61" style:family="text" style:name="1244">
      <style:paragraph-properties/>
      <style:text-properties fo:font-family="Symbol" style:font-family-complex="Symbol"/>
    </style:style>
    <style:style style:parent-style-name="832" style:display-name="T62" style:family="text" style:name="1245">
      <style:paragraph-properties/>
      <style:text-properties fo:font-family="Symbol" style:font-family-complex="Symbol"/>
    </style:style>
    <style:style style:parent-style-name="832" style:display-name="T63" style:family="text" style:name="1246">
      <style:paragraph-properties/>
      <style:text-properties fo:font-family="Symbol" style:font-family-complex="Symbol"/>
    </style:style>
    <style:style style:parent-style-name="832" style:display-name="T64" style:family="text" style:name="1247">
      <style:paragraph-properties/>
      <style:text-properties fo:font-family="Symbol" style:font-family-complex="Symbol"/>
    </style:style>
    <style:style style:parent-style-name="832" style:display-name="T65" style:family="text" style:name="1248">
      <style:paragraph-properties/>
      <style:text-properties fo:font-family="Symbol" style:font-family-complex="Symbol"/>
    </style:style>
    <style:style style:parent-style-name="832" style:display-name="T66" style:family="text" style:name="1249">
      <style:paragraph-properties/>
      <style:text-properties fo:font-family="Symbol" style:font-family-complex="Symbol"/>
    </style:style>
    <style:style style:parent-style-name="832" style:display-name="T67" style:family="text" style:name="1250">
      <style:paragraph-properties/>
      <style:text-properties fo:font-family="Symbol" style:font-family-complex="Symbol"/>
    </style:style>
    <style:style style:parent-style-name="832" style:display-name="T68" style:family="text" style:name="1251">
      <style:paragraph-properties/>
      <style:text-properties fo:font-family="Symbol" style:font-family-complex="Symbol"/>
    </style:style>
    <style:style style:parent-style-name="832" style:display-name="T69" style:family="text" style:name="1252">
      <style:paragraph-properties/>
      <style:text-properties fo:font-family="Symbol" style:font-family-complex="Symbol"/>
    </style:style>
    <style:style style:parent-style-name="832" style:display-name="T70" style:family="text" style:name="1253">
      <style:paragraph-properties/>
      <style:text-properties fo:font-family="Symbol" style:font-family-complex="Symbol"/>
    </style:style>
    <style:style style:parent-style-name="832" style:display-name="T71" style:family="text" style:name="1254">
      <style:paragraph-properties/>
      <style:text-properties fo:font-family="Symbol" style:font-family-complex="Symbol"/>
    </style:style>
    <style:style style:parent-style-name="832" style:display-name="T72" style:family="text" style:name="1255">
      <style:paragraph-properties/>
      <style:text-properties fo:font-family="Symbol" style:font-family-complex="Symbol"/>
    </style:style>
    <style:style style:parent-style-name="832" style:display-name="T73" style:family="text" style:name="1256">
      <style:paragraph-properties/>
      <style:text-properties fo:font-family="Symbol" style:font-family-complex="Symbol"/>
    </style:style>
    <style:style style:parent-style-name="832" style:display-name="T74" style:family="text" style:name="1257">
      <style:paragraph-properties/>
      <style:text-properties fo:font-family="OpenSymbol" style:font-family-complex="OpenSymbol"/>
    </style:style>
    <style:style style:parent-style-name="832" style:display-name="T75" style:family="text" style:name="1258">
      <style:paragraph-properties/>
      <style:text-properties fo:font-family="OpenSymbol" style:font-family-complex="OpenSymbol"/>
    </style:style>
    <style:style style:parent-style-name="832" style:display-name="T76" style:family="text" style:name="1259">
      <style:paragraph-properties/>
      <style:text-properties fo:font-family="Symbol" style:font-family-complex="Symbol"/>
    </style:style>
    <style:style style:parent-style-name="832" style:display-name="T77" style:family="text" style:name="1260">
      <style:paragraph-properties/>
      <style:text-properties fo:font-family="OpenSymbol" style:font-family-complex="OpenSymbol"/>
    </style:style>
    <style:style style:parent-style-name="832" style:display-name="T78" style:family="text" style:name="1261">
      <style:paragraph-properties/>
      <style:text-properties fo:font-family="OpenSymbol" style:font-family-complex="OpenSymbol"/>
    </style:style>
    <style:style style:parent-style-name="832" style:display-name="T79" style:family="text" style:name="1262">
      <style:paragraph-properties/>
      <style:text-properties fo:font-family="Symbol" style:font-family-complex="Symbol"/>
    </style:style>
    <style:style style:parent-style-name="832" style:display-name="T80" style:family="text" style:name="1263">
      <style:paragraph-properties/>
      <style:text-properties fo:font-family="OpenSymbol" style:font-family-complex="OpenSymbol"/>
    </style:style>
    <style:style style:parent-style-name="832" style:display-name="T81" style:family="text" style:name="1264">
      <style:paragraph-properties/>
      <style:text-properties fo:font-family="OpenSymbol" style:font-family-complex="OpenSymbol"/>
    </style:style>
    <style:style style:parent-style-name="832" style:display-name="T82" style:family="text" style:name="1265">
      <style:paragraph-properties/>
      <style:text-properties fo:font-family="Symbol" style:font-family-complex="Symbol"/>
    </style:style>
    <style:style style:parent-style-name="832" style:display-name="T83" style:family="text" style:name="1266">
      <style:paragraph-properties/>
      <style:text-properties fo:font-family="Symbol" style:font-family-complex="Symbol"/>
    </style:style>
    <style:style style:parent-style-name="832" style:display-name="T84" style:family="text" style:name="1267">
      <style:paragraph-properties/>
      <style:text-properties fo:font-family="Symbol" style:font-family-complex="Symbol"/>
    </style:style>
    <style:style style:parent-style-name="832" style:display-name="T85" style:family="text" style:name="1268">
      <style:paragraph-properties/>
      <style:text-properties fo:font-family="Symbol" style:font-family-complex="Symbol"/>
    </style:style>
    <style:style style:parent-style-name="832" style:display-name="T86" style:family="text" style:name="1269">
      <style:paragraph-properties/>
      <style:text-properties fo:font-family="Symbol" style:font-family-complex="Symbol"/>
    </style:style>
    <style:style style:parent-style-name="832" style:display-name="T87" style:family="text" style:name="1270">
      <style:paragraph-properties/>
      <style:text-properties fo:font-family="Symbol" style:font-family-complex="Symbol"/>
    </style:style>
    <style:style style:parent-style-name="832" style:display-name="T88" style:family="text" style:name="1271">
      <style:paragraph-properties/>
      <style:text-properties fo:font-family="Symbol" style:font-family-complex="Symbol"/>
    </style:style>
    <style:style style:parent-style-name="832" style:display-name="T89" style:family="text" style:name="1272">
      <style:paragraph-properties/>
      <style:text-properties fo:font-family="Symbol" style:font-family-complex="Symbol"/>
    </style:style>
    <style:style style:parent-style-name="832" style:display-name="T90" style:family="text" style:name="1273">
      <style:paragraph-properties/>
      <style:text-properties fo:font-family="Symbol" style:font-family-complex="Symbol"/>
    </style:style>
    <style:style style:parent-style-name="832" style:display-name="T91" style:family="text" style:name="1274">
      <style:paragraph-properties/>
      <style:text-properties fo:font-family="Symbol" style:font-family-complex="Symbol"/>
    </style:style>
    <style:style style:parent-style-name="832" style:display-name="T92" style:family="text" style:name="1275">
      <style:paragraph-properties/>
      <style:text-properties fo:font-family="Symbol" style:font-family-complex="Symbol"/>
    </style:style>
    <style:style style:parent-style-name="832" style:display-name="T93" style:family="text" style:name="1276">
      <style:paragraph-properties/>
      <style:text-properties fo:font-family="Symbol" style:font-family-complex="Symbol"/>
    </style:style>
    <style:style style:parent-style-name="832" style:display-name="T94" style:family="text" style:name="1277">
      <style:paragraph-properties/>
      <style:text-properties fo:font-family="Symbol" style:font-family-complex="Symbol"/>
    </style:style>
    <style:style style:parent-style-name="832" style:display-name="T95" style:family="text" style:name="1278">
      <style:paragraph-properties/>
      <style:text-properties fo:font-family="Symbol" style:font-family-complex="Symbol"/>
    </style:style>
    <style:style style:parent-style-name="832" style:display-name="T96" style:family="text" style:name="1279">
      <style:paragraph-properties/>
      <style:text-properties fo:font-family="Symbol" style:font-family-complex="Symbol"/>
    </style:style>
    <style:style style:parent-style-name="832" style:display-name="T97" style:family="text" style:name="1280">
      <style:paragraph-properties/>
      <style:text-properties fo:font-family="Symbol" style:font-family-complex="Symbol"/>
    </style:style>
    <style:style style:parent-style-name="832" style:display-name="T98" style:family="text" style:name="1281">
      <style:paragraph-properties/>
      <style:text-properties fo:font-family="Symbol" style:font-family-complex="Symbol"/>
    </style:style>
    <style:style style:parent-style-name="832" style:display-name="T99" style:family="text" style:name="1282">
      <style:paragraph-properties/>
      <style:text-properties fo:font-family="Symbol" style:font-family-complex="Symbol"/>
    </style:style>
    <style:style style:parent-style-name="832" style:display-name="T100" style:family="text" style:name="1283">
      <style:paragraph-properties/>
      <style:text-properties fo:font-family="Symbol" style:font-family-complex="Symbol"/>
    </style:style>
    <style:style style:parent-style-name="832" style:display-name="T101" style:family="text" style:name="1284">
      <style:paragraph-properties/>
      <style:text-properties fo:font-family="OpenSymbol" style:font-family-complex="OpenSymbol"/>
    </style:style>
    <style:style style:parent-style-name="832" style:display-name="T102" style:family="text" style:name="1285">
      <style:paragraph-properties/>
      <style:text-properties fo:font-family="OpenSymbol" style:font-family-complex="OpenSymbol"/>
    </style:style>
    <style:style style:parent-style-name="832" style:display-name="T103" style:family="text" style:name="1286">
      <style:paragraph-properties/>
      <style:text-properties fo:font-family="Symbol" style:font-family-complex="Symbol"/>
    </style:style>
    <style:style style:parent-style-name="832" style:display-name="T104" style:family="text" style:name="1287">
      <style:paragraph-properties/>
      <style:text-properties fo:font-family="OpenSymbol" style:font-family-complex="OpenSymbol"/>
    </style:style>
    <style:style style:parent-style-name="832" style:display-name="T105" style:family="text" style:name="1288">
      <style:paragraph-properties/>
      <style:text-properties fo:font-family="OpenSymbol" style:font-family-complex="OpenSymbol"/>
    </style:style>
    <style:style style:parent-style-name="832" style:display-name="T106" style:family="text" style:name="1289">
      <style:paragraph-properties/>
      <style:text-properties fo:font-family="Symbol" style:font-family-complex="Symbol"/>
    </style:style>
    <style:style style:parent-style-name="832" style:display-name="T107" style:family="text" style:name="1290">
      <style:paragraph-properties/>
      <style:text-properties fo:font-family="OpenSymbol" style:font-family-complex="OpenSymbol"/>
    </style:style>
    <style:style style:parent-style-name="832" style:display-name="T108" style:family="text" style:name="1291">
      <style:paragraph-properties/>
      <style:text-properties fo:font-family="OpenSymbol" style:font-family-complex="OpenSymbol"/>
    </style:style>
    <style:style style:parent-style-name="832" style:display-name="T109" style:family="text" style:name="1292">
      <style:paragraph-properties/>
      <style:text-properties fo:font-family="Symbol" style:font-family-complex="Symbol"/>
    </style:style>
    <style:style style:parent-style-name="832" style:display-name="T110" style:family="text" style:name="1293">
      <style:paragraph-properties/>
      <style:text-properties fo:font-family="Symbol" style:font-family-complex="Symbol"/>
    </style:style>
    <style:style style:parent-style-name="832" style:display-name="T111" style:family="text" style:name="1294">
      <style:paragraph-properties/>
      <style:text-properties fo:font-family="Symbol" style:font-family-complex="Symbol"/>
    </style:style>
    <style:style style:parent-style-name="832" style:display-name="T112" style:family="text" style:name="1295">
      <style:paragraph-properties/>
      <style:text-properties fo:font-family="Symbol" style:font-family-complex="Symbol"/>
    </style:style>
    <style:style style:parent-style-name="832" style:display-name="T113" style:family="text" style:name="1296">
      <style:paragraph-properties/>
      <style:text-properties fo:font-family="Symbol" style:font-family-complex="Symbol"/>
    </style:style>
    <style:style style:parent-style-name="832" style:display-name="T114" style:family="text" style:name="1297">
      <style:paragraph-properties/>
      <style:text-properties fo:font-family="Symbol" style:font-family-complex="Symbol"/>
    </style:style>
    <style:style style:parent-style-name="832" style:display-name="T115" style:family="text" style:name="1298">
      <style:paragraph-properties/>
      <style:text-properties fo:font-family="Symbol" style:font-family-complex="Symbol"/>
    </style:style>
    <style:style style:parent-style-name="832" style:display-name="T116" style:family="text" style:name="1299">
      <style:paragraph-properties/>
      <style:text-properties fo:font-family="Symbol" style:font-family-complex="Symbol"/>
    </style:style>
    <style:style style:parent-style-name="832" style:display-name="T117" style:family="text" style:name="1300">
      <style:paragraph-properties/>
      <style:text-properties fo:font-family="Symbol" style:font-family-complex="Symbol"/>
    </style:style>
    <style:style style:parent-style-name="832" style:display-name="T118" style:family="text" style:name="1301">
      <style:paragraph-properties/>
      <style:text-properties fo:font-family="Symbol" style:font-family-complex="Symbol"/>
    </style:style>
    <style:style style:parent-style-name="832" style:display-name="T119" style:family="text" style:name="1302">
      <style:paragraph-properties/>
      <style:text-properties fo:font-family="Symbol" style:font-family-complex="Symbol"/>
    </style:style>
    <style:style style:parent-style-name="832" style:display-name="T120" style:family="text" style:name="1303">
      <style:paragraph-properties/>
      <style:text-properties fo:font-family="Symbol" style:font-family-complex="Symbol"/>
    </style:style>
    <style:style style:parent-style-name="832" style:display-name="T121" style:family="text" style:name="1304">
      <style:paragraph-properties/>
      <style:text-properties fo:font-family="Symbol" style:font-family-complex="Symbol"/>
    </style:style>
    <style:style style:parent-style-name="832" style:display-name="T122" style:family="text" style:name="1305">
      <style:paragraph-properties/>
      <style:text-properties fo:font-family="Symbol" style:font-family-complex="Symbol"/>
    </style:style>
    <style:style style:parent-style-name="832" style:display-name="T123" style:family="text" style:name="1306">
      <style:paragraph-properties/>
      <style:text-properties fo:font-family="Symbol" style:font-family-complex="Symbol"/>
    </style:style>
    <style:style style:parent-style-name="832" style:display-name="T124" style:family="text" style:name="1307">
      <style:paragraph-properties/>
      <style:text-properties fo:font-family="Symbol" style:font-family-complex="Symbol"/>
    </style:style>
    <style:style style:parent-style-name="832" style:display-name="T125" style:family="text" style:name="1308">
      <style:paragraph-properties/>
      <style:text-properties fo:font-family="Symbol" style:font-family-complex="Symbol"/>
    </style:style>
    <style:style style:parent-style-name="832" style:display-name="T126" style:family="text" style:name="1309">
      <style:paragraph-properties/>
      <style:text-properties fo:font-family="Symbol" style:font-family-complex="Symbol"/>
    </style:style>
    <style:style style:parent-style-name="832" style:display-name="T127" style:family="text" style:name="1310">
      <style:paragraph-properties/>
      <style:text-properties fo:font-family="Symbol" style:font-family-complex="Symbol"/>
    </style:style>
    <style:style style:parent-style-name="832" style:display-name="T128" style:family="text" style:name="1311">
      <style:paragraph-properties/>
      <style:text-properties fo:font-family="Symbol" style:font-family-complex="Symbol"/>
    </style:style>
    <style:style style:parent-style-name="832" style:display-name="T129" style:family="text" style:name="1312">
      <style:paragraph-properties/>
      <style:text-properties fo:font-family="Symbol" style:font-family-complex="Symbol"/>
    </style:style>
    <style:style style:parent-style-name="832" style:display-name="T130" style:family="text" style:name="1313">
      <style:paragraph-properties/>
      <style:text-properties fo:font-family="Symbol" style:font-family-complex="Symbol"/>
    </style:style>
    <style:style style:parent-style-name="832" style:display-name="T131" style:family="text" style:name="1314">
      <style:paragraph-properties/>
      <style:text-properties fo:font-family="Symbol" style:font-family-complex="Symbol"/>
    </style:style>
    <style:style style:parent-style-name="832" style:display-name="T132" style:family="text" style:name="1315">
      <style:paragraph-properties/>
      <style:text-properties fo:font-family="Symbol" style:font-family-complex="Symbol"/>
    </style:style>
    <style:style style:parent-style-name="832" style:display-name="T133" style:family="text" style:name="1316">
      <style:paragraph-properties/>
      <style:text-properties fo:font-family="Symbol" style:font-family-complex="Symbol"/>
    </style:style>
    <style:style style:parent-style-name="832" style:display-name="T134" style:family="text" style:name="1317">
      <style:paragraph-properties/>
      <style:text-properties fo:font-family="Symbol" style:font-family-complex="Symbol"/>
    </style:style>
    <style:style style:parent-style-name="832" style:display-name="T135" style:family="text" style:name="1318">
      <style:paragraph-properties/>
      <style:text-properties fo:font-family="Symbol" style:font-family-complex="Symbol"/>
    </style:style>
    <style:style style:parent-style-name="832" style:display-name="T136" style:family="text" style:name="1319">
      <style:paragraph-properties/>
      <style:text-properties fo:font-family="Symbol" style:font-family-complex="Symbol"/>
    </style:style>
    <style:style style:parent-style-name="832" style:display-name="T137" style:family="text" style:name="1320">
      <style:paragraph-properties/>
      <style:text-properties fo:font-family="Symbol" style:font-family-complex="Symbol"/>
    </style:style>
    <style:style style:parent-style-name="832" style:display-name="T138" style:family="text" style:name="1321">
      <style:paragraph-properties/>
      <style:text-properties fo:font-family="Symbol" style:font-family-complex="Symbol"/>
    </style:style>
    <style:style style:parent-style-name="832" style:display-name="T139" style:family="text" style:name="1322">
      <style:paragraph-properties/>
      <style:text-properties fo:font-family="Symbol" style:font-family-complex="Symbol"/>
    </style:style>
    <style:style style:parent-style-name="832" style:display-name="T140" style:family="text" style:name="1323">
      <style:paragraph-properties/>
      <style:text-properties fo:font-family="Symbol" style:font-family-complex="Symbol"/>
    </style:style>
    <style:style style:parent-style-name="832" style:display-name="T141" style:family="text" style:name="1324">
      <style:paragraph-properties/>
      <style:text-properties fo:font-family="Symbol" style:font-family-complex="Symbol"/>
    </style:style>
    <style:style style:parent-style-name="832" style:display-name="T142" style:family="text" style:name="1325">
      <style:paragraph-properties/>
      <style:text-properties fo:font-family="Symbol" style:font-family-complex="Symbol"/>
    </style:style>
    <style:style style:parent-style-name="832" style:display-name="T143" style:family="text" style:name="1326">
      <style:paragraph-properties/>
      <style:text-properties fo:font-family="Symbol" style:font-family-complex="Symbol"/>
    </style:style>
    <style:style style:parent-style-name="832" style:display-name="T144" style:family="text" style:name="1327">
      <style:paragraph-properties/>
      <style:text-properties fo:font-family="Symbol" style:font-family-complex="Symbol"/>
    </style:style>
    <style:style style:parent-style-name="832" style:display-name="T145" style:family="text" style:name="1328">
      <style:paragraph-properties/>
      <style:text-properties fo:font-family="Symbol" style:font-family-complex="Symbol"/>
    </style:style>
    <style:style style:parent-style-name="832" style:display-name="T146" style:family="text" style:name="1329">
      <style:paragraph-properties/>
      <style:text-properties fo:font-family="Symbol" style:font-family-complex="Symbol"/>
    </style:style>
    <style:style style:parent-style-name="832" style:display-name="T147" style:family="text" style:name="1330">
      <style:paragraph-properties/>
      <style:text-properties fo:font-family="Symbol" style:font-family-complex="Symbol"/>
    </style:style>
    <style:style style:parent-style-name="832" style:display-name="T148" style:family="text" style:name="1331">
      <style:paragraph-properties/>
      <style:text-properties fo:font-family="Symbol" style:font-family-complex="Symbol"/>
    </style:style>
    <style:style style:parent-style-name="832" style:display-name="T149" style:family="text" style:name="1332">
      <style:paragraph-properties/>
      <style:text-properties fo:font-family="Symbol" style:font-family-complex="Symbol"/>
    </style:style>
    <style:style style:parent-style-name="832" style:display-name="T150" style:family="text" style:name="1333">
      <style:paragraph-properties/>
      <style:text-properties fo:font-family="Symbol" style:font-family-complex="Symbol"/>
    </style:style>
    <style:style style:parent-style-name="832" style:display-name="T151" style:family="text" style:name="1334">
      <style:paragraph-properties/>
      <style:text-properties fo:font-family="Symbol" style:font-family-complex="Symbol"/>
    </style:style>
    <style:style style:parent-style-name="832" style:display-name="T152" style:family="text" style:name="1335">
      <style:paragraph-properties/>
      <style:text-properties fo:font-family="Symbol" style:font-family-complex="Symbol"/>
    </style:style>
    <style:style style:parent-style-name="832" style:display-name="T153" style:family="text" style:name="1336">
      <style:paragraph-properties/>
      <style:text-properties fo:font-family="Symbol" style:font-family-complex="Symbol"/>
    </style:style>
    <style:style style:parent-style-name="832" style:display-name="T154" style:family="text" style:name="1337">
      <style:paragraph-properties/>
      <style:text-properties fo:font-family="Symbol" style:font-family-complex="Symbol"/>
    </style:style>
    <style:style style:parent-style-name="832" style:display-name="T155" style:family="text" style:name="1338">
      <style:paragraph-properties/>
      <style:text-properties fo:font-family="Symbol" style:font-family-complex="Symbol"/>
    </style:style>
    <style:style style:parent-style-name="832" style:display-name="T156" style:family="text" style:name="1339">
      <style:paragraph-properties/>
      <style:text-properties fo:font-family="Symbol" style:font-family-complex="Symbol"/>
    </style:style>
    <style:style style:parent-style-name="832" style:display-name="T157" style:family="text" style:name="1340">
      <style:paragraph-properties/>
      <style:text-properties fo:font-family="Symbol" style:font-family-complex="Symbol"/>
    </style:style>
    <style:style style:parent-style-name="832" style:display-name="T158" style:family="text" style:name="1341">
      <style:paragraph-properties/>
      <style:text-properties fo:font-family="Symbol" style:font-family-complex="Symbol"/>
    </style:style>
    <style:style style:parent-style-name="832" style:display-name="T159" style:family="text" style:name="1342">
      <style:paragraph-properties/>
      <style:text-properties fo:font-family="Symbol" style:font-family-complex="Symbol"/>
    </style:style>
    <style:style style:parent-style-name="832" style:display-name="T160" style:family="text" style:name="1343">
      <style:paragraph-properties/>
      <style:text-properties fo:font-family="Symbol" style:font-family-complex="Symbol"/>
    </style:style>
    <style:style style:parent-style-name="832" style:display-name="T161" style:family="text" style:name="1344">
      <style:paragraph-properties/>
      <style:text-properties fo:font-family="Symbol" style:font-family-complex="Symbol"/>
    </style:style>
    <style:style style:parent-style-name="832" style:display-name="T162" style:family="text" style:name="1345">
      <style:paragraph-properties/>
      <style:text-properties fo:font-family="Symbol" style:font-family-complex="Symbol"/>
    </style:style>
    <style:style style:parent-style-name="832" style:display-name="T163" style:family="text" style:name="1346">
      <style:paragraph-properties/>
      <style:text-properties fo:font-family="Symbol" style:font-family-complex="Symbol"/>
    </style:style>
    <style:style style:parent-style-name="832" style:display-name="T164" style:family="text" style:name="1347">
      <style:paragraph-properties/>
      <style:text-properties fo:font-family="Symbol" style:font-family-complex="Symbol"/>
    </style:style>
    <style:style style:parent-style-name="832" style:display-name="T165" style:family="text" style:name="1348">
      <style:paragraph-properties/>
      <style:text-properties fo:font-family="Symbol" style:font-family-complex="Symbol"/>
    </style:style>
    <style:style style:parent-style-name="832" style:display-name="T166" style:family="text" style:name="1349">
      <style:paragraph-properties/>
      <style:text-properties fo:font-family="Symbol" style:font-family-complex="Symbol"/>
    </style:style>
    <style:style style:parent-style-name="832" style:display-name="T167" style:family="text" style:name="1350">
      <style:paragraph-properties/>
      <style:text-properties fo:font-family="Symbol" style:font-family-complex="Symbol"/>
    </style:style>
    <style:style style:parent-style-name="832" style:display-name="T168" style:family="text" style:name="1351">
      <style:paragraph-properties/>
      <style:text-properties fo:font-family="Symbol" style:font-family-complex="Symbol"/>
    </style:style>
    <style:style style:parent-style-name="832" style:display-name="T169" style:family="text" style:name="1352">
      <style:paragraph-properties/>
      <style:text-properties fo:font-family="Symbol" style:font-family-complex="Symbol"/>
    </style:style>
    <style:style style:parent-style-name="832" style:display-name="T170" style:family="text" style:name="1353">
      <style:paragraph-properties/>
      <style:text-properties fo:font-family="Symbol" style:font-family-complex="Symbol"/>
    </style:style>
    <style:style style:parent-style-name="832" style:display-name="T171" style:family="text" style:name="1354">
      <style:paragraph-properties/>
      <style:text-properties fo:font-family="Symbol" style:font-family-complex="Symbol"/>
    </style:style>
    <style:style style:parent-style-name="832" style:display-name="T172" style:family="text" style:name="1355">
      <style:paragraph-properties/>
      <style:text-properties fo:font-family="Symbol" style:font-family-complex="Symbol"/>
    </style:style>
    <style:style style:parent-style-name="832" style:display-name="T173" style:family="text" style:name="1356">
      <style:paragraph-properties/>
      <style:text-properties fo:font-family="Symbol" style:font-family-complex="Symbol"/>
    </style:style>
    <style:style style:parent-style-name="832" style:display-name="T174" style:family="text" style:name="1357">
      <style:paragraph-properties/>
      <style:text-properties fo:font-family="Symbol" style:font-family-complex="Symbol"/>
    </style:style>
    <style:style style:parent-style-name="832" style:display-name="T175" style:family="text" style:name="1358">
      <style:paragraph-properties/>
      <style:text-properties fo:font-family="Symbol" style:font-family-complex="Symbol"/>
    </style:style>
    <style:style style:parent-style-name="832" style:display-name="T176" style:family="text" style:name="1359">
      <style:paragraph-properties/>
      <style:text-properties fo:font-family="Symbol" style:font-family-complex="Symbol"/>
    </style:style>
    <style:style style:parent-style-name="832" style:display-name="T177" style:family="text" style:name="1360">
      <style:paragraph-properties/>
      <style:text-properties fo:font-family="Symbol" style:font-family-complex="Symbol"/>
    </style:style>
    <style:style style:parent-style-name="832" style:display-name="T178" style:family="text" style:name="1361">
      <style:paragraph-properties/>
      <style:text-properties fo:font-family="Symbol" style:font-family-complex="Symbol"/>
    </style:style>
    <style:style style:parent-style-name="832" style:display-name="T179" style:family="text" style:name="1362">
      <style:paragraph-properties/>
      <style:text-properties fo:font-family="Symbol" style:font-family-complex="Symbol"/>
    </style:style>
    <style:style style:parent-style-name="832" style:display-name="T180" style:family="text" style:name="1363">
      <style:paragraph-properties/>
      <style:text-properties fo:font-family="Symbol" style:font-family-complex="Symbol"/>
    </style:style>
    <style:style style:parent-style-name="832" style:display-name="T181" style:family="text" style:name="1364">
      <style:paragraph-properties/>
      <style:text-properties fo:font-family="Symbol" style:font-family-complex="Symbol"/>
    </style:style>
    <style:style style:parent-style-name="832" style:display-name="T182" style:family="text" style:name="1365">
      <style:paragraph-properties/>
      <style:text-properties fo:font-family="Symbol" style:font-family-complex="Symbol"/>
    </style:style>
    <style:style style:parent-style-name="832" style:display-name="T183" style:family="text" style:name="1366">
      <style:paragraph-properties/>
      <style:text-properties fo:font-family="Symbol" style:font-family-complex="Symbol"/>
    </style:style>
    <style:style style:parent-style-name="832" style:display-name="T184" style:family="text" style:name="1367">
      <style:paragraph-properties/>
      <style:text-properties fo:font-family="Symbol" style:font-family-complex="Symbol"/>
    </style:style>
    <style:style style:parent-style-name="832" style:display-name="T185" style:family="text" style:name="1368">
      <style:paragraph-properties/>
      <style:text-properties fo:font-family="Symbol" style:font-family-complex="Symbol"/>
    </style:style>
    <style:style style:parent-style-name="832" style:display-name="T186" style:family="text" style:name="1369">
      <style:paragraph-properties/>
      <style:text-properties fo:font-family="Symbol" style:font-family-complex="Symbol"/>
    </style:style>
    <style:style style:parent-style-name="832" style:display-name="T187" style:family="text" style:name="1370">
      <style:paragraph-properties/>
      <style:text-properties fo:font-family="Symbol" style:font-family-complex="Symbol"/>
    </style:style>
    <style:style style:parent-style-name="832" style:display-name="T188" style:family="text" style:name="1371">
      <style:paragraph-properties/>
      <style:text-properties fo:font-family="Symbol" style:font-family-complex="Symbol"/>
    </style:style>
    <style:style style:parent-style-name="832" style:display-name="T189" style:family="text" style:name="1372">
      <style:paragraph-properties/>
      <style:text-properties fo:font-family="Symbol" style:font-family-complex="Symbol"/>
    </style:style>
    <style:style style:parent-style-name="832" style:display-name="T190" style:family="text" style:name="1373">
      <style:paragraph-properties/>
      <style:text-properties fo:font-family="Symbol" style:font-family-complex="Symbol"/>
    </style:style>
    <style:style style:parent-style-name="832" style:display-name="T191" style:family="text" style:name="1374">
      <style:paragraph-properties/>
      <style:text-properties fo:font-family="Symbol" style:font-family-complex="Symbol"/>
    </style:style>
    <style:style style:parent-style-name="832" style:display-name="T192" style:family="text" style:name="1375">
      <style:paragraph-properties/>
      <style:text-properties fo:font-family="Symbol" style:font-family-complex="Symbol"/>
    </style:style>
    <style:style style:parent-style-name="832" style:display-name="T193" style:family="text" style:name="1376">
      <style:paragraph-properties/>
      <style:text-properties fo:font-family="Symbol" style:font-family-complex="Symbol"/>
    </style:style>
    <style:style style:parent-style-name="832" style:display-name="T194" style:family="text" style:name="1377">
      <style:paragraph-properties/>
      <style:text-properties fo:font-family="Symbol" style:font-family-complex="Symbol"/>
    </style:style>
    <style:style style:parent-style-name="832" style:display-name="T195" style:family="text" style:name="1378">
      <style:paragraph-properties/>
      <style:text-properties fo:font-family="Symbol" style:font-family-complex="Symbol"/>
    </style:style>
    <style:style style:parent-style-name="832" style:display-name="T196" style:family="text" style:name="1379">
      <style:paragraph-properties/>
      <style:text-properties fo:font-family="Symbol" style:font-family-complex="Symbol"/>
    </style:style>
    <style:style style:parent-style-name="832" style:display-name="T197" style:family="text" style:name="1380">
      <style:paragraph-properties/>
      <style:text-properties fo:font-family="Symbol" style:font-family-complex="Symbol"/>
    </style:style>
    <style:style style:parent-style-name="832" style:display-name="T198" style:family="text" style:name="1381">
      <style:paragraph-properties/>
      <style:text-properties fo:font-family="Symbol" style:font-family-complex="Symbol"/>
    </style:style>
    <style:style style:parent-style-name="832" style:display-name="T199" style:family="text" style:name="1382">
      <style:paragraph-properties/>
      <style:text-properties fo:font-family="Symbol" style:font-family-complex="Symbol"/>
    </style:style>
    <style:style style:parent-style-name="832" style:display-name="T200" style:family="text" style:name="1383">
      <style:paragraph-properties/>
      <style:text-properties fo:font-family="Symbol" style:font-family-complex="Symbol"/>
    </style:style>
    <style:style style:parent-style-name="832" style:display-name="T201" style:family="text" style:name="1384">
      <style:paragraph-properties/>
      <style:text-properties fo:font-family="Symbol" style:font-family-complex="Symbol"/>
    </style:style>
    <style:style style:parent-style-name="832" style:display-name="T202" style:family="text" style:name="1385">
      <style:paragraph-properties/>
      <style:text-properties fo:font-family="Symbol" style:font-family-complex="Symbol"/>
    </style:style>
    <style:style style:parent-style-name="832" style:display-name="T203" style:family="text" style:name="1386">
      <style:paragraph-properties/>
      <style:text-properties fo:font-family="Symbol" style:font-family-complex="Symbol"/>
    </style:style>
    <style:style style:parent-style-name="832" style:display-name="T204" style:family="text" style:name="1387">
      <style:paragraph-properties/>
      <style:text-properties fo:font-family="Symbol" style:font-family-complex="Symbol"/>
    </style:style>
    <style:style style:parent-style-name="832" style:display-name="T205" style:family="text" style:name="1388">
      <style:paragraph-properties/>
      <style:text-properties fo:font-family="Symbol" style:font-family-complex="Symbol"/>
    </style:style>
    <style:style style:parent-style-name="832" style:display-name="T206" style:family="text" style:name="1389">
      <style:paragraph-properties/>
      <style:text-properties fo:font-family="Symbol" style:font-family-complex="Symbol"/>
    </style:style>
    <style:style style:parent-style-name="832" style:display-name="T207" style:family="text" style:name="1390">
      <style:paragraph-properties/>
      <style:text-properties fo:font-family="Symbol" style:font-family-complex="Symbol"/>
    </style:style>
    <style:style style:parent-style-name="832" style:display-name="T208" style:family="text" style:name="1391">
      <style:paragraph-properties/>
      <style:text-properties fo:font-family="Symbol" style:font-family-complex="Symbol"/>
    </style:style>
    <style:style style:parent-style-name="832" style:display-name="T209" style:family="text" style:name="1392">
      <style:paragraph-properties/>
    </style:style>
    <style:style style:parent-style-name="832" style:display-name="T210" style:family="text" style:name="1393">
      <style:paragraph-properties/>
    </style:style>
    <style:style style:parent-style-name="832" style:display-name="T211" style:family="text" style:name="1394">
      <style:paragraph-properties/>
    </style:style>
    <style:style style:parent-style-name="832" style:display-name="T212" style:family="text" style:name="1395">
      <style:paragraph-properties/>
    </style:style>
    <style:style style:parent-style-name="832" style:display-name="T213" style:family="text" style:name="1396">
      <style:paragraph-properties/>
    </style:style>
    <style:style style:parent-style-name="832" style:display-name="T214" style:family="text" style:name="1397">
      <style:paragraph-properties/>
    </style:style>
    <style:style style:parent-style-name="832" style:display-name="T215" style:family="text" style:name="1398">
      <style:paragraph-properties/>
    </style:style>
    <style:style style:parent-style-name="832" style:display-name="T216" style:family="text" style:name="1399">
      <style:paragraph-properties/>
    </style:style>
    <style:style style:parent-style-name="832" style:display-name="T217" style:family="text" style:name="1400">
      <style:paragraph-properties/>
      <style:text-properties fo:font-family="Symbol" style:font-family-complex="Symbol"/>
    </style:style>
    <style:style style:parent-style-name="832" style:display-name="T218" style:family="text" style:name="1401">
      <style:paragraph-properties/>
    </style:style>
    <style:style style:parent-style-name="832" style:display-name="T219" style:family="text" style:name="1402">
      <style:paragraph-properties/>
    </style:style>
    <style:style style:parent-style-name="832" style:display-name="T220" style:family="text" style:name="1403">
      <style:paragraph-properties/>
    </style:style>
    <style:style style:parent-style-name="832" style:display-name="T221" style:family="text" style:name="1404">
      <style:paragraph-properties/>
    </style:style>
    <style:style style:parent-style-name="832" style:display-name="T222" style:family="text" style:name="1405">
      <style:paragraph-properties/>
    </style:style>
    <style:style style:parent-style-name="832" style:display-name="T223" style:family="text" style:name="1406">
      <style:paragraph-properties/>
    </style:style>
    <style:style style:parent-style-name="832" style:display-name="T224" style:family="text" style:name="1407">
      <style:paragraph-properties/>
    </style:style>
    <style:style style:parent-style-name="832" style:display-name="T225" style:family="text" style:name="1408">
      <style:paragraph-properties/>
    </style:style>
    <style:style style:parent-style-name="832" style:display-name="T226" style:family="text" style:name="1409">
      <style:paragraph-properties/>
      <style:text-properties fo:font-family="Symbol" style:font-family-complex="Symbol"/>
    </style:style>
    <style:style style:parent-style-name="832" style:display-name="T227" style:family="text" style:name="1410">
      <style:paragraph-properties/>
    </style:style>
    <style:style style:parent-style-name="832" style:display-name="T228" style:family="text" style:name="1411">
      <style:paragraph-properties/>
    </style:style>
    <style:style style:parent-style-name="832" style:display-name="T229" style:family="text" style:name="1412">
      <style:paragraph-properties/>
    </style:style>
    <style:style style:parent-style-name="832" style:display-name="T230" style:family="text" style:name="1413">
      <style:paragraph-properties/>
    </style:style>
    <style:style style:parent-style-name="832" style:display-name="T231" style:family="text" style:name="1414">
      <style:paragraph-properties/>
    </style:style>
    <style:style style:parent-style-name="832" style:display-name="T232" style:family="text" style:name="1415">
      <style:paragraph-properties/>
    </style:style>
    <style:style style:parent-style-name="832" style:display-name="T233" style:family="text" style:name="1416">
      <style:paragraph-properties/>
    </style:style>
    <style:style style:parent-style-name="832" style:display-name="T234" style:family="text" style:name="1417">
      <style:paragraph-properties/>
    </style:style>
    <style:style style:parent-style-name="832" style:display-name="T235" style:family="text" style:name="1418">
      <style:paragraph-properties/>
      <style:text-properties fo:font-family="Symbol" style:font-family-complex="Symbol"/>
    </style:style>
    <style:style style:parent-style-name="832" style:display-name="T236" style:family="text" style:name="1419">
      <style:paragraph-properties/>
      <style:text-properties fo:font-family="OpenSymbol" style:font-family-complex="OpenSymbol"/>
    </style:style>
    <style:style style:parent-style-name="832" style:display-name="T237" style:family="text" style:name="1420">
      <style:paragraph-properties/>
      <style:text-properties fo:font-family="OpenSymbol" style:font-family-complex="OpenSymbol"/>
    </style:style>
    <style:style style:parent-style-name="832" style:display-name="T238" style:family="text" style:name="1421">
      <style:paragraph-properties/>
      <style:text-properties fo:font-family="Symbol" style:font-family-complex="Symbol"/>
    </style:style>
    <style:style style:parent-style-name="832" style:display-name="T239" style:family="text" style:name="1422">
      <style:paragraph-properties/>
      <style:text-properties fo:font-family="OpenSymbol" style:font-family-complex="OpenSymbol"/>
    </style:style>
    <style:style style:parent-style-name="832" style:display-name="T240" style:family="text" style:name="1423">
      <style:paragraph-properties/>
      <style:text-properties fo:font-family="OpenSymbol" style:font-family-complex="OpenSymbol"/>
    </style:style>
    <style:style style:parent-style-name="832" style:display-name="T241" style:family="text" style:name="1424">
      <style:paragraph-properties/>
      <style:text-properties fo:font-family="Symbol" style:font-family-complex="Symbol"/>
    </style:style>
    <style:style style:parent-style-name="832" style:display-name="T242" style:family="text" style:name="1425">
      <style:paragraph-properties/>
      <style:text-properties fo:font-family="OpenSymbol" style:font-family-complex="OpenSymbol"/>
    </style:style>
    <style:style style:parent-style-name="832" style:display-name="T243" style:family="text" style:name="1426">
      <style:paragraph-properties/>
      <style:text-properties fo:font-family="OpenSymbol" style:font-family-complex="OpenSymbol"/>
    </style:style>
    <style:style style:parent-style-name="832" style:display-name="T244" style:family="text" style:name="1427">
      <style:paragraph-properties/>
      <style:text-properties fo:font-family="Symbol" style:font-family-complex="Symbol"/>
    </style:style>
    <style:style style:parent-style-name="832" style:display-name="T245" style:family="text" style:name="1428">
      <style:paragraph-properties/>
      <style:text-properties fo:font-family="OpenSymbol" style:font-family-complex="OpenSymbol"/>
    </style:style>
    <style:style style:parent-style-name="832" style:display-name="T246" style:family="text" style:name="1429">
      <style:paragraph-properties/>
      <style:text-properties fo:font-family="OpenSymbol" style:font-family-complex="OpenSymbol"/>
    </style:style>
    <style:style style:parent-style-name="832" style:display-name="T247" style:family="text" style:name="1430">
      <style:paragraph-properties/>
      <style:text-properties fo:font-family="Symbol" style:font-family-complex="Symbol"/>
    </style:style>
    <style:style style:parent-style-name="832" style:display-name="T248" style:family="text" style:name="1431">
      <style:paragraph-properties/>
      <style:text-properties fo:font-family="OpenSymbol" style:font-family-complex="OpenSymbol"/>
    </style:style>
    <style:style style:parent-style-name="832" style:display-name="T249" style:family="text" style:name="1432">
      <style:paragraph-properties/>
      <style:text-properties fo:font-family="OpenSymbol" style:font-family-complex="OpenSymbol"/>
    </style:style>
    <style:style style:parent-style-name="832" style:display-name="T250" style:family="text" style:name="1433">
      <style:paragraph-properties/>
      <style:text-properties fo:font-family="Symbol" style:font-family-complex="Symbol"/>
    </style:style>
    <style:style style:parent-style-name="832" style:display-name="T251" style:family="text" style:name="1434">
      <style:paragraph-properties/>
      <style:text-properties fo:font-family="OpenSymbol" style:font-family-complex="OpenSymbol"/>
    </style:style>
    <style:style style:parent-style-name="832" style:display-name="T252" style:family="text" style:name="1435">
      <style:paragraph-properties/>
      <style:text-properties fo:font-family="OpenSymbol" style:font-family-complex="OpenSymbol"/>
    </style:style>
    <style:style style:parent-style-name="832" style:display-name="T253" style:family="text" style:name="1436">
      <style:paragraph-properties/>
    </style:style>
    <style:style style:parent-style-name="832" style:display-name="T254" style:family="text" style:name="1437">
      <style:paragraph-properties/>
    </style:style>
    <style:style style:parent-style-name="832" style:display-name="T255" style:family="text" style:name="1438">
      <style:paragraph-properties/>
    </style:style>
    <style:style style:parent-style-name="832" style:display-name="T256" style:family="text" style:name="1439">
      <style:paragraph-properties/>
    </style:style>
    <style:style style:parent-style-name="832" style:display-name="T257" style:family="text" style:name="1440">
      <style:paragraph-properties/>
    </style:style>
    <style:style style:parent-style-name="832" style:display-name="T258" style:family="text" style:name="1441">
      <style:paragraph-properties/>
    </style:style>
    <style:style style:parent-style-name="832" style:display-name="T259" style:family="text" style:name="1442">
      <style:paragraph-properties/>
    </style:style>
    <style:style style:parent-style-name="832" style:display-name="T260" style:family="text" style:name="1443">
      <style:paragraph-properties/>
    </style:style>
    <style:style style:parent-style-name="832" style:display-name="T261" style:family="text" style:name="1444">
      <style:paragraph-properties/>
    </style:style>
    <style:style style:parent-style-name="832" style:display-name="T262" style:family="text" style:name="1445">
      <style:paragraph-properties/>
    </style:style>
    <style:style style:parent-style-name="832" style:display-name="T263" style:family="text" style:name="1446">
      <style:paragraph-properties/>
    </style:style>
    <style:style style:parent-style-name="832" style:display-name="T264" style:family="text" style:name="1447">
      <style:paragraph-properties/>
    </style:style>
    <style:style style:parent-style-name="832" style:display-name="T265" style:family="text" style:name="1448">
      <style:paragraph-properties/>
    </style:style>
    <style:style style:parent-style-name="832" style:display-name="T266" style:family="text" style:name="1449">
      <style:paragraph-properties/>
    </style:style>
    <style:style style:parent-style-name="832" style:display-name="T267" style:family="text" style:name="1450">
      <style:paragraph-properties/>
    </style:style>
    <style:style style:parent-style-name="832" style:display-name="T268" style:family="text" style:name="1451">
      <style:paragraph-properties/>
    </style:style>
    <style:style style:parent-style-name="832" style:display-name="T269" style:family="text" style:name="1452">
      <style:paragraph-properties/>
    </style:style>
    <style:style style:parent-style-name="832" style:display-name="T270" style:family="text" style:name="1453">
      <style:paragraph-properties/>
    </style:style>
    <style:style style:parent-style-name="832" style:display-name="T271" style:family="text" style:name="1454">
      <style:paragraph-properties/>
    </style:style>
    <style:style style:parent-style-name="832" style:display-name="T272" style:family="text" style:name="1455">
      <style:paragraph-properties/>
    </style:style>
    <style:style style:parent-style-name="832" style:display-name="T273" style:family="text" style:name="1456">
      <style:paragraph-properties/>
    </style:style>
    <style:style style:parent-style-name="832" style:display-name="T274" style:family="text" style:name="1457">
      <style:paragraph-properties/>
    </style:style>
    <style:style style:parent-style-name="832" style:display-name="T275" style:family="text" style:name="1458">
      <style:paragraph-properties/>
    </style:style>
    <style:style style:parent-style-name="832" style:display-name="T276" style:family="text" style:name="1459">
      <style:paragraph-properties/>
    </style:style>
    <style:style style:parent-style-name="832" style:display-name="T277" style:family="text" style:name="1460">
      <style:paragraph-properties/>
    </style:style>
    <style:style style:parent-style-name="832" style:display-name="T278" style:family="text" style:name="1461">
      <style:paragraph-properties/>
    </style:style>
    <style:style style:parent-style-name="832" style:display-name="T279" style:family="text" style:name="1462">
      <style:paragraph-properties/>
    </style:style>
    <style:style style:parent-style-name="832" style:display-name="T280" style:family="text" style:name="1463">
      <style:paragraph-properties/>
    </style:style>
    <style:style style:parent-style-name="832" style:display-name="T281" style:family="text" style:name="1464">
      <style:paragraph-properties/>
    </style:style>
    <style:style style:parent-style-name="832" style:display-name="T282" style:family="text" style:name="1465">
      <style:paragraph-properties/>
    </style:style>
    <style:style style:parent-style-name="832" style:display-name="T283" style:family="text" style:name="1466">
      <style:paragraph-properties/>
    </style:style>
    <style:style style:parent-style-name="832" style:display-name="T284" style:family="text" style:name="1467">
      <style:paragraph-properties/>
    </style:style>
    <style:style style:parent-style-name="832" style:display-name="T285" style:family="text" style:name="1468">
      <style:paragraph-properties/>
    </style:style>
    <style:style style:parent-style-name="832" style:display-name="T286" style:family="text" style:name="1469">
      <style:paragraph-properties/>
    </style:style>
    <style:style style:parent-style-name="832" style:display-name="T287" style:family="text" style:name="1470">
      <style:paragraph-properties/>
    </style:style>
    <style:style style:parent-style-name="832" style:display-name="T288" style:family="text" style:name="1471">
      <style:paragraph-properties/>
    </style:style>
    <style:style style:parent-style-name="832" style:display-name="T289" style:family="text" style:name="1472">
      <style:paragraph-properties/>
    </style:style>
    <style:style style:parent-style-name="832" style:display-name="T290" style:family="text" style:name="1473">
      <style:paragraph-properties/>
    </style:style>
    <style:style style:parent-style-name="832" style:display-name="T291" style:family="text" style:name="1474">
      <style:paragraph-properties/>
    </style:style>
    <style:style style:parent-style-name="832" style:display-name="T292" style:family="text" style:name="1475">
      <style:paragraph-properties/>
    </style:style>
    <style:style style:parent-style-name="832" style:display-name="T293" style:family="text" style:name="1476">
      <style:paragraph-properties/>
    </style:style>
    <style:style style:parent-style-name="832" style:display-name="T294" style:family="text" style:name="1477">
      <style:paragraph-properties/>
    </style:style>
    <style:style style:parent-style-name="832" style:display-name="T295" style:family="text" style:name="1478">
      <style:paragraph-properties/>
    </style:style>
    <style:style style:parent-style-name="832" style:display-name="T296" style:family="text" style:name="1479">
      <style:paragraph-properties/>
    </style:style>
    <style:style style:parent-style-name="832" style:display-name="T297" style:family="text" style:name="1480">
      <style:paragraph-properties/>
    </style:style>
    <style:style style:parent-style-name="832" style:display-name="T298" style:family="text" style:name="1481">
      <style:paragraph-properties/>
      <style:text-properties fo:font-family="Symbol" style:font-family-complex="Symbol"/>
    </style:style>
    <style:style style:parent-style-name="832" style:display-name="T299" style:family="text" style:name="1482">
      <style:paragraph-properties/>
      <style:text-properties fo:font-family="Courier New" style:font-family-complex="Courier New"/>
    </style:style>
    <style:style style:parent-style-name="832" style:display-name="T300" style:family="text" style:name="1483">
      <style:paragraph-properties/>
      <style:text-properties fo:font-family="Wingdings" style:font-family-complex="Wingdings"/>
    </style:style>
    <style:style style:parent-style-name="832" style:display-name="T301" style:family="text" style:name="1484">
      <style:paragraph-properties/>
      <style:text-properties fo:font-family="Symbol" style:font-family-complex="Symbol"/>
    </style:style>
    <style:style style:parent-style-name="832" style:display-name="T302" style:family="text" style:name="1485">
      <style:paragraph-properties/>
      <style:text-properties fo:font-family="Courier New" style:font-family-complex="Courier New"/>
    </style:style>
    <style:style style:parent-style-name="832" style:display-name="T303" style:family="text" style:name="1486">
      <style:paragraph-properties/>
      <style:text-properties fo:font-family="Wingdings" style:font-family-complex="Wingdings"/>
    </style:style>
    <style:style style:parent-style-name="832" style:display-name="T304" style:family="text" style:name="1487">
      <style:paragraph-properties/>
      <style:text-properties fo:font-family="Symbol" style:font-family-complex="Symbol"/>
    </style:style>
    <style:style style:parent-style-name="832" style:display-name="T305" style:family="text" style:name="1488">
      <style:paragraph-properties/>
      <style:text-properties fo:font-family="Courier New" style:font-family-complex="Courier New"/>
    </style:style>
    <style:style style:parent-style-name="832" style:display-name="T306" style:family="text" style:name="1489">
      <style:paragraph-properties/>
      <style:text-properties fo:font-family="Wingdings" style:font-family-complex="Wingdings"/>
    </style:style>
    <style:style style:parent-style-name="832" style:display-name="T307" style:family="text" style:name="1490">
      <style:paragraph-properties/>
    </style:style>
    <style:style style:parent-style-name="832" style:display-name="T308" style:family="text" style:name="1491">
      <style:paragraph-properties/>
    </style:style>
    <style:style style:parent-style-name="832" style:display-name="T309" style:family="text" style:name="1492">
      <style:paragraph-properties/>
    </style:style>
    <style:style style:parent-style-name="832" style:display-name="T310" style:family="text" style:name="1493">
      <style:paragraph-properties/>
    </style:style>
    <style:style style:parent-style-name="832" style:display-name="T311" style:family="text" style:name="1494">
      <style:paragraph-properties/>
    </style:style>
    <style:style style:parent-style-name="832" style:display-name="T312" style:family="text" style:name="1495">
      <style:paragraph-properties/>
    </style:style>
    <style:style style:parent-style-name="832" style:display-name="T313" style:family="text" style:name="1496">
      <style:paragraph-properties/>
    </style:style>
    <style:style style:parent-style-name="832" style:display-name="T314" style:family="text" style:name="1497">
      <style:paragraph-properties/>
    </style:style>
    <style:style style:parent-style-name="832" style:display-name="T315" style:family="text" style:name="1498">
      <style:paragraph-properties/>
    </style:style>
    <style:style style:parent-style-name="832" style:display-name="T316" style:family="text" style:name="1499">
      <style:paragraph-properties/>
      <style:text-properties fo:color="#000000" fo:font-family="Symbol" style:font-family-complex="Symbol" fo:font-size="10pt"/>
    </style:style>
    <style:style style:parent-style-name="832" style:display-name="T317" style:family="text" style:name="1500">
      <style:paragraph-properties/>
      <style:text-properties fo:color="#000000" fo:font-family="Symbol" style:font-family-complex="Symbol" fo:font-size="10pt"/>
    </style:style>
    <style:style style:parent-style-name="832" style:display-name="T318" style:family="text" style:name="1501">
      <style:paragraph-properties/>
      <style:text-properties fo:color="#000000" fo:font-family="Symbol" style:font-family-complex="Symbol" fo:font-size="10pt"/>
    </style:style>
    <style:style style:parent-style-name="832" style:display-name="T319" style:family="text" style:name="1502">
      <style:paragraph-properties/>
      <style:text-properties fo:color="#000000" fo:font-family="Symbol" style:font-family-complex="Symbol" fo:font-size="10pt"/>
    </style:style>
    <style:style style:parent-style-name="832" style:display-name="T320" style:family="text" style:name="1503">
      <style:paragraph-properties/>
      <style:text-properties fo:color="#000000" fo:font-family="Symbol" style:font-family-complex="Symbol" fo:font-size="10pt"/>
    </style:style>
    <style:style style:parent-style-name="832" style:display-name="T321" style:family="text" style:name="1504">
      <style:paragraph-properties/>
      <style:text-properties fo:color="#000000" fo:font-family="Symbol" style:font-family-complex="Symbol" fo:font-size="10pt"/>
    </style:style>
    <style:style style:parent-style-name="832" style:display-name="T322" style:family="text" style:name="1505">
      <style:paragraph-properties/>
      <style:text-properties fo:color="#000000" fo:font-family="Symbol" style:font-family-complex="Symbol" fo:font-size="10pt"/>
    </style:style>
    <style:style style:parent-style-name="832" style:display-name="T323" style:family="text" style:name="1506">
      <style:paragraph-properties/>
      <style:text-properties fo:color="#000000" fo:font-family="Symbol" style:font-family-complex="Symbol" fo:font-size="10pt"/>
    </style:style>
    <style:style style:parent-style-name="832" style:display-name="T324" style:family="text" style:name="1507">
      <style:paragraph-properties/>
      <style:text-properties fo:color="#000000" fo:font-family="Symbol" style:font-family-complex="Symbol" fo:font-size="10pt"/>
    </style:style>
    <style:style style:parent-style-name="832" style:display-name="T325" style:family="text" style:name="1508">
      <style:paragraph-properties/>
      <style:text-properties fo:color="#000000" fo:font-family="Symbol" style:font-family-complex="Symbol" fo:font-size="10pt"/>
    </style:style>
    <style:style style:parent-style-name="832" style:display-name="T326" style:family="text" style:name="1509">
      <style:paragraph-properties/>
      <style:text-properties fo:color="#000000" fo:font-family="Symbol" style:font-family-complex="Symbol" fo:font-size="10pt"/>
    </style:style>
    <style:style style:parent-style-name="832" style:display-name="T327" style:family="text" style:name="1510">
      <style:paragraph-properties/>
      <style:text-properties fo:color="#000000" fo:font-family="Symbol" style:font-family-complex="Symbol" fo:font-size="10pt"/>
    </style:style>
    <style:style style:parent-style-name="832" style:display-name="T328" style:family="text" style:name="1511">
      <style:paragraph-properties/>
      <style:text-properties fo:color="#000000" fo:font-family="Symbol" style:font-family-complex="Symbol" fo:font-size="10pt"/>
    </style:style>
    <style:style style:parent-style-name="832" style:display-name="T329" style:family="text" style:name="1512">
      <style:paragraph-properties/>
      <style:text-properties fo:color="#000000" fo:font-family="Symbol" style:font-family-complex="Symbol" fo:font-size="10pt"/>
    </style:style>
    <style:style style:parent-style-name="832" style:display-name="T330" style:family="text" style:name="1513">
      <style:paragraph-properties/>
      <style:text-properties fo:color="#000000" fo:font-family="Symbol" style:font-family-complex="Symbol" fo:font-size="10pt"/>
    </style:style>
    <style:style style:parent-style-name="832" style:display-name="T331" style:family="text" style:name="1514">
      <style:paragraph-properties/>
      <style:text-properties fo:color="#000000" fo:font-family="Symbol" style:font-family-complex="Symbol" fo:font-size="10pt"/>
    </style:style>
    <style:style style:parent-style-name="832" style:display-name="T332" style:family="text" style:name="1515">
      <style:paragraph-properties/>
      <style:text-properties fo:color="#000000" fo:font-family="Symbol" style:font-family-complex="Symbol" fo:font-size="10pt"/>
    </style:style>
    <style:style style:parent-style-name="832" style:display-name="T333" style:family="text" style:name="1516">
      <style:paragraph-properties/>
      <style:text-properties fo:color="#000000" fo:font-family="Symbol" style:font-family-complex="Symbol" fo:font-size="10pt"/>
    </style:style>
    <style:style style:parent-style-name="832" style:display-name="T334" style:family="text" style:name="1517">
      <style:paragraph-properties/>
      <style:text-properties fo:color="#000000" fo:font-family="Symbol" style:font-family-complex="Symbol" fo:font-size="10pt"/>
    </style:style>
    <style:style style:parent-style-name="832" style:display-name="T335" style:family="text" style:name="1518">
      <style:paragraph-properties/>
      <style:text-properties fo:color="#000000" fo:font-family="Symbol" style:font-family-complex="Symbol" fo:font-size="10pt"/>
    </style:style>
    <style:style style:parent-style-name="832" style:display-name="T336" style:family="text" style:name="1519">
      <style:paragraph-properties/>
      <style:text-properties fo:color="#000000" fo:font-family="Symbol" style:font-family-complex="Symbol" fo:font-size="10pt"/>
    </style:style>
    <style:style style:parent-style-name="832" style:display-name="T337" style:family="text" style:name="1520">
      <style:paragraph-properties/>
      <style:text-properties fo:color="#000000" fo:font-family="Symbol" style:font-family-complex="Symbol" fo:font-size="10pt"/>
    </style:style>
    <style:style style:parent-style-name="832" style:display-name="T338" style:family="text" style:name="1521">
      <style:paragraph-properties/>
      <style:text-properties fo:color="#000000" fo:font-family="Symbol" style:font-family-complex="Symbol" fo:font-size="10pt"/>
    </style:style>
    <style:style style:parent-style-name="832" style:display-name="T339" style:family="text" style:name="1522">
      <style:paragraph-properties/>
      <style:text-properties fo:color="#000000" fo:font-family="Symbol" style:font-family-complex="Symbol" fo:font-size="10pt"/>
    </style:style>
    <style:style style:parent-style-name="832" style:display-name="T340" style:family="text" style:name="1523">
      <style:paragraph-properties/>
      <style:text-properties fo:color="#000000" fo:font-family="Symbol" style:font-family-complex="Symbol" fo:font-size="10pt"/>
    </style:style>
    <style:style style:parent-style-name="832" style:display-name="T341" style:family="text" style:name="1524">
      <style:paragraph-properties/>
      <style:text-properties fo:color="#000000" fo:font-family="Symbol" style:font-family-complex="Symbol" fo:font-size="10pt"/>
    </style:style>
    <style:style style:parent-style-name="832" style:display-name="T342" style:family="text" style:name="1525">
      <style:paragraph-properties/>
      <style:text-properties fo:color="#000000" fo:font-family="Symbol" style:font-family-complex="Symbol" fo:font-size="10pt"/>
    </style:style>
    <style:style style:parent-style-name="832" style:display-name="T343" style:family="text" style:name="1526">
      <style:paragraph-properties/>
      <style:text-properties fo:color="#000000" fo:font-family="Symbol" style:font-family-complex="Symbol" fo:font-size="10pt"/>
    </style:style>
    <style:style style:parent-style-name="832" style:display-name="T344" style:family="text" style:name="1527">
      <style:paragraph-properties/>
      <style:text-properties fo:color="#000000" fo:font-family="Symbol" style:font-family-complex="Symbol" fo:font-size="10pt"/>
    </style:style>
    <style:style style:parent-style-name="832" style:display-name="T345" style:family="text" style:name="1528">
      <style:paragraph-properties/>
      <style:text-properties fo:color="#000000" fo:font-family="Symbol" style:font-family-complex="Symbol" fo:font-size="10pt"/>
    </style:style>
    <style:style style:parent-style-name="832" style:display-name="T346" style:family="text" style:name="1529">
      <style:paragraph-properties/>
      <style:text-properties fo:color="#000000" fo:font-family="Symbol" style:font-family-complex="Symbol" fo:font-size="10pt"/>
    </style:style>
    <style:style style:parent-style-name="832" style:display-name="T347" style:family="text" style:name="1530">
      <style:paragraph-properties/>
      <style:text-properties fo:color="#000000" fo:font-family="Symbol" style:font-family-complex="Symbol" fo:font-size="10pt"/>
    </style:style>
    <style:style style:parent-style-name="832" style:display-name="T348" style:family="text" style:name="1531">
      <style:paragraph-properties/>
      <style:text-properties fo:color="#000000" fo:font-family="Symbol" style:font-family-complex="Symbol" fo:font-size="10pt"/>
    </style:style>
    <style:style style:parent-style-name="832" style:display-name="T349" style:family="text" style:name="1532">
      <style:paragraph-properties/>
      <style:text-properties fo:color="#000000" fo:font-family="Symbol" style:font-family-complex="Symbol" fo:font-size="10pt"/>
    </style:style>
    <style:style style:parent-style-name="832" style:display-name="T350" style:family="text" style:name="1533">
      <style:paragraph-properties/>
      <style:text-properties fo:color="#000000" fo:font-family="Symbol" style:font-family-complex="Symbol" fo:font-size="10pt"/>
    </style:style>
    <style:style style:parent-style-name="832" style:display-name="T351" style:family="text" style:name="1534">
      <style:paragraph-properties/>
      <style:text-properties fo:color="#000000" fo:font-family="Symbol" style:font-family-complex="Symbol" fo:font-size="10pt"/>
    </style:style>
    <style:style style:parent-style-name="832" style:display-name="T352" style:family="text" style:name="1535">
      <style:paragraph-properties/>
      <style:text-properties fo:color="#000000" fo:font-family="Symbol" style:font-family-complex="Symbol" fo:font-size="10pt"/>
    </style:style>
    <style:style style:parent-style-name="832" style:display-name="T353" style:family="text" style:name="1536">
      <style:paragraph-properties/>
      <style:text-properties fo:color="#000000" fo:font-family="Symbol" style:font-family-complex="Symbol" fo:font-size="10pt"/>
    </style:style>
    <style:style style:parent-style-name="832" style:display-name="T354" style:family="text" style:name="1537">
      <style:paragraph-properties/>
      <style:text-properties fo:color="#000000" fo:font-family="Symbol" style:font-family-complex="Symbol" fo:font-size="10pt"/>
    </style:style>
    <style:style style:parent-style-name="832" style:display-name="T355" style:family="text" style:name="1538">
      <style:paragraph-properties/>
      <style:text-properties fo:color="#000000" fo:font-family="Symbol" style:font-family-complex="Symbol" fo:font-size="10pt"/>
    </style:style>
    <style:style style:parent-style-name="832" style:display-name="T356" style:family="text" style:name="1539">
      <style:paragraph-properties/>
      <style:text-properties fo:color="#000000" fo:font-family="Symbol" style:font-family-complex="Symbol" fo:font-size="10pt"/>
    </style:style>
    <style:style style:parent-style-name="832" style:display-name="T357" style:family="text" style:name="1540">
      <style:paragraph-properties/>
      <style:text-properties fo:color="#000000" fo:font-family="Symbol" style:font-family-complex="Symbol" fo:font-size="10pt"/>
    </style:style>
    <style:style style:parent-style-name="832" style:display-name="T358" style:family="text" style:name="1541">
      <style:paragraph-properties/>
      <style:text-properties fo:color="#000000" fo:font-family="Symbol" style:font-family-complex="Symbol" fo:font-size="10pt"/>
    </style:style>
    <style:style style:parent-style-name="832" style:display-name="T359" style:family="text" style:name="1542">
      <style:paragraph-properties/>
      <style:text-properties fo:color="#000000" fo:font-family="Symbol" style:font-family-complex="Symbol" fo:font-size="10pt"/>
    </style:style>
    <style:style style:parent-style-name="832" style:display-name="T360" style:family="text" style:name="1543">
      <style:paragraph-properties/>
      <style:text-properties fo:color="#000000" fo:font-family="Symbol" style:font-family-complex="Symbol" fo:font-size="10pt"/>
    </style:style>
    <style:style style:parent-style-name="832" style:display-name="T361" style:family="text" style:name="1544">
      <style:paragraph-properties/>
      <style:text-properties fo:color="#000000" fo:font-family="Symbol" style:font-family-complex="Symbol" fo:font-size="10pt"/>
    </style:style>
    <style:style style:parent-style-name="832" style:display-name="T362" style:family="text" style:name="1545">
      <style:paragraph-properties/>
      <style:text-properties fo:color="#000000" fo:font-family="Symbol" style:font-family-complex="Symbol" fo:font-size="10pt"/>
    </style:style>
    <style:style style:parent-style-name="832" style:display-name="T363" style:family="text" style:name="1546">
      <style:paragraph-properties/>
      <style:text-properties fo:color="#000000" fo:font-family="Symbol" style:font-family-complex="Symbol" fo:font-size="10pt"/>
    </style:style>
    <style:style style:parent-style-name="832" style:display-name="T364" style:family="text" style:name="1547">
      <style:paragraph-properties/>
      <style:text-properties fo:color="#000000" fo:font-family="Symbol" style:font-family-complex="Symbol" fo:font-size="10pt"/>
    </style:style>
    <style:style style:parent-style-name="832" style:display-name="T365" style:family="text" style:name="1548">
      <style:paragraph-properties/>
      <style:text-properties fo:color="#000000" fo:font-family="Symbol" style:font-family-complex="Symbol" fo:font-size="10pt"/>
    </style:style>
    <style:style style:parent-style-name="832" style:display-name="T366" style:family="text" style:name="1549">
      <style:paragraph-properties/>
      <style:text-properties fo:color="#000000" fo:font-family="Symbol" style:font-family-complex="Symbol" fo:font-size="10pt"/>
    </style:style>
    <style:style style:parent-style-name="832" style:display-name="T367" style:family="text" style:name="1550">
      <style:paragraph-properties/>
      <style:text-properties fo:color="#000000" fo:font-family="Symbol" style:font-family-complex="Symbol" fo:font-size="10pt"/>
    </style:style>
    <style:style style:parent-style-name="832" style:display-name="T368" style:family="text" style:name="1551">
      <style:paragraph-properties/>
      <style:text-properties fo:color="#000000" fo:font-family="Symbol" style:font-family-complex="Symbol" fo:font-size="10pt"/>
    </style:style>
    <style:style style:parent-style-name="832" style:display-name="T369" style:family="text" style:name="1552">
      <style:paragraph-properties/>
      <style:text-properties fo:color="#000000" fo:font-family="Symbol" style:font-family-complex="Symbol" fo:font-size="10pt"/>
    </style:style>
    <style:style style:parent-style-name="832" style:display-name="T370" style:family="text" style:name="1553">
      <style:paragraph-properties/>
      <style:text-properties fo:color="#000000" fo:font-family="Symbol" style:font-family-complex="Symbol" fo:font-size="10pt"/>
    </style:style>
    <style:style style:parent-style-name="832" style:display-name="T371" style:family="text" style:name="1554">
      <style:paragraph-properties/>
      <style:text-properties fo:color="#000000" fo:font-family="Symbol" style:font-family-complex="Symbol" fo:font-size="10pt"/>
    </style:style>
    <style:style style:parent-style-name="832" style:display-name="T372" style:family="text" style:name="1555">
      <style:paragraph-properties/>
      <style:text-properties fo:color="#000000" fo:font-family="Symbol" style:font-family-complex="Symbol" fo:font-size="10pt"/>
    </style:style>
    <style:style style:parent-style-name="832" style:display-name="T373" style:family="text" style:name="1556">
      <style:paragraph-properties/>
      <style:text-properties fo:color="#000000" fo:font-family="Symbol" style:font-family-complex="Symbol" fo:font-size="10pt"/>
    </style:style>
    <style:style style:parent-style-name="832" style:display-name="T374" style:family="text" style:name="1557">
      <style:paragraph-properties/>
      <style:text-properties fo:color="#000000" fo:font-family="Symbol" style:font-family-complex="Symbol" fo:font-size="10pt"/>
    </style:style>
    <style:style style:parent-style-name="832" style:display-name="T375" style:family="text" style:name="1558">
      <style:paragraph-properties/>
      <style:text-properties fo:color="#000000" fo:font-family="Symbol" style:font-family-complex="Symbol" fo:font-size="10pt"/>
    </style:style>
    <style:style style:parent-style-name="832" style:display-name="T376" style:family="text" style:name="1559">
      <style:paragraph-properties/>
      <style:text-properties fo:color="#000000" fo:font-family="Symbol" style:font-family-complex="Symbol" fo:font-size="10pt"/>
    </style:style>
    <style:style style:parent-style-name="832" style:display-name="T377" style:family="text" style:name="1560">
      <style:paragraph-properties/>
      <style:text-properties fo:color="#000000" fo:font-family="Symbol" style:font-family-complex="Symbol" fo:font-size="10pt"/>
    </style:style>
    <style:style style:parent-style-name="832" style:display-name="T378" style:family="text" style:name="1561">
      <style:paragraph-properties/>
      <style:text-properties fo:color="#000000" fo:font-family="Symbol" style:font-family-complex="Symbol" fo:font-size="10pt"/>
    </style:style>
    <style:style style:parent-style-name="832" style:display-name="T379" style:family="text" style:name="1562">
      <style:paragraph-properties/>
      <style:text-properties fo:font-family="Symbol" style:font-family-complex="Symbol"/>
    </style:style>
    <style:style style:parent-style-name="832" style:display-name="T380" style:family="text" style:name="1563">
      <style:paragraph-properties/>
      <style:text-properties fo:font-family="Symbol" style:font-family-complex="Symbol"/>
    </style:style>
    <style:style style:parent-style-name="832" style:display-name="T381" style:family="text" style:name="1564">
      <style:paragraph-properties/>
      <style:text-properties fo:font-family="Symbol" style:font-family-complex="Symbol"/>
    </style:style>
    <style:style style:parent-style-name="832" style:display-name="T382" style:family="text" style:name="1565">
      <style:paragraph-properties/>
      <style:text-properties fo:font-family="Symbol" style:font-family-complex="Symbol"/>
    </style:style>
    <style:style style:parent-style-name="832" style:display-name="T383" style:family="text" style:name="1566">
      <style:paragraph-properties/>
      <style:text-properties fo:font-family="Symbol" style:font-family-complex="Symbol"/>
    </style:style>
    <style:style style:parent-style-name="832" style:display-name="T384" style:family="text" style:name="1567">
      <style:paragraph-properties/>
      <style:text-properties fo:font-family="Symbol" style:font-family-complex="Symbol"/>
    </style:style>
    <style:style style:parent-style-name="832" style:display-name="T385" style:family="text" style:name="1568">
      <style:paragraph-properties/>
      <style:text-properties fo:font-family="Symbol" style:font-family-complex="Symbol"/>
    </style:style>
    <style:style style:parent-style-name="832" style:display-name="T386" style:family="text" style:name="1569">
      <style:paragraph-properties/>
      <style:text-properties fo:font-family="Symbol" style:font-family-complex="Symbol"/>
    </style:style>
    <style:style style:parent-style-name="832" style:display-name="T387" style:family="text" style:name="1570">
      <style:paragraph-properties/>
      <style:text-properties fo:font-family="Symbol" style:font-family-complex="Symbol"/>
    </style:style>
    <style:style style:parent-style-name="832" style:display-name="T388" style:family="text" style:name="1571">
      <style:paragraph-properties/>
      <style:text-properties fo:font-family="Symbol" style:font-family-complex="Symbol"/>
    </style:style>
    <style:style style:parent-style-name="832" style:display-name="T389" style:family="text" style:name="1572">
      <style:paragraph-properties/>
      <style:text-properties fo:font-family="Symbol" style:font-family-complex="Symbol"/>
    </style:style>
    <style:style style:parent-style-name="832" style:display-name="T390" style:family="text" style:name="1573">
      <style:paragraph-properties/>
      <style:text-properties fo:font-family="Symbol" style:font-family-complex="Symbol"/>
    </style:style>
    <style:style style:parent-style-name="832" style:display-name="T391" style:family="text" style:name="1574">
      <style:paragraph-properties/>
      <style:text-properties fo:font-family="Symbol" style:font-family-complex="Symbol"/>
    </style:style>
    <style:style style:parent-style-name="832" style:display-name="T392" style:family="text" style:name="1575">
      <style:paragraph-properties/>
      <style:text-properties fo:font-family="Symbol" style:font-family-complex="Symbol"/>
    </style:style>
    <style:style style:parent-style-name="832" style:display-name="T393" style:family="text" style:name="1576">
      <style:paragraph-properties/>
      <style:text-properties fo:font-family="Symbol" style:font-family-complex="Symbol"/>
    </style:style>
    <style:style style:parent-style-name="832" style:display-name="T394" style:family="text" style:name="1577">
      <style:paragraph-properties/>
      <style:text-properties fo:font-family="Symbol" style:font-family-complex="Symbol"/>
    </style:style>
    <style:style style:parent-style-name="832" style:display-name="T395" style:family="text" style:name="1578">
      <style:paragraph-properties/>
      <style:text-properties fo:font-family="Symbol" style:font-family-complex="Symbol"/>
    </style:style>
    <style:style style:parent-style-name="832" style:display-name="T396" style:family="text" style:name="1579">
      <style:paragraph-properties/>
      <style:text-properties fo:font-family="Symbol" style:font-family-complex="Symbol"/>
    </style:style>
    <style:style style:parent-style-name="832" style:display-name="T1" style:family="text" style:name="1580">
      <style:paragraph-properties/>
    </style:style>
    <style:style style:parent-style-name="832" style:display-name="T2" style:family="text" style:name="1581">
      <style:paragraph-properties/>
    </style:style>
    <style:style style:parent-style-name="832" style:display-name="T3" style:family="text" style:name="1582">
      <style:paragraph-properties/>
    </style:style>
    <style:style style:parent-style-name="832" style:display-name="T4" style:family="text" style:name="1583">
      <style:paragraph-properties/>
    </style:style>
    <style:style style:parent-style-name="832" style:display-name="T5" style:family="text" style:name="1584">
      <style:paragraph-properties/>
    </style:style>
    <style:style style:parent-style-name="832" style:display-name="T6" style:family="text" style:name="1585">
      <style:paragraph-properties/>
    </style:style>
    <style:style style:parent-style-name="832" style:display-name="T7" style:family="text" style:name="1586">
      <style:paragraph-properties/>
    </style:style>
    <style:style style:parent-style-name="832" style:display-name="T8" style:family="text" style:name="1587">
      <style:paragraph-properties/>
    </style:style>
    <style:style style:parent-style-name="832" style:display-name="T9" style:family="text" style:name="1588">
      <style:paragraph-properties/>
    </style:style>
    <style:style style:parent-style-name="832" style:display-name="T10" style:family="text" style:name="1589">
      <style:paragraph-properties/>
      <style:text-properties fo:font-family="Symbol" style:font-family-complex="Symbol"/>
    </style:style>
    <style:style style:parent-style-name="832" style:display-name="T11" style:family="text" style:name="1590">
      <style:paragraph-properties/>
      <style:text-properties fo:font-family="Symbol" style:font-family-complex="Symbol"/>
    </style:style>
    <style:style style:parent-style-name="832" style:display-name="T12" style:family="text" style:name="1591">
      <style:paragraph-properties/>
      <style:text-properties fo:font-family="Symbol" style:font-family-complex="Symbol"/>
    </style:style>
    <style:style style:parent-style-name="832" style:display-name="T13" style:family="text" style:name="1592">
      <style:paragraph-properties/>
      <style:text-properties fo:font-family="Symbol" style:font-family-complex="Symbol"/>
    </style:style>
    <style:style style:parent-style-name="832" style:display-name="T14" style:family="text" style:name="1593">
      <style:paragraph-properties/>
      <style:text-properties fo:font-family="Symbol" style:font-family-complex="Symbol"/>
    </style:style>
    <style:style style:parent-style-name="832" style:display-name="T15" style:family="text" style:name="1594">
      <style:paragraph-properties/>
      <style:text-properties fo:font-family="Symbol" style:font-family-complex="Symbol"/>
    </style:style>
    <style:style style:parent-style-name="832" style:display-name="T16" style:family="text" style:name="1595">
      <style:paragraph-properties/>
      <style:text-properties fo:font-family="Symbol" style:font-family-complex="Symbol"/>
    </style:style>
    <style:style style:parent-style-name="832" style:display-name="T17" style:family="text" style:name="1596">
      <style:paragraph-properties/>
      <style:text-properties fo:font-family="Symbol" style:font-family-complex="Symbol"/>
    </style:style>
    <style:style style:parent-style-name="832" style:display-name="T18" style:family="text" style:name="1597">
      <style:paragraph-properties/>
      <style:text-properties fo:font-family="Symbol" style:font-family-complex="Symbol"/>
    </style:style>
    <style:style style:parent-style-name="832" style:display-name="T19" style:family="text" style:name="1598">
      <style:paragraph-properties/>
      <style:text-properties fo:font-family="Symbol" style:font-family-complex="Symbol"/>
    </style:style>
    <style:style style:parent-style-name="832" style:display-name="T20" style:family="text" style:name="1599">
      <style:paragraph-properties/>
      <style:text-properties fo:font-family="Symbol" style:font-family-complex="Symbol"/>
    </style:style>
    <style:style style:parent-style-name="832" style:display-name="T21" style:family="text" style:name="1600">
      <style:paragraph-properties/>
      <style:text-properties fo:font-family="Symbol" style:font-family-complex="Symbol"/>
    </style:style>
    <style:style style:parent-style-name="832" style:display-name="T22" style:family="text" style:name="1601">
      <style:paragraph-properties/>
      <style:text-properties fo:font-family="Symbol" style:font-family-complex="Symbol"/>
    </style:style>
    <style:style style:parent-style-name="832" style:display-name="T23" style:family="text" style:name="1602">
      <style:paragraph-properties/>
      <style:text-properties fo:font-family="Symbol" style:font-family-complex="Symbol"/>
    </style:style>
    <style:style style:parent-style-name="832" style:display-name="T24" style:family="text" style:name="1603">
      <style:paragraph-properties/>
      <style:text-properties fo:font-family="Symbol" style:font-family-complex="Symbol"/>
    </style:style>
    <style:style style:parent-style-name="832" style:display-name="T25" style:family="text" style:name="1604">
      <style:paragraph-properties/>
      <style:text-properties fo:font-family="Symbol" style:font-family-complex="Symbol"/>
    </style:style>
    <style:style style:parent-style-name="832" style:display-name="T26" style:family="text" style:name="1605">
      <style:paragraph-properties/>
      <style:text-properties fo:font-family="Symbol" style:font-family-complex="Symbol"/>
    </style:style>
    <style:style style:parent-style-name="832" style:display-name="T27" style:family="text" style:name="1606">
      <style:paragraph-properties/>
      <style:text-properties fo:font-family="Symbol" style:font-family-complex="Symbol"/>
    </style:style>
    <style:style style:parent-style-name="832" style:display-name="T28" style:family="text" style:name="1607">
      <style:paragraph-properties/>
    </style:style>
    <style:style style:parent-style-name="832" style:display-name="T29" style:family="text" style:name="1608">
      <style:paragraph-properties/>
    </style:style>
    <style:style style:parent-style-name="832" style:display-name="T30" style:family="text" style:name="1609">
      <style:paragraph-properties/>
    </style:style>
    <style:style style:parent-style-name="832" style:display-name="T31" style:family="text" style:name="1610">
      <style:paragraph-properties/>
    </style:style>
    <style:style style:parent-style-name="832" style:display-name="T32" style:family="text" style:name="1611">
      <style:paragraph-properties/>
    </style:style>
    <style:style style:parent-style-name="832" style:display-name="T33" style:family="text" style:name="1612">
      <style:paragraph-properties/>
    </style:style>
    <style:style style:parent-style-name="832" style:display-name="T34" style:family="text" style:name="1613">
      <style:paragraph-properties/>
    </style:style>
    <style:style style:parent-style-name="832" style:display-name="T35" style:family="text" style:name="1614">
      <style:paragraph-properties/>
    </style:style>
    <style:style style:parent-style-name="832" style:display-name="T36" style:family="text" style:name="1615">
      <style:paragraph-properties/>
    </style:style>
    <style:style style:parent-style-name="832" style:display-name="T37" style:family="text" style:name="1616">
      <style:paragraph-properties/>
      <style:text-properties fo:font-family="Symbol" style:font-family-complex="Symbol"/>
    </style:style>
    <style:style style:parent-style-name="832" style:display-name="T38" style:family="text" style:name="1617">
      <style:paragraph-properties/>
      <style:text-properties fo:font-family="OpenSymbol" style:font-family-complex="OpenSymbol"/>
    </style:style>
    <style:style style:parent-style-name="832" style:display-name="T39" style:family="text" style:name="1618">
      <style:paragraph-properties/>
      <style:text-properties fo:font-family="OpenSymbol" style:font-family-complex="OpenSymbol"/>
    </style:style>
    <style:style style:parent-style-name="832" style:display-name="T40" style:family="text" style:name="1619">
      <style:paragraph-properties/>
      <style:text-properties fo:font-family="Symbol" style:font-family-complex="Symbol"/>
    </style:style>
    <style:style style:parent-style-name="832" style:display-name="T41" style:family="text" style:name="1620">
      <style:paragraph-properties/>
      <style:text-properties fo:font-family="OpenSymbol" style:font-family-complex="OpenSymbol"/>
    </style:style>
    <style:style style:parent-style-name="832" style:display-name="T42" style:family="text" style:name="1621">
      <style:paragraph-properties/>
      <style:text-properties fo:font-family="OpenSymbol" style:font-family-complex="OpenSymbol"/>
    </style:style>
    <style:style style:parent-style-name="832" style:display-name="T43" style:family="text" style:name="1622">
      <style:paragraph-properties/>
      <style:text-properties fo:font-family="Symbol" style:font-family-complex="Symbol"/>
    </style:style>
    <style:style style:parent-style-name="832" style:display-name="T44" style:family="text" style:name="1623">
      <style:paragraph-properties/>
      <style:text-properties fo:font-family="OpenSymbol" style:font-family-complex="OpenSymbol"/>
    </style:style>
    <style:style style:parent-style-name="832" style:display-name="T45" style:family="text" style:name="1624">
      <style:paragraph-properties/>
      <style:text-properties fo:font-family="OpenSymbol" style:font-family-complex="OpenSymbol"/>
    </style:style>
    <style:style style:parent-style-name="832" style:display-name="T46" style:family="text" style:name="1625">
      <style:paragraph-properties/>
      <style:text-properties fo:font-family="Symbol" style:font-family-complex="Symbol"/>
    </style:style>
    <style:style style:parent-style-name="832" style:display-name="T47" style:family="text" style:name="1626">
      <style:paragraph-properties/>
      <style:text-properties fo:font-family="Symbol" style:font-family-complex="Symbol"/>
    </style:style>
    <style:style style:parent-style-name="832" style:display-name="T48" style:family="text" style:name="1627">
      <style:paragraph-properties/>
      <style:text-properties fo:font-family="Symbol" style:font-family-complex="Symbol"/>
    </style:style>
    <style:style style:parent-style-name="832" style:display-name="T49" style:family="text" style:name="1628">
      <style:paragraph-properties/>
      <style:text-properties fo:font-family="Symbol" style:font-family-complex="Symbol"/>
    </style:style>
    <style:style style:parent-style-name="832" style:display-name="T50" style:family="text" style:name="1629">
      <style:paragraph-properties/>
      <style:text-properties fo:font-family="Symbol" style:font-family-complex="Symbol"/>
    </style:style>
    <style:style style:parent-style-name="832" style:display-name="T51" style:family="text" style:name="1630">
      <style:paragraph-properties/>
      <style:text-properties fo:font-family="Symbol" style:font-family-complex="Symbol"/>
    </style:style>
    <style:style style:parent-style-name="832" style:display-name="T52" style:family="text" style:name="1631">
      <style:paragraph-properties/>
      <style:text-properties fo:font-family="Symbol" style:font-family-complex="Symbol"/>
    </style:style>
    <style:style style:parent-style-name="832" style:display-name="T53" style:family="text" style:name="1632">
      <style:paragraph-properties/>
      <style:text-properties fo:font-family="Symbol" style:font-family-complex="Symbol"/>
    </style:style>
    <style:style style:parent-style-name="832" style:display-name="T54" style:family="text" style:name="1633">
      <style:paragraph-properties/>
      <style:text-properties fo:font-family="Symbol" style:font-family-complex="Symbol"/>
    </style:style>
    <style:style style:parent-style-name="832" style:display-name="T55" style:family="text" style:name="1634">
      <style:paragraph-properties/>
      <style:text-properties fo:font-family="Symbol" style:font-family-complex="Symbol"/>
    </style:style>
    <style:style style:parent-style-name="832" style:display-name="T56" style:family="text" style:name="1635">
      <style:paragraph-properties/>
      <style:text-properties fo:font-family="Symbol" style:font-family-complex="Symbol"/>
    </style:style>
    <style:style style:parent-style-name="832" style:display-name="T57" style:family="text" style:name="1636">
      <style:paragraph-properties/>
      <style:text-properties fo:font-family="Symbol" style:font-family-complex="Symbol"/>
    </style:style>
    <style:style style:parent-style-name="832" style:display-name="T58" style:family="text" style:name="1637">
      <style:paragraph-properties/>
      <style:text-properties fo:font-family="Symbol" style:font-family-complex="Symbol"/>
    </style:style>
    <style:style style:parent-style-name="832" style:display-name="T59" style:family="text" style:name="1638">
      <style:paragraph-properties/>
      <style:text-properties fo:font-family="Symbol" style:font-family-complex="Symbol"/>
    </style:style>
    <style:style style:parent-style-name="832" style:display-name="T60" style:family="text" style:name="1639">
      <style:paragraph-properties/>
      <style:text-properties fo:font-family="Symbol" style:font-family-complex="Symbol"/>
    </style:style>
    <style:style style:parent-style-name="832" style:display-name="T61" style:family="text" style:name="1640">
      <style:paragraph-properties/>
      <style:text-properties fo:font-family="Symbol" style:font-family-complex="Symbol"/>
    </style:style>
    <style:style style:parent-style-name="832" style:display-name="T62" style:family="text" style:name="1641">
      <style:paragraph-properties/>
      <style:text-properties fo:font-family="Symbol" style:font-family-complex="Symbol"/>
    </style:style>
    <style:style style:parent-style-name="832" style:display-name="T63" style:family="text" style:name="1642">
      <style:paragraph-properties/>
      <style:text-properties fo:font-family="Symbol" style:font-family-complex="Symbol"/>
    </style:style>
    <style:style style:parent-style-name="832" style:display-name="T64" style:family="text" style:name="1643">
      <style:paragraph-properties/>
      <style:text-properties fo:font-family="Symbol" style:font-family-complex="Symbol"/>
    </style:style>
    <style:style style:parent-style-name="832" style:display-name="T65" style:family="text" style:name="1644">
      <style:paragraph-properties/>
      <style:text-properties fo:font-family="Symbol" style:font-family-complex="Symbol"/>
    </style:style>
    <style:style style:parent-style-name="832" style:display-name="T66" style:family="text" style:name="1645">
      <style:paragraph-properties/>
      <style:text-properties fo:font-family="Symbol" style:font-family-complex="Symbol"/>
    </style:style>
    <style:style style:parent-style-name="832" style:display-name="T67" style:family="text" style:name="1646">
      <style:paragraph-properties/>
      <style:text-properties fo:font-family="Symbol" style:font-family-complex="Symbol"/>
    </style:style>
    <style:style style:parent-style-name="832" style:display-name="T68" style:family="text" style:name="1647">
      <style:paragraph-properties/>
      <style:text-properties fo:font-family="Symbol" style:font-family-complex="Symbol"/>
    </style:style>
    <style:style style:parent-style-name="832" style:display-name="T69" style:family="text" style:name="1648">
      <style:paragraph-properties/>
      <style:text-properties fo:font-family="Symbol" style:font-family-complex="Symbol"/>
    </style:style>
    <style:style style:parent-style-name="832" style:display-name="T70" style:family="text" style:name="1649">
      <style:paragraph-properties/>
      <style:text-properties fo:font-family="Symbol" style:font-family-complex="Symbol"/>
    </style:style>
    <style:style style:parent-style-name="832" style:display-name="T71" style:family="text" style:name="1650">
      <style:paragraph-properties/>
      <style:text-properties fo:font-family="Symbol" style:font-family-complex="Symbol"/>
    </style:style>
    <style:style style:parent-style-name="832" style:display-name="T72" style:family="text" style:name="1651">
      <style:paragraph-properties/>
      <style:text-properties fo:font-family="Symbol" style:font-family-complex="Symbol"/>
    </style:style>
    <style:style style:parent-style-name="832" style:display-name="T73" style:family="text" style:name="1652">
      <style:paragraph-properties/>
      <style:text-properties fo:font-family="Symbol" style:font-family-complex="Symbol"/>
    </style:style>
    <style:style style:parent-style-name="832" style:display-name="T74" style:family="text" style:name="1653">
      <style:paragraph-properties/>
      <style:text-properties fo:font-family="OpenSymbol" style:font-family-complex="OpenSymbol"/>
    </style:style>
    <style:style style:parent-style-name="832" style:display-name="T75" style:family="text" style:name="1654">
      <style:paragraph-properties/>
      <style:text-properties fo:font-family="OpenSymbol" style:font-family-complex="OpenSymbol"/>
    </style:style>
    <style:style style:parent-style-name="832" style:display-name="T76" style:family="text" style:name="1655">
      <style:paragraph-properties/>
      <style:text-properties fo:font-family="Symbol" style:font-family-complex="Symbol"/>
    </style:style>
    <style:style style:parent-style-name="832" style:display-name="T77" style:family="text" style:name="1656">
      <style:paragraph-properties/>
      <style:text-properties fo:font-family="OpenSymbol" style:font-family-complex="OpenSymbol"/>
    </style:style>
    <style:style style:parent-style-name="832" style:display-name="T78" style:family="text" style:name="1657">
      <style:paragraph-properties/>
      <style:text-properties fo:font-family="OpenSymbol" style:font-family-complex="OpenSymbol"/>
    </style:style>
    <style:style style:parent-style-name="832" style:display-name="T79" style:family="text" style:name="1658">
      <style:paragraph-properties/>
      <style:text-properties fo:font-family="Symbol" style:font-family-complex="Symbol"/>
    </style:style>
    <style:style style:parent-style-name="832" style:display-name="T80" style:family="text" style:name="1659">
      <style:paragraph-properties/>
      <style:text-properties fo:font-family="OpenSymbol" style:font-family-complex="OpenSymbol"/>
    </style:style>
    <style:style style:parent-style-name="832" style:display-name="T81" style:family="text" style:name="1660">
      <style:paragraph-properties/>
      <style:text-properties fo:font-family="OpenSymbol" style:font-family-complex="OpenSymbol"/>
    </style:style>
    <style:style style:parent-style-name="832" style:display-name="T82" style:family="text" style:name="1661">
      <style:paragraph-properties/>
      <style:text-properties fo:font-family="Symbol" style:font-family-complex="Symbol"/>
    </style:style>
    <style:style style:parent-style-name="832" style:display-name="T83" style:family="text" style:name="1662">
      <style:paragraph-properties/>
      <style:text-properties fo:font-family="Symbol" style:font-family-complex="Symbol"/>
    </style:style>
    <style:style style:parent-style-name="832" style:display-name="T84" style:family="text" style:name="1663">
      <style:paragraph-properties/>
      <style:text-properties fo:font-family="Symbol" style:font-family-complex="Symbol"/>
    </style:style>
    <style:style style:parent-style-name="832" style:display-name="T85" style:family="text" style:name="1664">
      <style:paragraph-properties/>
      <style:text-properties fo:font-family="Symbol" style:font-family-complex="Symbol"/>
    </style:style>
    <style:style style:parent-style-name="832" style:display-name="T86" style:family="text" style:name="1665">
      <style:paragraph-properties/>
      <style:text-properties fo:font-family="Symbol" style:font-family-complex="Symbol"/>
    </style:style>
    <style:style style:parent-style-name="832" style:display-name="T87" style:family="text" style:name="1666">
      <style:paragraph-properties/>
      <style:text-properties fo:font-family="Symbol" style:font-family-complex="Symbol"/>
    </style:style>
    <style:style style:parent-style-name="832" style:display-name="T88" style:family="text" style:name="1667">
      <style:paragraph-properties/>
      <style:text-properties fo:font-family="Symbol" style:font-family-complex="Symbol"/>
    </style:style>
    <style:style style:parent-style-name="832" style:display-name="T89" style:family="text" style:name="1668">
      <style:paragraph-properties/>
      <style:text-properties fo:font-family="Symbol" style:font-family-complex="Symbol"/>
    </style:style>
    <style:style style:parent-style-name="832" style:display-name="T90" style:family="text" style:name="1669">
      <style:paragraph-properties/>
      <style:text-properties fo:font-family="Symbol" style:font-family-complex="Symbol"/>
    </style:style>
    <style:style style:parent-style-name="832" style:display-name="T91" style:family="text" style:name="1670">
      <style:paragraph-properties/>
      <style:text-properties fo:font-family="Symbol" style:font-family-complex="Symbol"/>
    </style:style>
    <style:style style:parent-style-name="832" style:display-name="T92" style:family="text" style:name="1671">
      <style:paragraph-properties/>
      <style:text-properties fo:font-family="Symbol" style:font-family-complex="Symbol"/>
    </style:style>
    <style:style style:parent-style-name="832" style:display-name="T93" style:family="text" style:name="1672">
      <style:paragraph-properties/>
      <style:text-properties fo:font-family="Symbol" style:font-family-complex="Symbol"/>
    </style:style>
    <style:style style:parent-style-name="832" style:display-name="T94" style:family="text" style:name="1673">
      <style:paragraph-properties/>
      <style:text-properties fo:font-family="Symbol" style:font-family-complex="Symbol"/>
    </style:style>
    <style:style style:parent-style-name="832" style:display-name="T95" style:family="text" style:name="1674">
      <style:paragraph-properties/>
      <style:text-properties fo:font-family="Symbol" style:font-family-complex="Symbol"/>
    </style:style>
    <style:style style:parent-style-name="832" style:display-name="T96" style:family="text" style:name="1675">
      <style:paragraph-properties/>
      <style:text-properties fo:font-family="Symbol" style:font-family-complex="Symbol"/>
    </style:style>
    <style:style style:parent-style-name="832" style:display-name="T97" style:family="text" style:name="1676">
      <style:paragraph-properties/>
      <style:text-properties fo:font-family="Symbol" style:font-family-complex="Symbol"/>
    </style:style>
    <style:style style:parent-style-name="832" style:display-name="T98" style:family="text" style:name="1677">
      <style:paragraph-properties/>
      <style:text-properties fo:font-family="Symbol" style:font-family-complex="Symbol"/>
    </style:style>
    <style:style style:parent-style-name="832" style:display-name="T99" style:family="text" style:name="1678">
      <style:paragraph-properties/>
      <style:text-properties fo:font-family="Symbol" style:font-family-complex="Symbol"/>
    </style:style>
    <style:style style:parent-style-name="832" style:display-name="T100" style:family="text" style:name="1679">
      <style:paragraph-properties/>
      <style:text-properties fo:font-family="Symbol" style:font-family-complex="Symbol"/>
    </style:style>
    <style:style style:parent-style-name="832" style:display-name="T101" style:family="text" style:name="1680">
      <style:paragraph-properties/>
      <style:text-properties fo:font-family="OpenSymbol" style:font-family-complex="OpenSymbol"/>
    </style:style>
    <style:style style:parent-style-name="832" style:display-name="T102" style:family="text" style:name="1681">
      <style:paragraph-properties/>
      <style:text-properties fo:font-family="OpenSymbol" style:font-family-complex="OpenSymbol"/>
    </style:style>
    <style:style style:parent-style-name="832" style:display-name="T103" style:family="text" style:name="1682">
      <style:paragraph-properties/>
      <style:text-properties fo:font-family="Symbol" style:font-family-complex="Symbol"/>
    </style:style>
    <style:style style:parent-style-name="832" style:display-name="T104" style:family="text" style:name="1683">
      <style:paragraph-properties/>
      <style:text-properties fo:font-family="OpenSymbol" style:font-family-complex="OpenSymbol"/>
    </style:style>
    <style:style style:parent-style-name="832" style:display-name="T105" style:family="text" style:name="1684">
      <style:paragraph-properties/>
      <style:text-properties fo:font-family="OpenSymbol" style:font-family-complex="OpenSymbol"/>
    </style:style>
    <style:style style:parent-style-name="832" style:display-name="T106" style:family="text" style:name="1685">
      <style:paragraph-properties/>
      <style:text-properties fo:font-family="Symbol" style:font-family-complex="Symbol"/>
    </style:style>
    <style:style style:parent-style-name="832" style:display-name="T107" style:family="text" style:name="1686">
      <style:paragraph-properties/>
      <style:text-properties fo:font-family="OpenSymbol" style:font-family-complex="OpenSymbol"/>
    </style:style>
    <style:style style:parent-style-name="832" style:display-name="T108" style:family="text" style:name="1687">
      <style:paragraph-properties/>
      <style:text-properties fo:font-family="OpenSymbol" style:font-family-complex="OpenSymbol"/>
    </style:style>
    <style:style style:parent-style-name="832" style:display-name="T109" style:family="text" style:name="1688">
      <style:paragraph-properties/>
      <style:text-properties fo:font-family="Symbol" style:font-family-complex="Symbol"/>
    </style:style>
    <style:style style:parent-style-name="832" style:display-name="T110" style:family="text" style:name="1689">
      <style:paragraph-properties/>
      <style:text-properties fo:font-family="Symbol" style:font-family-complex="Symbol"/>
    </style:style>
    <style:style style:parent-style-name="832" style:display-name="T111" style:family="text" style:name="1690">
      <style:paragraph-properties/>
      <style:text-properties fo:font-family="Symbol" style:font-family-complex="Symbol"/>
    </style:style>
    <style:style style:parent-style-name="832" style:display-name="T112" style:family="text" style:name="1691">
      <style:paragraph-properties/>
      <style:text-properties fo:font-family="Symbol" style:font-family-complex="Symbol"/>
    </style:style>
    <style:style style:parent-style-name="832" style:display-name="T113" style:family="text" style:name="1692">
      <style:paragraph-properties/>
      <style:text-properties fo:font-family="Symbol" style:font-family-complex="Symbol"/>
    </style:style>
    <style:style style:parent-style-name="832" style:display-name="T114" style:family="text" style:name="1693">
      <style:paragraph-properties/>
      <style:text-properties fo:font-family="Symbol" style:font-family-complex="Symbol"/>
    </style:style>
    <style:style style:parent-style-name="832" style:display-name="T115" style:family="text" style:name="1694">
      <style:paragraph-properties/>
      <style:text-properties fo:font-family="Symbol" style:font-family-complex="Symbol"/>
    </style:style>
    <style:style style:parent-style-name="832" style:display-name="T116" style:family="text" style:name="1695">
      <style:paragraph-properties/>
      <style:text-properties fo:font-family="Symbol" style:font-family-complex="Symbol"/>
    </style:style>
    <style:style style:parent-style-name="832" style:display-name="T117" style:family="text" style:name="1696">
      <style:paragraph-properties/>
      <style:text-properties fo:font-family="Symbol" style:font-family-complex="Symbol"/>
    </style:style>
    <style:style style:parent-style-name="832" style:display-name="T118" style:family="text" style:name="1697">
      <style:paragraph-properties/>
      <style:text-properties fo:font-family="Symbol" style:font-family-complex="Symbol"/>
    </style:style>
    <style:style style:parent-style-name="832" style:display-name="T119" style:family="text" style:name="1698">
      <style:paragraph-properties/>
      <style:text-properties fo:font-family="Symbol" style:font-family-complex="Symbol"/>
    </style:style>
    <style:style style:parent-style-name="832" style:display-name="T120" style:family="text" style:name="1699">
      <style:paragraph-properties/>
      <style:text-properties fo:font-family="Symbol" style:font-family-complex="Symbol"/>
    </style:style>
    <style:style style:parent-style-name="832" style:display-name="T121" style:family="text" style:name="1700">
      <style:paragraph-properties/>
      <style:text-properties fo:font-family="Symbol" style:font-family-complex="Symbol"/>
    </style:style>
    <style:style style:parent-style-name="832" style:display-name="T122" style:family="text" style:name="1701">
      <style:paragraph-properties/>
      <style:text-properties fo:font-family="Symbol" style:font-family-complex="Symbol"/>
    </style:style>
    <style:style style:parent-style-name="832" style:display-name="T123" style:family="text" style:name="1702">
      <style:paragraph-properties/>
      <style:text-properties fo:font-family="Symbol" style:font-family-complex="Symbol"/>
    </style:style>
    <style:style style:parent-style-name="832" style:display-name="T124" style:family="text" style:name="1703">
      <style:paragraph-properties/>
      <style:text-properties fo:font-family="Symbol" style:font-family-complex="Symbol"/>
    </style:style>
    <style:style style:parent-style-name="832" style:display-name="T125" style:family="text" style:name="1704">
      <style:paragraph-properties/>
      <style:text-properties fo:font-family="Symbol" style:font-family-complex="Symbol"/>
    </style:style>
    <style:style style:parent-style-name="832" style:display-name="T126" style:family="text" style:name="1705">
      <style:paragraph-properties/>
      <style:text-properties fo:font-family="Symbol" style:font-family-complex="Symbol"/>
    </style:style>
    <style:style style:parent-style-name="832" style:display-name="T127" style:family="text" style:name="1706">
      <style:paragraph-properties/>
      <style:text-properties fo:font-family="Symbol" style:font-family-complex="Symbol"/>
    </style:style>
    <style:style style:parent-style-name="832" style:display-name="T128" style:family="text" style:name="1707">
      <style:paragraph-properties/>
      <style:text-properties fo:font-family="Symbol" style:font-family-complex="Symbol"/>
    </style:style>
    <style:style style:parent-style-name="832" style:display-name="T129" style:family="text" style:name="1708">
      <style:paragraph-properties/>
      <style:text-properties fo:font-family="Symbol" style:font-family-complex="Symbol"/>
    </style:style>
    <style:style style:parent-style-name="832" style:display-name="T130" style:family="text" style:name="1709">
      <style:paragraph-properties/>
      <style:text-properties fo:font-family="Symbol" style:font-family-complex="Symbol"/>
    </style:style>
    <style:style style:parent-style-name="832" style:display-name="T131" style:family="text" style:name="1710">
      <style:paragraph-properties/>
      <style:text-properties fo:font-family="Symbol" style:font-family-complex="Symbol"/>
    </style:style>
    <style:style style:parent-style-name="832" style:display-name="T132" style:family="text" style:name="1711">
      <style:paragraph-properties/>
      <style:text-properties fo:font-family="Symbol" style:font-family-complex="Symbol"/>
    </style:style>
    <style:style style:parent-style-name="832" style:display-name="T133" style:family="text" style:name="1712">
      <style:paragraph-properties/>
      <style:text-properties fo:font-family="Symbol" style:font-family-complex="Symbol"/>
    </style:style>
    <style:style style:parent-style-name="832" style:display-name="T134" style:family="text" style:name="1713">
      <style:paragraph-properties/>
      <style:text-properties fo:font-family="Symbol" style:font-family-complex="Symbol"/>
    </style:style>
    <style:style style:parent-style-name="832" style:display-name="T135" style:family="text" style:name="1714">
      <style:paragraph-properties/>
      <style:text-properties fo:font-family="Symbol" style:font-family-complex="Symbol"/>
    </style:style>
    <style:style style:parent-style-name="832" style:display-name="T136" style:family="text" style:name="1715">
      <style:paragraph-properties/>
      <style:text-properties fo:font-family="Symbol" style:font-family-complex="Symbol"/>
    </style:style>
    <style:style style:parent-style-name="832" style:display-name="T137" style:family="text" style:name="1716">
      <style:paragraph-properties/>
      <style:text-properties fo:font-family="Symbol" style:font-family-complex="Symbol"/>
    </style:style>
    <style:style style:parent-style-name="832" style:display-name="T138" style:family="text" style:name="1717">
      <style:paragraph-properties/>
      <style:text-properties fo:font-family="Symbol" style:font-family-complex="Symbol"/>
    </style:style>
    <style:style style:parent-style-name="832" style:display-name="T139" style:family="text" style:name="1718">
      <style:paragraph-properties/>
      <style:text-properties fo:font-family="Symbol" style:font-family-complex="Symbol"/>
    </style:style>
    <style:style style:parent-style-name="832" style:display-name="T140" style:family="text" style:name="1719">
      <style:paragraph-properties/>
      <style:text-properties fo:font-family="Symbol" style:font-family-complex="Symbol"/>
    </style:style>
    <style:style style:parent-style-name="832" style:display-name="T141" style:family="text" style:name="1720">
      <style:paragraph-properties/>
      <style:text-properties fo:font-family="Symbol" style:font-family-complex="Symbol"/>
    </style:style>
    <style:style style:parent-style-name="832" style:display-name="T142" style:family="text" style:name="1721">
      <style:paragraph-properties/>
      <style:text-properties fo:font-family="Symbol" style:font-family-complex="Symbol"/>
    </style:style>
    <style:style style:parent-style-name="832" style:display-name="T143" style:family="text" style:name="1722">
      <style:paragraph-properties/>
      <style:text-properties fo:font-family="Symbol" style:font-family-complex="Symbol"/>
    </style:style>
    <style:style style:parent-style-name="832" style:display-name="T144" style:family="text" style:name="1723">
      <style:paragraph-properties/>
      <style:text-properties fo:font-family="Symbol" style:font-family-complex="Symbol"/>
    </style:style>
    <style:style style:parent-style-name="832" style:display-name="T145" style:family="text" style:name="1724">
      <style:paragraph-properties/>
      <style:text-properties fo:font-family="Symbol" style:font-family-complex="Symbol"/>
    </style:style>
    <style:style style:parent-style-name="832" style:display-name="T146" style:family="text" style:name="1725">
      <style:paragraph-properties/>
      <style:text-properties fo:font-family="Symbol" style:font-family-complex="Symbol"/>
    </style:style>
    <style:style style:parent-style-name="832" style:display-name="T147" style:family="text" style:name="1726">
      <style:paragraph-properties/>
      <style:text-properties fo:font-family="Symbol" style:font-family-complex="Symbol"/>
    </style:style>
    <style:style style:parent-style-name="832" style:display-name="T148" style:family="text" style:name="1727">
      <style:paragraph-properties/>
      <style:text-properties fo:font-family="Symbol" style:font-family-complex="Symbol"/>
    </style:style>
    <style:style style:parent-style-name="832" style:display-name="T149" style:family="text" style:name="1728">
      <style:paragraph-properties/>
      <style:text-properties fo:font-family="Symbol" style:font-family-complex="Symbol"/>
    </style:style>
    <style:style style:parent-style-name="832" style:display-name="T150" style:family="text" style:name="1729">
      <style:paragraph-properties/>
      <style:text-properties fo:font-family="Symbol" style:font-family-complex="Symbol"/>
    </style:style>
    <style:style style:parent-style-name="832" style:display-name="T151" style:family="text" style:name="1730">
      <style:paragraph-properties/>
      <style:text-properties fo:font-family="Symbol" style:font-family-complex="Symbol"/>
    </style:style>
    <style:style style:parent-style-name="832" style:display-name="T152" style:family="text" style:name="1731">
      <style:paragraph-properties/>
      <style:text-properties fo:font-family="Symbol" style:font-family-complex="Symbol"/>
    </style:style>
    <style:style style:parent-style-name="832" style:display-name="T153" style:family="text" style:name="1732">
      <style:paragraph-properties/>
      <style:text-properties fo:font-family="Symbol" style:font-family-complex="Symbol"/>
    </style:style>
    <style:style style:parent-style-name="832" style:display-name="T154" style:family="text" style:name="1733">
      <style:paragraph-properties/>
      <style:text-properties fo:font-family="Symbol" style:font-family-complex="Symbol"/>
    </style:style>
    <style:style style:parent-style-name="832" style:display-name="T155" style:family="text" style:name="1734">
      <style:paragraph-properties/>
      <style:text-properties fo:font-family="Symbol" style:font-family-complex="Symbol"/>
    </style:style>
    <style:style style:parent-style-name="832" style:display-name="T156" style:family="text" style:name="1735">
      <style:paragraph-properties/>
      <style:text-properties fo:font-family="Symbol" style:font-family-complex="Symbol"/>
    </style:style>
    <style:style style:parent-style-name="832" style:display-name="T157" style:family="text" style:name="1736">
      <style:paragraph-properties/>
      <style:text-properties fo:font-family="Symbol" style:font-family-complex="Symbol"/>
    </style:style>
    <style:style style:parent-style-name="832" style:display-name="T158" style:family="text" style:name="1737">
      <style:paragraph-properties/>
      <style:text-properties fo:font-family="Symbol" style:font-family-complex="Symbol"/>
    </style:style>
    <style:style style:parent-style-name="832" style:display-name="T159" style:family="text" style:name="1738">
      <style:paragraph-properties/>
      <style:text-properties fo:font-family="Symbol" style:font-family-complex="Symbol"/>
    </style:style>
    <style:style style:parent-style-name="832" style:display-name="T160" style:family="text" style:name="1739">
      <style:paragraph-properties/>
      <style:text-properties fo:font-family="Symbol" style:font-family-complex="Symbol"/>
    </style:style>
    <style:style style:parent-style-name="832" style:display-name="T161" style:family="text" style:name="1740">
      <style:paragraph-properties/>
      <style:text-properties fo:font-family="Symbol" style:font-family-complex="Symbol"/>
    </style:style>
    <style:style style:parent-style-name="832" style:display-name="T162" style:family="text" style:name="1741">
      <style:paragraph-properties/>
      <style:text-properties fo:font-family="Symbol" style:font-family-complex="Symbol"/>
    </style:style>
    <style:style style:parent-style-name="832" style:display-name="T163" style:family="text" style:name="1742">
      <style:paragraph-properties/>
      <style:text-properties fo:font-family="Symbol" style:font-family-complex="Symbol"/>
    </style:style>
    <style:style style:parent-style-name="832" style:display-name="T164" style:family="text" style:name="1743">
      <style:paragraph-properties/>
      <style:text-properties fo:font-family="Symbol" style:font-family-complex="Symbol"/>
    </style:style>
    <style:style style:parent-style-name="832" style:display-name="T165" style:family="text" style:name="1744">
      <style:paragraph-properties/>
      <style:text-properties fo:font-family="Symbol" style:font-family-complex="Symbol"/>
    </style:style>
    <style:style style:parent-style-name="832" style:display-name="T166" style:family="text" style:name="1745">
      <style:paragraph-properties/>
      <style:text-properties fo:font-family="Symbol" style:font-family-complex="Symbol"/>
    </style:style>
    <style:style style:parent-style-name="832" style:display-name="T167" style:family="text" style:name="1746">
      <style:paragraph-properties/>
      <style:text-properties fo:font-family="Symbol" style:font-family-complex="Symbol"/>
    </style:style>
    <style:style style:parent-style-name="832" style:display-name="T168" style:family="text" style:name="1747">
      <style:paragraph-properties/>
      <style:text-properties fo:font-family="Symbol" style:font-family-complex="Symbol"/>
    </style:style>
    <style:style style:parent-style-name="832" style:display-name="T169" style:family="text" style:name="1748">
      <style:paragraph-properties/>
      <style:text-properties fo:font-family="Symbol" style:font-family-complex="Symbol"/>
    </style:style>
    <style:style style:parent-style-name="832" style:display-name="T170" style:family="text" style:name="1749">
      <style:paragraph-properties/>
      <style:text-properties fo:font-family="Symbol" style:font-family-complex="Symbol"/>
    </style:style>
    <style:style style:parent-style-name="832" style:display-name="T171" style:family="text" style:name="1750">
      <style:paragraph-properties/>
      <style:text-properties fo:font-family="Symbol" style:font-family-complex="Symbol"/>
    </style:style>
    <style:style style:parent-style-name="832" style:display-name="T172" style:family="text" style:name="1751">
      <style:paragraph-properties/>
      <style:text-properties fo:font-family="Symbol" style:font-family-complex="Symbol"/>
    </style:style>
    <style:style style:parent-style-name="832" style:display-name="T173" style:family="text" style:name="1752">
      <style:paragraph-properties/>
      <style:text-properties fo:font-family="Symbol" style:font-family-complex="Symbol"/>
    </style:style>
    <style:style style:parent-style-name="832" style:display-name="T174" style:family="text" style:name="1753">
      <style:paragraph-properties/>
      <style:text-properties fo:font-family="Symbol" style:font-family-complex="Symbol"/>
    </style:style>
    <style:style style:parent-style-name="832" style:display-name="T175" style:family="text" style:name="1754">
      <style:paragraph-properties/>
      <style:text-properties fo:font-family="Symbol" style:font-family-complex="Symbol"/>
    </style:style>
    <style:style style:parent-style-name="832" style:display-name="T176" style:family="text" style:name="1755">
      <style:paragraph-properties/>
      <style:text-properties fo:font-family="Symbol" style:font-family-complex="Symbol"/>
    </style:style>
    <style:style style:parent-style-name="832" style:display-name="T177" style:family="text" style:name="1756">
      <style:paragraph-properties/>
      <style:text-properties fo:font-family="Symbol" style:font-family-complex="Symbol"/>
    </style:style>
    <style:style style:parent-style-name="832" style:display-name="T178" style:family="text" style:name="1757">
      <style:paragraph-properties/>
      <style:text-properties fo:font-family="Symbol" style:font-family-complex="Symbol"/>
    </style:style>
    <style:style style:parent-style-name="832" style:display-name="T179" style:family="text" style:name="1758">
      <style:paragraph-properties/>
      <style:text-properties fo:font-family="Symbol" style:font-family-complex="Symbol"/>
    </style:style>
    <style:style style:parent-style-name="832" style:display-name="T180" style:family="text" style:name="1759">
      <style:paragraph-properties/>
      <style:text-properties fo:font-family="Symbol" style:font-family-complex="Symbol"/>
    </style:style>
    <style:style style:parent-style-name="832" style:display-name="T181" style:family="text" style:name="1760">
      <style:paragraph-properties/>
      <style:text-properties fo:font-family="Symbol" style:font-family-complex="Symbol"/>
    </style:style>
    <style:style style:parent-style-name="832" style:display-name="T182" style:family="text" style:name="1761">
      <style:paragraph-properties/>
      <style:text-properties fo:font-family="Symbol" style:font-family-complex="Symbol"/>
    </style:style>
    <style:style style:parent-style-name="832" style:display-name="T183" style:family="text" style:name="1762">
      <style:paragraph-properties/>
      <style:text-properties fo:font-family="Symbol" style:font-family-complex="Symbol"/>
    </style:style>
    <style:style style:parent-style-name="832" style:display-name="T184" style:family="text" style:name="1763">
      <style:paragraph-properties/>
      <style:text-properties fo:font-family="Symbol" style:font-family-complex="Symbol"/>
    </style:style>
    <style:style style:parent-style-name="832" style:display-name="T185" style:family="text" style:name="1764">
      <style:paragraph-properties/>
      <style:text-properties fo:font-family="Symbol" style:font-family-complex="Symbol"/>
    </style:style>
    <style:style style:parent-style-name="832" style:display-name="T186" style:family="text" style:name="1765">
      <style:paragraph-properties/>
      <style:text-properties fo:font-family="Symbol" style:font-family-complex="Symbol"/>
    </style:style>
    <style:style style:parent-style-name="832" style:display-name="T187" style:family="text" style:name="1766">
      <style:paragraph-properties/>
      <style:text-properties fo:font-family="Symbol" style:font-family-complex="Symbol"/>
    </style:style>
    <style:style style:parent-style-name="832" style:display-name="T188" style:family="text" style:name="1767">
      <style:paragraph-properties/>
      <style:text-properties fo:font-family="Symbol" style:font-family-complex="Symbol"/>
    </style:style>
    <style:style style:parent-style-name="832" style:display-name="T189" style:family="text" style:name="1768">
      <style:paragraph-properties/>
      <style:text-properties fo:font-family="Symbol" style:font-family-complex="Symbol"/>
    </style:style>
    <style:style style:parent-style-name="832" style:display-name="T190" style:family="text" style:name="1769">
      <style:paragraph-properties/>
      <style:text-properties fo:font-family="Symbol" style:font-family-complex="Symbol"/>
    </style:style>
    <style:style style:parent-style-name="832" style:display-name="T191" style:family="text" style:name="1770">
      <style:paragraph-properties/>
      <style:text-properties fo:font-family="Symbol" style:font-family-complex="Symbol"/>
    </style:style>
    <style:style style:parent-style-name="832" style:display-name="T192" style:family="text" style:name="1771">
      <style:paragraph-properties/>
      <style:text-properties fo:font-family="Symbol" style:font-family-complex="Symbol"/>
    </style:style>
    <style:style style:parent-style-name="832" style:display-name="T193" style:family="text" style:name="1772">
      <style:paragraph-properties/>
      <style:text-properties fo:font-family="Symbol" style:font-family-complex="Symbol"/>
    </style:style>
    <style:style style:parent-style-name="832" style:display-name="T194" style:family="text" style:name="1773">
      <style:paragraph-properties/>
      <style:text-properties fo:font-family="Symbol" style:font-family-complex="Symbol"/>
    </style:style>
    <style:style style:parent-style-name="832" style:display-name="T195" style:family="text" style:name="1774">
      <style:paragraph-properties/>
      <style:text-properties fo:font-family="Symbol" style:font-family-complex="Symbol"/>
    </style:style>
    <style:style style:parent-style-name="832" style:display-name="T196" style:family="text" style:name="1775">
      <style:paragraph-properties/>
      <style:text-properties fo:font-family="Symbol" style:font-family-complex="Symbol"/>
    </style:style>
    <style:style style:parent-style-name="832" style:display-name="T197" style:family="text" style:name="1776">
      <style:paragraph-properties/>
      <style:text-properties fo:font-family="Symbol" style:font-family-complex="Symbol"/>
    </style:style>
    <style:style style:parent-style-name="832" style:display-name="T198" style:family="text" style:name="1777">
      <style:paragraph-properties/>
      <style:text-properties fo:font-family="Symbol" style:font-family-complex="Symbol"/>
    </style:style>
    <style:style style:parent-style-name="832" style:display-name="T199" style:family="text" style:name="1778">
      <style:paragraph-properties/>
      <style:text-properties fo:font-family="Symbol" style:font-family-complex="Symbol"/>
    </style:style>
    <style:style style:parent-style-name="832" style:display-name="T200" style:family="text" style:name="1779">
      <style:paragraph-properties/>
      <style:text-properties fo:font-family="Symbol" style:font-family-complex="Symbol"/>
    </style:style>
    <style:style style:parent-style-name="832" style:display-name="T201" style:family="text" style:name="1780">
      <style:paragraph-properties/>
      <style:text-properties fo:font-family="Symbol" style:font-family-complex="Symbol"/>
    </style:style>
    <style:style style:parent-style-name="832" style:display-name="T202" style:family="text" style:name="1781">
      <style:paragraph-properties/>
      <style:text-properties fo:font-family="Symbol" style:font-family-complex="Symbol"/>
    </style:style>
    <style:style style:parent-style-name="832" style:display-name="T203" style:family="text" style:name="1782">
      <style:paragraph-properties/>
      <style:text-properties fo:font-family="Symbol" style:font-family-complex="Symbol"/>
    </style:style>
    <style:style style:parent-style-name="832" style:display-name="T204" style:family="text" style:name="1783">
      <style:paragraph-properties/>
      <style:text-properties fo:font-family="Symbol" style:font-family-complex="Symbol"/>
    </style:style>
    <style:style style:parent-style-name="832" style:display-name="T205" style:family="text" style:name="1784">
      <style:paragraph-properties/>
      <style:text-properties fo:font-family="Symbol" style:font-family-complex="Symbol"/>
    </style:style>
    <style:style style:parent-style-name="832" style:display-name="T206" style:family="text" style:name="1785">
      <style:paragraph-properties/>
      <style:text-properties fo:font-family="Symbol" style:font-family-complex="Symbol"/>
    </style:style>
    <style:style style:parent-style-name="832" style:display-name="T207" style:family="text" style:name="1786">
      <style:paragraph-properties/>
      <style:text-properties fo:font-family="Symbol" style:font-family-complex="Symbol"/>
    </style:style>
    <style:style style:parent-style-name="832" style:display-name="T208" style:family="text" style:name="1787">
      <style:paragraph-properties/>
      <style:text-properties fo:font-family="Symbol" style:font-family-complex="Symbol"/>
    </style:style>
    <style:style style:parent-style-name="832" style:display-name="T209" style:family="text" style:name="1788">
      <style:paragraph-properties/>
    </style:style>
    <style:style style:parent-style-name="832" style:display-name="T210" style:family="text" style:name="1789">
      <style:paragraph-properties/>
    </style:style>
    <style:style style:parent-style-name="832" style:display-name="T211" style:family="text" style:name="1790">
      <style:paragraph-properties/>
    </style:style>
    <style:style style:parent-style-name="832" style:display-name="T212" style:family="text" style:name="1791">
      <style:paragraph-properties/>
    </style:style>
    <style:style style:parent-style-name="832" style:display-name="T213" style:family="text" style:name="1792">
      <style:paragraph-properties/>
    </style:style>
    <style:style style:parent-style-name="832" style:display-name="T214" style:family="text" style:name="1793">
      <style:paragraph-properties/>
    </style:style>
    <style:style style:parent-style-name="832" style:display-name="T215" style:family="text" style:name="1794">
      <style:paragraph-properties/>
    </style:style>
    <style:style style:parent-style-name="832" style:display-name="T216" style:family="text" style:name="1795">
      <style:paragraph-properties/>
    </style:style>
    <style:style style:parent-style-name="832" style:display-name="T217" style:family="text" style:name="1796">
      <style:paragraph-properties/>
      <style:text-properties fo:font-family="Symbol" style:font-family-complex="Symbol"/>
    </style:style>
    <style:style style:parent-style-name="832" style:display-name="T218" style:family="text" style:name="1797">
      <style:paragraph-properties/>
    </style:style>
    <style:style style:parent-style-name="832" style:display-name="T219" style:family="text" style:name="1798">
      <style:paragraph-properties/>
    </style:style>
    <style:style style:parent-style-name="832" style:display-name="T220" style:family="text" style:name="1799">
      <style:paragraph-properties/>
    </style:style>
    <style:style style:parent-style-name="832" style:display-name="T221" style:family="text" style:name="1800">
      <style:paragraph-properties/>
    </style:style>
    <style:style style:parent-style-name="832" style:display-name="T222" style:family="text" style:name="1801">
      <style:paragraph-properties/>
    </style:style>
    <style:style style:parent-style-name="832" style:display-name="T223" style:family="text" style:name="1802">
      <style:paragraph-properties/>
    </style:style>
    <style:style style:parent-style-name="832" style:display-name="T224" style:family="text" style:name="1803">
      <style:paragraph-properties/>
    </style:style>
    <style:style style:parent-style-name="832" style:display-name="T225" style:family="text" style:name="1804">
      <style:paragraph-properties/>
    </style:style>
    <style:style style:parent-style-name="832" style:display-name="T226" style:family="text" style:name="1805">
      <style:paragraph-properties/>
      <style:text-properties fo:font-family="Symbol" style:font-family-complex="Symbol"/>
    </style:style>
    <style:style style:parent-style-name="832" style:display-name="T227" style:family="text" style:name="1806">
      <style:paragraph-properties/>
    </style:style>
    <style:style style:parent-style-name="832" style:display-name="T228" style:family="text" style:name="1807">
      <style:paragraph-properties/>
    </style:style>
    <style:style style:parent-style-name="832" style:display-name="T229" style:family="text" style:name="1808">
      <style:paragraph-properties/>
    </style:style>
    <style:style style:parent-style-name="832" style:display-name="T230" style:family="text" style:name="1809">
      <style:paragraph-properties/>
    </style:style>
    <style:style style:parent-style-name="832" style:display-name="T231" style:family="text" style:name="1810">
      <style:paragraph-properties/>
    </style:style>
    <style:style style:parent-style-name="832" style:display-name="T232" style:family="text" style:name="1811">
      <style:paragraph-properties/>
    </style:style>
    <style:style style:parent-style-name="832" style:display-name="T233" style:family="text" style:name="1812">
      <style:paragraph-properties/>
    </style:style>
    <style:style style:parent-style-name="832" style:display-name="T234" style:family="text" style:name="1813">
      <style:paragraph-properties/>
    </style:style>
    <style:style style:parent-style-name="832" style:display-name="T235" style:family="text" style:name="1814">
      <style:paragraph-properties/>
      <style:text-properties fo:font-family="Symbol" style:font-family-complex="Symbol"/>
    </style:style>
    <style:style style:parent-style-name="832" style:display-name="T236" style:family="text" style:name="1815">
      <style:paragraph-properties/>
      <style:text-properties fo:font-family="OpenSymbol" style:font-family-complex="OpenSymbol"/>
    </style:style>
    <style:style style:parent-style-name="832" style:display-name="T237" style:family="text" style:name="1816">
      <style:paragraph-properties/>
      <style:text-properties fo:font-family="OpenSymbol" style:font-family-complex="OpenSymbol"/>
    </style:style>
    <style:style style:parent-style-name="832" style:display-name="T238" style:family="text" style:name="1817">
      <style:paragraph-properties/>
      <style:text-properties fo:font-family="Symbol" style:font-family-complex="Symbol"/>
    </style:style>
    <style:style style:parent-style-name="832" style:display-name="T239" style:family="text" style:name="1818">
      <style:paragraph-properties/>
      <style:text-properties fo:font-family="OpenSymbol" style:font-family-complex="OpenSymbol"/>
    </style:style>
    <style:style style:parent-style-name="832" style:display-name="T240" style:family="text" style:name="1819">
      <style:paragraph-properties/>
      <style:text-properties fo:font-family="OpenSymbol" style:font-family-complex="OpenSymbol"/>
    </style:style>
    <style:style style:parent-style-name="832" style:display-name="T241" style:family="text" style:name="1820">
      <style:paragraph-properties/>
      <style:text-properties fo:font-family="Symbol" style:font-family-complex="Symbol"/>
    </style:style>
    <style:style style:parent-style-name="832" style:display-name="T242" style:family="text" style:name="1821">
      <style:paragraph-properties/>
      <style:text-properties fo:font-family="OpenSymbol" style:font-family-complex="OpenSymbol"/>
    </style:style>
    <style:style style:parent-style-name="832" style:display-name="T243" style:family="text" style:name="1822">
      <style:paragraph-properties/>
      <style:text-properties fo:font-family="OpenSymbol" style:font-family-complex="OpenSymbol"/>
    </style:style>
    <style:style style:parent-style-name="832" style:display-name="T244" style:family="text" style:name="1823">
      <style:paragraph-properties/>
      <style:text-properties fo:font-family="Symbol" style:font-family-complex="Symbol"/>
    </style:style>
    <style:style style:parent-style-name="832" style:display-name="T245" style:family="text" style:name="1824">
      <style:paragraph-properties/>
      <style:text-properties fo:font-family="OpenSymbol" style:font-family-complex="OpenSymbol"/>
    </style:style>
    <style:style style:parent-style-name="832" style:display-name="T246" style:family="text" style:name="1825">
      <style:paragraph-properties/>
      <style:text-properties fo:font-family="OpenSymbol" style:font-family-complex="OpenSymbol"/>
    </style:style>
    <style:style style:parent-style-name="832" style:display-name="T247" style:family="text" style:name="1826">
      <style:paragraph-properties/>
      <style:text-properties fo:font-family="Symbol" style:font-family-complex="Symbol"/>
    </style:style>
    <style:style style:parent-style-name="832" style:display-name="T248" style:family="text" style:name="1827">
      <style:paragraph-properties/>
      <style:text-properties fo:font-family="OpenSymbol" style:font-family-complex="OpenSymbol"/>
    </style:style>
    <style:style style:parent-style-name="832" style:display-name="T249" style:family="text" style:name="1828">
      <style:paragraph-properties/>
      <style:text-properties fo:font-family="OpenSymbol" style:font-family-complex="OpenSymbol"/>
    </style:style>
    <style:style style:parent-style-name="832" style:display-name="T250" style:family="text" style:name="1829">
      <style:paragraph-properties/>
      <style:text-properties fo:font-family="Symbol" style:font-family-complex="Symbol"/>
    </style:style>
    <style:style style:parent-style-name="832" style:display-name="T251" style:family="text" style:name="1830">
      <style:paragraph-properties/>
      <style:text-properties fo:font-family="OpenSymbol" style:font-family-complex="OpenSymbol"/>
    </style:style>
    <style:style style:parent-style-name="832" style:display-name="T252" style:family="text" style:name="1831">
      <style:paragraph-properties/>
      <style:text-properties fo:font-family="OpenSymbol" style:font-family-complex="OpenSymbol"/>
    </style:style>
    <style:style style:parent-style-name="832" style:display-name="T253" style:family="text" style:name="1832">
      <style:paragraph-properties/>
    </style:style>
    <style:style style:parent-style-name="832" style:display-name="T254" style:family="text" style:name="1833">
      <style:paragraph-properties/>
    </style:style>
    <style:style style:parent-style-name="832" style:display-name="T255" style:family="text" style:name="1834">
      <style:paragraph-properties/>
    </style:style>
    <style:style style:parent-style-name="832" style:display-name="T256" style:family="text" style:name="1835">
      <style:paragraph-properties/>
    </style:style>
    <style:style style:parent-style-name="832" style:display-name="T257" style:family="text" style:name="1836">
      <style:paragraph-properties/>
    </style:style>
    <style:style style:parent-style-name="832" style:display-name="T258" style:family="text" style:name="1837">
      <style:paragraph-properties/>
    </style:style>
    <style:style style:parent-style-name="832" style:display-name="T259" style:family="text" style:name="1838">
      <style:paragraph-properties/>
    </style:style>
    <style:style style:parent-style-name="832" style:display-name="T260" style:family="text" style:name="1839">
      <style:paragraph-properties/>
    </style:style>
    <style:style style:parent-style-name="832" style:display-name="T261" style:family="text" style:name="1840">
      <style:paragraph-properties/>
    </style:style>
    <style:style style:parent-style-name="832" style:display-name="T262" style:family="text" style:name="1841">
      <style:paragraph-properties/>
    </style:style>
    <style:style style:parent-style-name="832" style:display-name="T263" style:family="text" style:name="1842">
      <style:paragraph-properties/>
    </style:style>
    <style:style style:parent-style-name="832" style:display-name="T264" style:family="text" style:name="1843">
      <style:paragraph-properties/>
    </style:style>
    <style:style style:parent-style-name="832" style:display-name="T265" style:family="text" style:name="1844">
      <style:paragraph-properties/>
    </style:style>
    <style:style style:parent-style-name="832" style:display-name="T266" style:family="text" style:name="1845">
      <style:paragraph-properties/>
    </style:style>
    <style:style style:parent-style-name="832" style:display-name="T267" style:family="text" style:name="1846">
      <style:paragraph-properties/>
    </style:style>
    <style:style style:parent-style-name="832" style:display-name="T268" style:family="text" style:name="1847">
      <style:paragraph-properties/>
    </style:style>
    <style:style style:parent-style-name="832" style:display-name="T269" style:family="text" style:name="1848">
      <style:paragraph-properties/>
    </style:style>
    <style:style style:parent-style-name="832" style:display-name="T270" style:family="text" style:name="1849">
      <style:paragraph-properties/>
    </style:style>
    <style:style style:parent-style-name="832" style:display-name="T271" style:family="text" style:name="1850">
      <style:paragraph-properties/>
    </style:style>
    <style:style style:parent-style-name="832" style:display-name="T272" style:family="text" style:name="1851">
      <style:paragraph-properties/>
    </style:style>
    <style:style style:parent-style-name="832" style:display-name="T273" style:family="text" style:name="1852">
      <style:paragraph-properties/>
    </style:style>
    <style:style style:parent-style-name="832" style:display-name="T274" style:family="text" style:name="1853">
      <style:paragraph-properties/>
    </style:style>
    <style:style style:parent-style-name="832" style:display-name="T275" style:family="text" style:name="1854">
      <style:paragraph-properties/>
    </style:style>
    <style:style style:parent-style-name="832" style:display-name="T276" style:family="text" style:name="1855">
      <style:paragraph-properties/>
    </style:style>
    <style:style style:parent-style-name="832" style:display-name="T277" style:family="text" style:name="1856">
      <style:paragraph-properties/>
    </style:style>
    <style:style style:parent-style-name="832" style:display-name="T278" style:family="text" style:name="1857">
      <style:paragraph-properties/>
    </style:style>
    <style:style style:parent-style-name="832" style:display-name="T279" style:family="text" style:name="1858">
      <style:paragraph-properties/>
    </style:style>
    <style:style style:parent-style-name="832" style:display-name="T280" style:family="text" style:name="1859">
      <style:paragraph-properties/>
    </style:style>
    <style:style style:parent-style-name="832" style:display-name="T281" style:family="text" style:name="1860">
      <style:paragraph-properties/>
    </style:style>
    <style:style style:parent-style-name="832" style:display-name="T282" style:family="text" style:name="1861">
      <style:paragraph-properties/>
    </style:style>
    <style:style style:parent-style-name="832" style:display-name="T283" style:family="text" style:name="1862">
      <style:paragraph-properties/>
    </style:style>
    <style:style style:parent-style-name="832" style:display-name="T284" style:family="text" style:name="1863">
      <style:paragraph-properties/>
    </style:style>
    <style:style style:parent-style-name="832" style:display-name="T285" style:family="text" style:name="1864">
      <style:paragraph-properties/>
    </style:style>
    <style:style style:parent-style-name="832" style:display-name="T286" style:family="text" style:name="1865">
      <style:paragraph-properties/>
    </style:style>
    <style:style style:parent-style-name="832" style:display-name="T287" style:family="text" style:name="1866">
      <style:paragraph-properties/>
    </style:style>
    <style:style style:parent-style-name="832" style:display-name="T288" style:family="text" style:name="1867">
      <style:paragraph-properties/>
    </style:style>
    <style:style style:parent-style-name="832" style:display-name="T289" style:family="text" style:name="1868">
      <style:paragraph-properties/>
    </style:style>
    <style:style style:parent-style-name="832" style:display-name="T290" style:family="text" style:name="1869">
      <style:paragraph-properties/>
    </style:style>
    <style:style style:parent-style-name="832" style:display-name="T291" style:family="text" style:name="1870">
      <style:paragraph-properties/>
    </style:style>
    <style:style style:parent-style-name="832" style:display-name="T292" style:family="text" style:name="1871">
      <style:paragraph-properties/>
    </style:style>
    <style:style style:parent-style-name="832" style:display-name="T293" style:family="text" style:name="1872">
      <style:paragraph-properties/>
    </style:style>
    <style:style style:parent-style-name="832" style:display-name="T294" style:family="text" style:name="1873">
      <style:paragraph-properties/>
    </style:style>
    <style:style style:parent-style-name="832" style:display-name="T295" style:family="text" style:name="1874">
      <style:paragraph-properties/>
    </style:style>
    <style:style style:parent-style-name="832" style:display-name="T296" style:family="text" style:name="1875">
      <style:paragraph-properties/>
    </style:style>
    <style:style style:parent-style-name="832" style:display-name="T297" style:family="text" style:name="1876">
      <style:paragraph-properties/>
    </style:style>
    <style:style style:parent-style-name="832" style:display-name="T298" style:family="text" style:name="1877">
      <style:paragraph-properties/>
      <style:text-properties fo:font-family="Symbol" style:font-family-complex="Symbol"/>
    </style:style>
    <style:style style:parent-style-name="832" style:display-name="T299" style:family="text" style:name="1878">
      <style:paragraph-properties/>
      <style:text-properties fo:font-family="Courier New" style:font-family-complex="Courier New"/>
    </style:style>
    <style:style style:parent-style-name="832" style:display-name="T300" style:family="text" style:name="1879">
      <style:paragraph-properties/>
      <style:text-properties fo:font-family="Wingdings" style:font-family-complex="Wingdings"/>
    </style:style>
    <style:style style:parent-style-name="832" style:display-name="T301" style:family="text" style:name="1880">
      <style:paragraph-properties/>
      <style:text-properties fo:font-family="Symbol" style:font-family-complex="Symbol"/>
    </style:style>
    <style:style style:parent-style-name="832" style:display-name="T302" style:family="text" style:name="1881">
      <style:paragraph-properties/>
      <style:text-properties fo:font-family="Courier New" style:font-family-complex="Courier New"/>
    </style:style>
    <style:style style:parent-style-name="832" style:display-name="T303" style:family="text" style:name="1882">
      <style:paragraph-properties/>
      <style:text-properties fo:font-family="Wingdings" style:font-family-complex="Wingdings"/>
    </style:style>
    <style:style style:parent-style-name="832" style:display-name="T304" style:family="text" style:name="1883">
      <style:paragraph-properties/>
      <style:text-properties fo:font-family="Symbol" style:font-family-complex="Symbol"/>
    </style:style>
    <style:style style:parent-style-name="832" style:display-name="T305" style:family="text" style:name="1884">
      <style:paragraph-properties/>
      <style:text-properties fo:font-family="Courier New" style:font-family-complex="Courier New"/>
    </style:style>
    <style:style style:parent-style-name="832" style:display-name="T306" style:family="text" style:name="1885">
      <style:paragraph-properties/>
      <style:text-properties fo:font-family="Wingdings" style:font-family-complex="Wingdings"/>
    </style:style>
    <style:style style:parent-style-name="832" style:display-name="T307" style:family="text" style:name="1886">
      <style:paragraph-properties/>
    </style:style>
    <style:style style:parent-style-name="832" style:display-name="T308" style:family="text" style:name="1887">
      <style:paragraph-properties/>
    </style:style>
    <style:style style:parent-style-name="832" style:display-name="T309" style:family="text" style:name="1888">
      <style:paragraph-properties/>
    </style:style>
    <style:style style:parent-style-name="832" style:display-name="T310" style:family="text" style:name="1889">
      <style:paragraph-properties/>
    </style:style>
    <style:style style:parent-style-name="832" style:display-name="T311" style:family="text" style:name="1890">
      <style:paragraph-properties/>
    </style:style>
    <style:style style:parent-style-name="832" style:display-name="T312" style:family="text" style:name="1891">
      <style:paragraph-properties/>
    </style:style>
    <style:style style:parent-style-name="832" style:display-name="T313" style:family="text" style:name="1892">
      <style:paragraph-properties/>
    </style:style>
    <style:style style:parent-style-name="832" style:display-name="T314" style:family="text" style:name="1893">
      <style:paragraph-properties/>
    </style:style>
    <style:style style:parent-style-name="832" style:display-name="T315" style:family="text" style:name="1894">
      <style:paragraph-properties/>
    </style:style>
    <style:style style:parent-style-name="832" style:display-name="T316" style:family="text" style:name="1895">
      <style:paragraph-properties/>
      <style:text-properties fo:color="#000000" fo:font-family="Symbol" style:font-family-complex="Symbol" fo:font-size="10pt"/>
    </style:style>
    <style:style style:parent-style-name="832" style:display-name="T317" style:family="text" style:name="1896">
      <style:paragraph-properties/>
      <style:text-properties fo:color="#000000" fo:font-family="Symbol" style:font-family-complex="Symbol" fo:font-size="10pt"/>
    </style:style>
    <style:style style:parent-style-name="832" style:display-name="T318" style:family="text" style:name="1897">
      <style:paragraph-properties/>
      <style:text-properties fo:color="#000000" fo:font-family="Symbol" style:font-family-complex="Symbol" fo:font-size="10pt"/>
    </style:style>
    <style:style style:parent-style-name="832" style:display-name="T319" style:family="text" style:name="1898">
      <style:paragraph-properties/>
      <style:text-properties fo:color="#000000" fo:font-family="Symbol" style:font-family-complex="Symbol" fo:font-size="10pt"/>
    </style:style>
    <style:style style:parent-style-name="832" style:display-name="T320" style:family="text" style:name="1899">
      <style:paragraph-properties/>
      <style:text-properties fo:color="#000000" fo:font-family="Symbol" style:font-family-complex="Symbol" fo:font-size="10pt"/>
    </style:style>
    <style:style style:parent-style-name="832" style:display-name="T321" style:family="text" style:name="1900">
      <style:paragraph-properties/>
      <style:text-properties fo:color="#000000" fo:font-family="Symbol" style:font-family-complex="Symbol" fo:font-size="10pt"/>
    </style:style>
    <style:style style:parent-style-name="832" style:display-name="T322" style:family="text" style:name="1901">
      <style:paragraph-properties/>
      <style:text-properties fo:color="#000000" fo:font-family="Symbol" style:font-family-complex="Symbol" fo:font-size="10pt"/>
    </style:style>
    <style:style style:parent-style-name="832" style:display-name="T323" style:family="text" style:name="1902">
      <style:paragraph-properties/>
      <style:text-properties fo:color="#000000" fo:font-family="Symbol" style:font-family-complex="Symbol" fo:font-size="10pt"/>
    </style:style>
    <style:style style:parent-style-name="832" style:display-name="T324" style:family="text" style:name="1903">
      <style:paragraph-properties/>
      <style:text-properties fo:color="#000000" fo:font-family="Symbol" style:font-family-complex="Symbol" fo:font-size="10pt"/>
    </style:style>
    <style:style style:parent-style-name="832" style:display-name="T325" style:family="text" style:name="1904">
      <style:paragraph-properties/>
      <style:text-properties fo:color="#000000" fo:font-family="Symbol" style:font-family-complex="Symbol" fo:font-size="10pt"/>
    </style:style>
    <style:style style:parent-style-name="832" style:display-name="T326" style:family="text" style:name="1905">
      <style:paragraph-properties/>
      <style:text-properties fo:color="#000000" fo:font-family="Symbol" style:font-family-complex="Symbol" fo:font-size="10pt"/>
    </style:style>
    <style:style style:parent-style-name="832" style:display-name="T327" style:family="text" style:name="1906">
      <style:paragraph-properties/>
      <style:text-properties fo:color="#000000" fo:font-family="Symbol" style:font-family-complex="Symbol" fo:font-size="10pt"/>
    </style:style>
    <style:style style:parent-style-name="832" style:display-name="T328" style:family="text" style:name="1907">
      <style:paragraph-properties/>
      <style:text-properties fo:color="#000000" fo:font-family="Symbol" style:font-family-complex="Symbol" fo:font-size="10pt"/>
    </style:style>
    <style:style style:parent-style-name="832" style:display-name="T329" style:family="text" style:name="1908">
      <style:paragraph-properties/>
      <style:text-properties fo:color="#000000" fo:font-family="Symbol" style:font-family-complex="Symbol" fo:font-size="10pt"/>
    </style:style>
    <style:style style:parent-style-name="832" style:display-name="T330" style:family="text" style:name="1909">
      <style:paragraph-properties/>
      <style:text-properties fo:color="#000000" fo:font-family="Symbol" style:font-family-complex="Symbol" fo:font-size="10pt"/>
    </style:style>
    <style:style style:parent-style-name="832" style:display-name="T331" style:family="text" style:name="1910">
      <style:paragraph-properties/>
      <style:text-properties fo:color="#000000" fo:font-family="Symbol" style:font-family-complex="Symbol" fo:font-size="10pt"/>
    </style:style>
    <style:style style:parent-style-name="832" style:display-name="T332" style:family="text" style:name="1911">
      <style:paragraph-properties/>
      <style:text-properties fo:color="#000000" fo:font-family="Symbol" style:font-family-complex="Symbol" fo:font-size="10pt"/>
    </style:style>
    <style:style style:parent-style-name="832" style:display-name="T333" style:family="text" style:name="1912">
      <style:paragraph-properties/>
      <style:text-properties fo:color="#000000" fo:font-family="Symbol" style:font-family-complex="Symbol" fo:font-size="10pt"/>
    </style:style>
    <style:style style:parent-style-name="832" style:display-name="T334" style:family="text" style:name="1913">
      <style:paragraph-properties/>
      <style:text-properties fo:color="#000000" fo:font-family="Symbol" style:font-family-complex="Symbol" fo:font-size="10pt"/>
    </style:style>
    <style:style style:parent-style-name="832" style:display-name="T335" style:family="text" style:name="1914">
      <style:paragraph-properties/>
      <style:text-properties fo:color="#000000" fo:font-family="Symbol" style:font-family-complex="Symbol" fo:font-size="10pt"/>
    </style:style>
    <style:style style:parent-style-name="832" style:display-name="T336" style:family="text" style:name="1915">
      <style:paragraph-properties/>
      <style:text-properties fo:color="#000000" fo:font-family="Symbol" style:font-family-complex="Symbol" fo:font-size="10pt"/>
    </style:style>
    <style:style style:parent-style-name="832" style:display-name="T337" style:family="text" style:name="1916">
      <style:paragraph-properties/>
      <style:text-properties fo:color="#000000" fo:font-family="Symbol" style:font-family-complex="Symbol" fo:font-size="10pt"/>
    </style:style>
    <style:style style:parent-style-name="832" style:display-name="T338" style:family="text" style:name="1917">
      <style:paragraph-properties/>
      <style:text-properties fo:color="#000000" fo:font-family="Symbol" style:font-family-complex="Symbol" fo:font-size="10pt"/>
    </style:style>
    <style:style style:parent-style-name="832" style:display-name="T339" style:family="text" style:name="1918">
      <style:paragraph-properties/>
      <style:text-properties fo:color="#000000" fo:font-family="Symbol" style:font-family-complex="Symbol" fo:font-size="10pt"/>
    </style:style>
    <style:style style:parent-style-name="832" style:display-name="T340" style:family="text" style:name="1919">
      <style:paragraph-properties/>
      <style:text-properties fo:color="#000000" fo:font-family="Symbol" style:font-family-complex="Symbol" fo:font-size="10pt"/>
    </style:style>
    <style:style style:parent-style-name="832" style:display-name="T341" style:family="text" style:name="1920">
      <style:paragraph-properties/>
      <style:text-properties fo:color="#000000" fo:font-family="Symbol" style:font-family-complex="Symbol" fo:font-size="10pt"/>
    </style:style>
    <style:style style:parent-style-name="832" style:display-name="T342" style:family="text" style:name="1921">
      <style:paragraph-properties/>
      <style:text-properties fo:color="#000000" fo:font-family="Symbol" style:font-family-complex="Symbol" fo:font-size="10pt"/>
    </style:style>
    <style:style style:parent-style-name="832" style:display-name="T343" style:family="text" style:name="1922">
      <style:paragraph-properties/>
      <style:text-properties fo:color="#000000" fo:font-family="Symbol" style:font-family-complex="Symbol" fo:font-size="10pt"/>
    </style:style>
    <style:style style:parent-style-name="832" style:display-name="T344" style:family="text" style:name="1923">
      <style:paragraph-properties/>
      <style:text-properties fo:color="#000000" fo:font-family="Symbol" style:font-family-complex="Symbol" fo:font-size="10pt"/>
    </style:style>
    <style:style style:parent-style-name="832" style:display-name="T345" style:family="text" style:name="1924">
      <style:paragraph-properties/>
      <style:text-properties fo:color="#000000" fo:font-family="Symbol" style:font-family-complex="Symbol" fo:font-size="10pt"/>
    </style:style>
    <style:style style:parent-style-name="832" style:display-name="T346" style:family="text" style:name="1925">
      <style:paragraph-properties/>
      <style:text-properties fo:color="#000000" fo:font-family="Symbol" style:font-family-complex="Symbol" fo:font-size="10pt"/>
    </style:style>
    <style:style style:parent-style-name="832" style:display-name="T347" style:family="text" style:name="1926">
      <style:paragraph-properties/>
      <style:text-properties fo:color="#000000" fo:font-family="Symbol" style:font-family-complex="Symbol" fo:font-size="10pt"/>
    </style:style>
    <style:style style:parent-style-name="832" style:display-name="T348" style:family="text" style:name="1927">
      <style:paragraph-properties/>
      <style:text-properties fo:color="#000000" fo:font-family="Symbol" style:font-family-complex="Symbol" fo:font-size="10pt"/>
    </style:style>
    <style:style style:parent-style-name="832" style:display-name="T349" style:family="text" style:name="1928">
      <style:paragraph-properties/>
      <style:text-properties fo:color="#000000" fo:font-family="Symbol" style:font-family-complex="Symbol" fo:font-size="10pt"/>
    </style:style>
    <style:style style:parent-style-name="832" style:display-name="T350" style:family="text" style:name="1929">
      <style:paragraph-properties/>
      <style:text-properties fo:color="#000000" fo:font-family="Symbol" style:font-family-complex="Symbol" fo:font-size="10pt"/>
    </style:style>
    <style:style style:parent-style-name="832" style:display-name="T351" style:family="text" style:name="1930">
      <style:paragraph-properties/>
      <style:text-properties fo:color="#000000" fo:font-family="Symbol" style:font-family-complex="Symbol" fo:font-size="10pt"/>
    </style:style>
    <style:style style:parent-style-name="832" style:display-name="T352" style:family="text" style:name="1931">
      <style:paragraph-properties/>
      <style:text-properties fo:color="#000000" fo:font-family="Symbol" style:font-family-complex="Symbol" fo:font-size="10pt"/>
    </style:style>
    <style:style style:parent-style-name="832" style:display-name="T353" style:family="text" style:name="1932">
      <style:paragraph-properties/>
      <style:text-properties fo:color="#000000" fo:font-family="Symbol" style:font-family-complex="Symbol" fo:font-size="10pt"/>
    </style:style>
    <style:style style:parent-style-name="832" style:display-name="T354" style:family="text" style:name="1933">
      <style:paragraph-properties/>
      <style:text-properties fo:color="#000000" fo:font-family="Symbol" style:font-family-complex="Symbol" fo:font-size="10pt"/>
    </style:style>
    <style:style style:parent-style-name="832" style:display-name="T355" style:family="text" style:name="1934">
      <style:paragraph-properties/>
      <style:text-properties fo:color="#000000" fo:font-family="Symbol" style:font-family-complex="Symbol" fo:font-size="10pt"/>
    </style:style>
    <style:style style:parent-style-name="832" style:display-name="T356" style:family="text" style:name="1935">
      <style:paragraph-properties/>
      <style:text-properties fo:color="#000000" fo:font-family="Symbol" style:font-family-complex="Symbol" fo:font-size="10pt"/>
    </style:style>
    <style:style style:parent-style-name="832" style:display-name="T357" style:family="text" style:name="1936">
      <style:paragraph-properties/>
      <style:text-properties fo:color="#000000" fo:font-family="Symbol" style:font-family-complex="Symbol" fo:font-size="10pt"/>
    </style:style>
    <style:style style:parent-style-name="832" style:display-name="T358" style:family="text" style:name="1937">
      <style:paragraph-properties/>
      <style:text-properties fo:color="#000000" fo:font-family="Symbol" style:font-family-complex="Symbol" fo:font-size="10pt"/>
    </style:style>
    <style:style style:parent-style-name="832" style:display-name="T359" style:family="text" style:name="1938">
      <style:paragraph-properties/>
      <style:text-properties fo:color="#000000" fo:font-family="Symbol" style:font-family-complex="Symbol" fo:font-size="10pt"/>
    </style:style>
    <style:style style:parent-style-name="832" style:display-name="T360" style:family="text" style:name="1939">
      <style:paragraph-properties/>
      <style:text-properties fo:color="#000000" fo:font-family="Symbol" style:font-family-complex="Symbol" fo:font-size="10pt"/>
    </style:style>
    <style:style style:parent-style-name="832" style:display-name="T361" style:family="text" style:name="1940">
      <style:paragraph-properties/>
      <style:text-properties fo:color="#000000" fo:font-family="Symbol" style:font-family-complex="Symbol" fo:font-size="10pt"/>
    </style:style>
    <style:style style:parent-style-name="832" style:display-name="T362" style:family="text" style:name="1941">
      <style:paragraph-properties/>
      <style:text-properties fo:color="#000000" fo:font-family="Symbol" style:font-family-complex="Symbol" fo:font-size="10pt"/>
    </style:style>
    <style:style style:parent-style-name="832" style:display-name="T363" style:family="text" style:name="1942">
      <style:paragraph-properties/>
      <style:text-properties fo:color="#000000" fo:font-family="Symbol" style:font-family-complex="Symbol" fo:font-size="10pt"/>
    </style:style>
    <style:style style:parent-style-name="832" style:display-name="T364" style:family="text" style:name="1943">
      <style:paragraph-properties/>
      <style:text-properties fo:color="#000000" fo:font-family="Symbol" style:font-family-complex="Symbol" fo:font-size="10pt"/>
    </style:style>
    <style:style style:parent-style-name="832" style:display-name="T365" style:family="text" style:name="1944">
      <style:paragraph-properties/>
      <style:text-properties fo:color="#000000" fo:font-family="Symbol" style:font-family-complex="Symbol" fo:font-size="10pt"/>
    </style:style>
    <style:style style:parent-style-name="832" style:display-name="T366" style:family="text" style:name="1945">
      <style:paragraph-properties/>
      <style:text-properties fo:color="#000000" fo:font-family="Symbol" style:font-family-complex="Symbol" fo:font-size="10pt"/>
    </style:style>
    <style:style style:parent-style-name="832" style:display-name="T367" style:family="text" style:name="1946">
      <style:paragraph-properties/>
      <style:text-properties fo:color="#000000" fo:font-family="Symbol" style:font-family-complex="Symbol" fo:font-size="10pt"/>
    </style:style>
    <style:style style:parent-style-name="832" style:display-name="T368" style:family="text" style:name="1947">
      <style:paragraph-properties/>
      <style:text-properties fo:color="#000000" fo:font-family="Symbol" style:font-family-complex="Symbol" fo:font-size="10pt"/>
    </style:style>
    <style:style style:parent-style-name="832" style:display-name="T369" style:family="text" style:name="1948">
      <style:paragraph-properties/>
      <style:text-properties fo:color="#000000" fo:font-family="Symbol" style:font-family-complex="Symbol" fo:font-size="10pt"/>
    </style:style>
    <style:style style:parent-style-name="832" style:display-name="T370" style:family="text" style:name="1949">
      <style:paragraph-properties/>
      <style:text-properties fo:color="#000000" fo:font-family="Symbol" style:font-family-complex="Symbol" fo:font-size="10pt"/>
    </style:style>
    <style:style style:parent-style-name="832" style:display-name="T371" style:family="text" style:name="1950">
      <style:paragraph-properties/>
      <style:text-properties fo:color="#000000" fo:font-family="Symbol" style:font-family-complex="Symbol" fo:font-size="10pt"/>
    </style:style>
    <style:style style:parent-style-name="832" style:display-name="T372" style:family="text" style:name="1951">
      <style:paragraph-properties/>
      <style:text-properties fo:color="#000000" fo:font-family="Symbol" style:font-family-complex="Symbol" fo:font-size="10pt"/>
    </style:style>
    <style:style style:parent-style-name="832" style:display-name="T373" style:family="text" style:name="1952">
      <style:paragraph-properties/>
      <style:text-properties fo:color="#000000" fo:font-family="Symbol" style:font-family-complex="Symbol" fo:font-size="10pt"/>
    </style:style>
    <style:style style:parent-style-name="832" style:display-name="T374" style:family="text" style:name="1953">
      <style:paragraph-properties/>
      <style:text-properties fo:color="#000000" fo:font-family="Symbol" style:font-family-complex="Symbol" fo:font-size="10pt"/>
    </style:style>
    <style:style style:parent-style-name="832" style:display-name="T375" style:family="text" style:name="1954">
      <style:paragraph-properties/>
      <style:text-properties fo:color="#000000" fo:font-family="Symbol" style:font-family-complex="Symbol" fo:font-size="10pt"/>
    </style:style>
    <style:style style:parent-style-name="832" style:display-name="T376" style:family="text" style:name="1955">
      <style:paragraph-properties/>
      <style:text-properties fo:color="#000000" fo:font-family="Symbol" style:font-family-complex="Symbol" fo:font-size="10pt"/>
    </style:style>
    <style:style style:parent-style-name="832" style:display-name="T377" style:family="text" style:name="1956">
      <style:paragraph-properties/>
      <style:text-properties fo:color="#000000" fo:font-family="Symbol" style:font-family-complex="Symbol" fo:font-size="10pt"/>
    </style:style>
    <style:style style:parent-style-name="832" style:display-name="T378" style:family="text" style:name="1957">
      <style:paragraph-properties/>
      <style:text-properties fo:color="#000000" fo:font-family="Symbol" style:font-family-complex="Symbol" fo:font-size="10pt"/>
    </style:style>
    <style:style style:parent-style-name="832" style:display-name="T379" style:family="text" style:name="1958">
      <style:paragraph-properties/>
      <style:text-properties fo:font-family="Symbol" style:font-family-complex="Symbol"/>
    </style:style>
    <style:style style:parent-style-name="832" style:display-name="T380" style:family="text" style:name="1959">
      <style:paragraph-properties/>
      <style:text-properties fo:font-family="Symbol" style:font-family-complex="Symbol"/>
    </style:style>
    <style:style style:parent-style-name="832" style:display-name="T381" style:family="text" style:name="1960">
      <style:paragraph-properties/>
      <style:text-properties fo:font-family="Symbol" style:font-family-complex="Symbol"/>
    </style:style>
    <style:style style:parent-style-name="832" style:display-name="T382" style:family="text" style:name="1961">
      <style:paragraph-properties/>
      <style:text-properties fo:font-family="Symbol" style:font-family-complex="Symbol"/>
    </style:style>
    <style:style style:parent-style-name="832" style:display-name="T383" style:family="text" style:name="1962">
      <style:paragraph-properties/>
      <style:text-properties fo:font-family="Symbol" style:font-family-complex="Symbol"/>
    </style:style>
    <style:style style:parent-style-name="832" style:display-name="T384" style:family="text" style:name="1963">
      <style:paragraph-properties/>
      <style:text-properties fo:font-family="Symbol" style:font-family-complex="Symbol"/>
    </style:style>
    <style:style style:parent-style-name="832" style:display-name="T385" style:family="text" style:name="1964">
      <style:paragraph-properties/>
      <style:text-properties fo:font-family="Symbol" style:font-family-complex="Symbol"/>
    </style:style>
    <style:style style:parent-style-name="832" style:display-name="T386" style:family="text" style:name="1965">
      <style:paragraph-properties/>
      <style:text-properties fo:font-family="Symbol" style:font-family-complex="Symbol"/>
    </style:style>
    <style:style style:parent-style-name="832" style:display-name="T387" style:family="text" style:name="1966">
      <style:paragraph-properties/>
      <style:text-properties fo:font-family="Symbol" style:font-family-complex="Symbol"/>
    </style:style>
    <style:style style:parent-style-name="832" style:display-name="T388" style:family="text" style:name="1967">
      <style:paragraph-properties/>
      <style:text-properties fo:font-family="Symbol" style:font-family-complex="Symbol"/>
    </style:style>
    <style:style style:parent-style-name="832" style:display-name="T389" style:family="text" style:name="1968">
      <style:paragraph-properties/>
      <style:text-properties fo:font-family="Symbol" style:font-family-complex="Symbol"/>
    </style:style>
    <style:style style:parent-style-name="832" style:display-name="T390" style:family="text" style:name="1969">
      <style:paragraph-properties/>
      <style:text-properties fo:font-family="Symbol" style:font-family-complex="Symbol"/>
    </style:style>
    <style:style style:parent-style-name="832" style:display-name="T391" style:family="text" style:name="1970">
      <style:paragraph-properties/>
      <style:text-properties fo:font-family="Symbol" style:font-family-complex="Symbol"/>
    </style:style>
    <style:style style:parent-style-name="832" style:display-name="T392" style:family="text" style:name="1971">
      <style:paragraph-properties/>
      <style:text-properties fo:font-family="Symbol" style:font-family-complex="Symbol"/>
    </style:style>
    <style:style style:parent-style-name="832" style:display-name="T393" style:family="text" style:name="1972">
      <style:paragraph-properties/>
      <style:text-properties fo:font-family="Symbol" style:font-family-complex="Symbol"/>
    </style:style>
    <style:style style:parent-style-name="832" style:display-name="T394" style:family="text" style:name="1973">
      <style:paragraph-properties/>
      <style:text-properties fo:font-family="Symbol" style:font-family-complex="Symbol"/>
    </style:style>
    <style:style style:parent-style-name="832" style:display-name="T395" style:family="text" style:name="1974">
      <style:paragraph-properties/>
      <style:text-properties fo:font-family="Symbol" style:font-family-complex="Symbol"/>
    </style:style>
    <style:style style:parent-style-name="832" style:display-name="T396" style:family="text" style:name="1975">
      <style:paragraph-properties/>
      <style:text-properties fo:font-family="Symbol" style:font-family-complex="Symbol"/>
    </style:style>
    <style:style style:parent-style-name="832" style:display-name="T1" style:family="text" style:name="1976">
      <style:paragraph-properties/>
    </style:style>
    <style:style style:parent-style-name="832" style:display-name="T2" style:family="text" style:name="1977">
      <style:paragraph-properties/>
    </style:style>
    <style:style style:parent-style-name="832" style:display-name="T3" style:family="text" style:name="1978">
      <style:paragraph-properties/>
    </style:style>
    <style:style style:parent-style-name="832" style:display-name="T4" style:family="text" style:name="1979">
      <style:paragraph-properties/>
    </style:style>
    <style:style style:parent-style-name="832" style:display-name="T5" style:family="text" style:name="1980">
      <style:paragraph-properties/>
    </style:style>
    <style:style style:parent-style-name="832" style:display-name="T6" style:family="text" style:name="1981">
      <style:paragraph-properties/>
    </style:style>
    <style:style style:parent-style-name="832" style:display-name="T7" style:family="text" style:name="1982">
      <style:paragraph-properties/>
    </style:style>
    <style:style style:parent-style-name="832" style:display-name="T8" style:family="text" style:name="1983">
      <style:paragraph-properties/>
    </style:style>
    <style:style style:parent-style-name="832" style:display-name="T9" style:family="text" style:name="1984">
      <style:paragraph-properties/>
    </style:style>
    <style:style style:parent-style-name="832" style:display-name="T10" style:family="text" style:name="1985">
      <style:paragraph-properties/>
      <style:text-properties fo:font-family="Symbol" style:font-family-complex="Symbol"/>
    </style:style>
    <style:style style:parent-style-name="832" style:display-name="T11" style:family="text" style:name="1986">
      <style:paragraph-properties/>
      <style:text-properties fo:font-family="Symbol" style:font-family-complex="Symbol"/>
    </style:style>
    <style:style style:parent-style-name="832" style:display-name="T12" style:family="text" style:name="1987">
      <style:paragraph-properties/>
      <style:text-properties fo:font-family="Symbol" style:font-family-complex="Symbol"/>
    </style:style>
    <style:style style:parent-style-name="832" style:display-name="T13" style:family="text" style:name="1988">
      <style:paragraph-properties/>
      <style:text-properties fo:font-family="Symbol" style:font-family-complex="Symbol"/>
    </style:style>
    <style:style style:parent-style-name="832" style:display-name="T14" style:family="text" style:name="1989">
      <style:paragraph-properties/>
      <style:text-properties fo:font-family="Symbol" style:font-family-complex="Symbol"/>
    </style:style>
    <style:style style:parent-style-name="832" style:display-name="T15" style:family="text" style:name="1990">
      <style:paragraph-properties/>
      <style:text-properties fo:font-family="Symbol" style:font-family-complex="Symbol"/>
    </style:style>
    <style:style style:parent-style-name="832" style:display-name="T16" style:family="text" style:name="1991">
      <style:paragraph-properties/>
      <style:text-properties fo:font-family="Symbol" style:font-family-complex="Symbol"/>
    </style:style>
    <style:style style:parent-style-name="832" style:display-name="T17" style:family="text" style:name="1992">
      <style:paragraph-properties/>
      <style:text-properties fo:font-family="Symbol" style:font-family-complex="Symbol"/>
    </style:style>
    <style:style style:parent-style-name="832" style:display-name="T18" style:family="text" style:name="1993">
      <style:paragraph-properties/>
      <style:text-properties fo:font-family="Symbol" style:font-family-complex="Symbol"/>
    </style:style>
    <style:style style:parent-style-name="832" style:display-name="T19" style:family="text" style:name="1994">
      <style:paragraph-properties/>
      <style:text-properties fo:font-family="Symbol" style:font-family-complex="Symbol"/>
    </style:style>
    <style:style style:parent-style-name="832" style:display-name="T20" style:family="text" style:name="1995">
      <style:paragraph-properties/>
      <style:text-properties fo:font-family="Symbol" style:font-family-complex="Symbol"/>
    </style:style>
    <style:style style:parent-style-name="832" style:display-name="T21" style:family="text" style:name="1996">
      <style:paragraph-properties/>
      <style:text-properties fo:font-family="Symbol" style:font-family-complex="Symbol"/>
    </style:style>
    <style:style style:parent-style-name="832" style:display-name="T22" style:family="text" style:name="1997">
      <style:paragraph-properties/>
      <style:text-properties fo:font-family="Symbol" style:font-family-complex="Symbol"/>
    </style:style>
    <style:style style:parent-style-name="832" style:display-name="T23" style:family="text" style:name="1998">
      <style:paragraph-properties/>
      <style:text-properties fo:font-family="Symbol" style:font-family-complex="Symbol"/>
    </style:style>
    <style:style style:parent-style-name="832" style:display-name="T24" style:family="text" style:name="1999">
      <style:paragraph-properties/>
      <style:text-properties fo:font-family="Symbol" style:font-family-complex="Symbol"/>
    </style:style>
    <style:style style:parent-style-name="832" style:display-name="T25" style:family="text" style:name="2000">
      <style:paragraph-properties/>
      <style:text-properties fo:font-family="Symbol" style:font-family-complex="Symbol"/>
    </style:style>
    <style:style style:parent-style-name="832" style:display-name="T26" style:family="text" style:name="2001">
      <style:paragraph-properties/>
      <style:text-properties fo:font-family="Symbol" style:font-family-complex="Symbol"/>
    </style:style>
    <style:style style:parent-style-name="832" style:display-name="T27" style:family="text" style:name="2002">
      <style:paragraph-properties/>
      <style:text-properties fo:font-family="Symbol" style:font-family-complex="Symbol"/>
    </style:style>
    <style:style style:parent-style-name="832" style:display-name="T28" style:family="text" style:name="2003">
      <style:paragraph-properties/>
    </style:style>
    <style:style style:parent-style-name="832" style:display-name="T29" style:family="text" style:name="2004">
      <style:paragraph-properties/>
    </style:style>
    <style:style style:parent-style-name="832" style:display-name="T30" style:family="text" style:name="2005">
      <style:paragraph-properties/>
    </style:style>
    <style:style style:parent-style-name="832" style:display-name="T31" style:family="text" style:name="2006">
      <style:paragraph-properties/>
    </style:style>
    <style:style style:parent-style-name="832" style:display-name="T32" style:family="text" style:name="2007">
      <style:paragraph-properties/>
    </style:style>
    <style:style style:parent-style-name="832" style:display-name="T33" style:family="text" style:name="2008">
      <style:paragraph-properties/>
    </style:style>
    <style:style style:parent-style-name="832" style:display-name="T34" style:family="text" style:name="2009">
      <style:paragraph-properties/>
    </style:style>
    <style:style style:parent-style-name="832" style:display-name="T35" style:family="text" style:name="2010">
      <style:paragraph-properties/>
    </style:style>
    <style:style style:parent-style-name="832" style:display-name="T36" style:family="text" style:name="2011">
      <style:paragraph-properties/>
    </style:style>
    <style:style style:parent-style-name="832" style:display-name="T37" style:family="text" style:name="2012">
      <style:paragraph-properties/>
      <style:text-properties fo:font-family="Symbol" style:font-family-complex="Symbol"/>
    </style:style>
    <style:style style:parent-style-name="832" style:display-name="T38" style:family="text" style:name="2013">
      <style:paragraph-properties/>
      <style:text-properties fo:font-family="OpenSymbol" style:font-family-complex="OpenSymbol"/>
    </style:style>
    <style:style style:parent-style-name="832" style:display-name="T39" style:family="text" style:name="2014">
      <style:paragraph-properties/>
      <style:text-properties fo:font-family="OpenSymbol" style:font-family-complex="OpenSymbol"/>
    </style:style>
    <style:style style:parent-style-name="832" style:display-name="T40" style:family="text" style:name="2015">
      <style:paragraph-properties/>
      <style:text-properties fo:font-family="Symbol" style:font-family-complex="Symbol"/>
    </style:style>
    <style:style style:parent-style-name="832" style:display-name="T41" style:family="text" style:name="2016">
      <style:paragraph-properties/>
      <style:text-properties fo:font-family="OpenSymbol" style:font-family-complex="OpenSymbol"/>
    </style:style>
    <style:style style:parent-style-name="832" style:display-name="T42" style:family="text" style:name="2017">
      <style:paragraph-properties/>
      <style:text-properties fo:font-family="OpenSymbol" style:font-family-complex="OpenSymbol"/>
    </style:style>
    <style:style style:parent-style-name="832" style:display-name="T43" style:family="text" style:name="2018">
      <style:paragraph-properties/>
      <style:text-properties fo:font-family="Symbol" style:font-family-complex="Symbol"/>
    </style:style>
    <style:style style:parent-style-name="832" style:display-name="T44" style:family="text" style:name="2019">
      <style:paragraph-properties/>
      <style:text-properties fo:font-family="OpenSymbol" style:font-family-complex="OpenSymbol"/>
    </style:style>
    <style:style style:parent-style-name="832" style:display-name="T45" style:family="text" style:name="2020">
      <style:paragraph-properties/>
      <style:text-properties fo:font-family="OpenSymbol" style:font-family-complex="OpenSymbol"/>
    </style:style>
    <style:style style:parent-style-name="832" style:display-name="T46" style:family="text" style:name="2021">
      <style:paragraph-properties/>
      <style:text-properties fo:font-family="Symbol" style:font-family-complex="Symbol"/>
    </style:style>
    <style:style style:parent-style-name="832" style:display-name="T47" style:family="text" style:name="2022">
      <style:paragraph-properties/>
      <style:text-properties fo:font-family="Symbol" style:font-family-complex="Symbol"/>
    </style:style>
    <style:style style:parent-style-name="832" style:display-name="T48" style:family="text" style:name="2023">
      <style:paragraph-properties/>
      <style:text-properties fo:font-family="Symbol" style:font-family-complex="Symbol"/>
    </style:style>
    <style:style style:parent-style-name="832" style:display-name="T49" style:family="text" style:name="2024">
      <style:paragraph-properties/>
      <style:text-properties fo:font-family="Symbol" style:font-family-complex="Symbol"/>
    </style:style>
    <style:style style:parent-style-name="832" style:display-name="T50" style:family="text" style:name="2025">
      <style:paragraph-properties/>
      <style:text-properties fo:font-family="Symbol" style:font-family-complex="Symbol"/>
    </style:style>
    <style:style style:parent-style-name="832" style:display-name="T51" style:family="text" style:name="2026">
      <style:paragraph-properties/>
      <style:text-properties fo:font-family="Symbol" style:font-family-complex="Symbol"/>
    </style:style>
    <style:style style:parent-style-name="832" style:display-name="T52" style:family="text" style:name="2027">
      <style:paragraph-properties/>
      <style:text-properties fo:font-family="Symbol" style:font-family-complex="Symbol"/>
    </style:style>
    <style:style style:parent-style-name="832" style:display-name="T53" style:family="text" style:name="2028">
      <style:paragraph-properties/>
      <style:text-properties fo:font-family="Symbol" style:font-family-complex="Symbol"/>
    </style:style>
    <style:style style:parent-style-name="832" style:display-name="T54" style:family="text" style:name="2029">
      <style:paragraph-properties/>
      <style:text-properties fo:font-family="Symbol" style:font-family-complex="Symbol"/>
    </style:style>
    <style:style style:parent-style-name="832" style:display-name="T55" style:family="text" style:name="2030">
      <style:paragraph-properties/>
      <style:text-properties fo:font-family="Symbol" style:font-family-complex="Symbol"/>
    </style:style>
    <style:style style:parent-style-name="832" style:display-name="T56" style:family="text" style:name="2031">
      <style:paragraph-properties/>
      <style:text-properties fo:font-family="Symbol" style:font-family-complex="Symbol"/>
    </style:style>
    <style:style style:parent-style-name="832" style:display-name="T57" style:family="text" style:name="2032">
      <style:paragraph-properties/>
      <style:text-properties fo:font-family="Symbol" style:font-family-complex="Symbol"/>
    </style:style>
    <style:style style:parent-style-name="832" style:display-name="T58" style:family="text" style:name="2033">
      <style:paragraph-properties/>
      <style:text-properties fo:font-family="Symbol" style:font-family-complex="Symbol"/>
    </style:style>
    <style:style style:parent-style-name="832" style:display-name="T59" style:family="text" style:name="2034">
      <style:paragraph-properties/>
      <style:text-properties fo:font-family="Symbol" style:font-family-complex="Symbol"/>
    </style:style>
    <style:style style:parent-style-name="832" style:display-name="T60" style:family="text" style:name="2035">
      <style:paragraph-properties/>
      <style:text-properties fo:font-family="Symbol" style:font-family-complex="Symbol"/>
    </style:style>
    <style:style style:parent-style-name="832" style:display-name="T61" style:family="text" style:name="2036">
      <style:paragraph-properties/>
      <style:text-properties fo:font-family="Symbol" style:font-family-complex="Symbol"/>
    </style:style>
    <style:style style:parent-style-name="832" style:display-name="T62" style:family="text" style:name="2037">
      <style:paragraph-properties/>
      <style:text-properties fo:font-family="Symbol" style:font-family-complex="Symbol"/>
    </style:style>
    <style:style style:parent-style-name="832" style:display-name="T63" style:family="text" style:name="2038">
      <style:paragraph-properties/>
      <style:text-properties fo:font-family="Symbol" style:font-family-complex="Symbol"/>
    </style:style>
    <style:style style:parent-style-name="832" style:display-name="T64" style:family="text" style:name="2039">
      <style:paragraph-properties/>
      <style:text-properties fo:font-family="Symbol" style:font-family-complex="Symbol"/>
    </style:style>
    <style:style style:parent-style-name="832" style:display-name="T65" style:family="text" style:name="2040">
      <style:paragraph-properties/>
      <style:text-properties fo:font-family="Symbol" style:font-family-complex="Symbol"/>
    </style:style>
    <style:style style:parent-style-name="832" style:display-name="T66" style:family="text" style:name="2041">
      <style:paragraph-properties/>
      <style:text-properties fo:font-family="Symbol" style:font-family-complex="Symbol"/>
    </style:style>
    <style:style style:parent-style-name="832" style:display-name="T67" style:family="text" style:name="2042">
      <style:paragraph-properties/>
      <style:text-properties fo:font-family="Symbol" style:font-family-complex="Symbol"/>
    </style:style>
    <style:style style:parent-style-name="832" style:display-name="T68" style:family="text" style:name="2043">
      <style:paragraph-properties/>
      <style:text-properties fo:font-family="Symbol" style:font-family-complex="Symbol"/>
    </style:style>
    <style:style style:parent-style-name="832" style:display-name="T69" style:family="text" style:name="2044">
      <style:paragraph-properties/>
      <style:text-properties fo:font-family="Symbol" style:font-family-complex="Symbol"/>
    </style:style>
    <style:style style:parent-style-name="832" style:display-name="T70" style:family="text" style:name="2045">
      <style:paragraph-properties/>
      <style:text-properties fo:font-family="Symbol" style:font-family-complex="Symbol"/>
    </style:style>
    <style:style style:parent-style-name="832" style:display-name="T71" style:family="text" style:name="2046">
      <style:paragraph-properties/>
      <style:text-properties fo:font-family="Symbol" style:font-family-complex="Symbol"/>
    </style:style>
    <style:style style:parent-style-name="832" style:display-name="T72" style:family="text" style:name="2047">
      <style:paragraph-properties/>
      <style:text-properties fo:font-family="Symbol" style:font-family-complex="Symbol"/>
    </style:style>
    <style:style style:parent-style-name="832" style:display-name="T73" style:family="text" style:name="2048">
      <style:paragraph-properties/>
      <style:text-properties fo:font-family="Symbol" style:font-family-complex="Symbol"/>
    </style:style>
    <style:style style:parent-style-name="832" style:display-name="T74" style:family="text" style:name="2049">
      <style:paragraph-properties/>
      <style:text-properties fo:font-family="OpenSymbol" style:font-family-complex="OpenSymbol"/>
    </style:style>
    <style:style style:parent-style-name="832" style:display-name="T75" style:family="text" style:name="2050">
      <style:paragraph-properties/>
      <style:text-properties fo:font-family="OpenSymbol" style:font-family-complex="OpenSymbol"/>
    </style:style>
    <style:style style:parent-style-name="832" style:display-name="T76" style:family="text" style:name="2051">
      <style:paragraph-properties/>
      <style:text-properties fo:font-family="Symbol" style:font-family-complex="Symbol"/>
    </style:style>
    <style:style style:parent-style-name="832" style:display-name="T77" style:family="text" style:name="2052">
      <style:paragraph-properties/>
      <style:text-properties fo:font-family="OpenSymbol" style:font-family-complex="OpenSymbol"/>
    </style:style>
    <style:style style:parent-style-name="832" style:display-name="T78" style:family="text" style:name="2053">
      <style:paragraph-properties/>
      <style:text-properties fo:font-family="OpenSymbol" style:font-family-complex="OpenSymbol"/>
    </style:style>
    <style:style style:parent-style-name="832" style:display-name="T79" style:family="text" style:name="2054">
      <style:paragraph-properties/>
      <style:text-properties fo:font-family="Symbol" style:font-family-complex="Symbol"/>
    </style:style>
    <style:style style:parent-style-name="832" style:display-name="T80" style:family="text" style:name="2055">
      <style:paragraph-properties/>
      <style:text-properties fo:font-family="OpenSymbol" style:font-family-complex="OpenSymbol"/>
    </style:style>
    <style:style style:parent-style-name="832" style:display-name="T81" style:family="text" style:name="2056">
      <style:paragraph-properties/>
      <style:text-properties fo:font-family="OpenSymbol" style:font-family-complex="OpenSymbol"/>
    </style:style>
    <style:style style:parent-style-name="832" style:display-name="T82" style:family="text" style:name="2057">
      <style:paragraph-properties/>
      <style:text-properties fo:font-family="Symbol" style:font-family-complex="Symbol"/>
    </style:style>
    <style:style style:parent-style-name="832" style:display-name="T83" style:family="text" style:name="2058">
      <style:paragraph-properties/>
      <style:text-properties fo:font-family="Symbol" style:font-family-complex="Symbol"/>
    </style:style>
    <style:style style:parent-style-name="832" style:display-name="T84" style:family="text" style:name="2059">
      <style:paragraph-properties/>
      <style:text-properties fo:font-family="Symbol" style:font-family-complex="Symbol"/>
    </style:style>
    <style:style style:parent-style-name="832" style:display-name="T85" style:family="text" style:name="2060">
      <style:paragraph-properties/>
      <style:text-properties fo:font-family="Symbol" style:font-family-complex="Symbol"/>
    </style:style>
    <style:style style:parent-style-name="832" style:display-name="T86" style:family="text" style:name="2061">
      <style:paragraph-properties/>
      <style:text-properties fo:font-family="Symbol" style:font-family-complex="Symbol"/>
    </style:style>
    <style:style style:parent-style-name="832" style:display-name="T87" style:family="text" style:name="2062">
      <style:paragraph-properties/>
      <style:text-properties fo:font-family="Symbol" style:font-family-complex="Symbol"/>
    </style:style>
    <style:style style:parent-style-name="832" style:display-name="T88" style:family="text" style:name="2063">
      <style:paragraph-properties/>
      <style:text-properties fo:font-family="Symbol" style:font-family-complex="Symbol"/>
    </style:style>
    <style:style style:parent-style-name="832" style:display-name="T89" style:family="text" style:name="2064">
      <style:paragraph-properties/>
      <style:text-properties fo:font-family="Symbol" style:font-family-complex="Symbol"/>
    </style:style>
    <style:style style:parent-style-name="832" style:display-name="T90" style:family="text" style:name="2065">
      <style:paragraph-properties/>
      <style:text-properties fo:font-family="Symbol" style:font-family-complex="Symbol"/>
    </style:style>
    <style:style style:parent-style-name="832" style:display-name="T91" style:family="text" style:name="2066">
      <style:paragraph-properties/>
      <style:text-properties fo:font-family="Symbol" style:font-family-complex="Symbol"/>
    </style:style>
    <style:style style:parent-style-name="832" style:display-name="T92" style:family="text" style:name="2067">
      <style:paragraph-properties/>
      <style:text-properties fo:font-family="Symbol" style:font-family-complex="Symbol"/>
    </style:style>
    <style:style style:parent-style-name="832" style:display-name="T93" style:family="text" style:name="2068">
      <style:paragraph-properties/>
      <style:text-properties fo:font-family="Symbol" style:font-family-complex="Symbol"/>
    </style:style>
    <style:style style:parent-style-name="832" style:display-name="T94" style:family="text" style:name="2069">
      <style:paragraph-properties/>
      <style:text-properties fo:font-family="Symbol" style:font-family-complex="Symbol"/>
    </style:style>
    <style:style style:parent-style-name="832" style:display-name="T95" style:family="text" style:name="2070">
      <style:paragraph-properties/>
      <style:text-properties fo:font-family="Symbol" style:font-family-complex="Symbol"/>
    </style:style>
    <style:style style:parent-style-name="832" style:display-name="T96" style:family="text" style:name="2071">
      <style:paragraph-properties/>
      <style:text-properties fo:font-family="Symbol" style:font-family-complex="Symbol"/>
    </style:style>
    <style:style style:parent-style-name="832" style:display-name="T97" style:family="text" style:name="2072">
      <style:paragraph-properties/>
      <style:text-properties fo:font-family="Symbol" style:font-family-complex="Symbol"/>
    </style:style>
    <style:style style:parent-style-name="832" style:display-name="T98" style:family="text" style:name="2073">
      <style:paragraph-properties/>
      <style:text-properties fo:font-family="Symbol" style:font-family-complex="Symbol"/>
    </style:style>
    <style:style style:parent-style-name="832" style:display-name="T99" style:family="text" style:name="2074">
      <style:paragraph-properties/>
      <style:text-properties fo:font-family="Symbol" style:font-family-complex="Symbol"/>
    </style:style>
    <style:style style:parent-style-name="832" style:display-name="T100" style:family="text" style:name="2075">
      <style:paragraph-properties/>
      <style:text-properties fo:font-family="Symbol" style:font-family-complex="Symbol"/>
    </style:style>
    <style:style style:parent-style-name="832" style:display-name="T101" style:family="text" style:name="2076">
      <style:paragraph-properties/>
      <style:text-properties fo:font-family="OpenSymbol" style:font-family-complex="OpenSymbol"/>
    </style:style>
    <style:style style:parent-style-name="832" style:display-name="T102" style:family="text" style:name="2077">
      <style:paragraph-properties/>
      <style:text-properties fo:font-family="OpenSymbol" style:font-family-complex="OpenSymbol"/>
    </style:style>
    <style:style style:parent-style-name="832" style:display-name="T103" style:family="text" style:name="2078">
      <style:paragraph-properties/>
      <style:text-properties fo:font-family="Symbol" style:font-family-complex="Symbol"/>
    </style:style>
    <style:style style:parent-style-name="832" style:display-name="T104" style:family="text" style:name="2079">
      <style:paragraph-properties/>
      <style:text-properties fo:font-family="OpenSymbol" style:font-family-complex="OpenSymbol"/>
    </style:style>
    <style:style style:parent-style-name="832" style:display-name="T105" style:family="text" style:name="2080">
      <style:paragraph-properties/>
      <style:text-properties fo:font-family="OpenSymbol" style:font-family-complex="OpenSymbol"/>
    </style:style>
    <style:style style:parent-style-name="832" style:display-name="T106" style:family="text" style:name="2081">
      <style:paragraph-properties/>
      <style:text-properties fo:font-family="Symbol" style:font-family-complex="Symbol"/>
    </style:style>
    <style:style style:parent-style-name="832" style:display-name="T107" style:family="text" style:name="2082">
      <style:paragraph-properties/>
      <style:text-properties fo:font-family="OpenSymbol" style:font-family-complex="OpenSymbol"/>
    </style:style>
    <style:style style:parent-style-name="832" style:display-name="T108" style:family="text" style:name="2083">
      <style:paragraph-properties/>
      <style:text-properties fo:font-family="OpenSymbol" style:font-family-complex="OpenSymbol"/>
    </style:style>
    <style:style style:parent-style-name="832" style:display-name="T109" style:family="text" style:name="2084">
      <style:paragraph-properties/>
      <style:text-properties fo:font-family="Symbol" style:font-family-complex="Symbol"/>
    </style:style>
    <style:style style:parent-style-name="832" style:display-name="T110" style:family="text" style:name="2085">
      <style:paragraph-properties/>
      <style:text-properties fo:font-family="Symbol" style:font-family-complex="Symbol"/>
    </style:style>
    <style:style style:parent-style-name="832" style:display-name="T111" style:family="text" style:name="2086">
      <style:paragraph-properties/>
      <style:text-properties fo:font-family="Symbol" style:font-family-complex="Symbol"/>
    </style:style>
    <style:style style:parent-style-name="832" style:display-name="T112" style:family="text" style:name="2087">
      <style:paragraph-properties/>
      <style:text-properties fo:font-family="Symbol" style:font-family-complex="Symbol"/>
    </style:style>
    <style:style style:parent-style-name="832" style:display-name="T113" style:family="text" style:name="2088">
      <style:paragraph-properties/>
      <style:text-properties fo:font-family="Symbol" style:font-family-complex="Symbol"/>
    </style:style>
    <style:style style:parent-style-name="832" style:display-name="T114" style:family="text" style:name="2089">
      <style:paragraph-properties/>
      <style:text-properties fo:font-family="Symbol" style:font-family-complex="Symbol"/>
    </style:style>
    <style:style style:parent-style-name="832" style:display-name="T115" style:family="text" style:name="2090">
      <style:paragraph-properties/>
      <style:text-properties fo:font-family="Symbol" style:font-family-complex="Symbol"/>
    </style:style>
    <style:style style:parent-style-name="832" style:display-name="T116" style:family="text" style:name="2091">
      <style:paragraph-properties/>
      <style:text-properties fo:font-family="Symbol" style:font-family-complex="Symbol"/>
    </style:style>
    <style:style style:parent-style-name="832" style:display-name="T117" style:family="text" style:name="2092">
      <style:paragraph-properties/>
      <style:text-properties fo:font-family="Symbol" style:font-family-complex="Symbol"/>
    </style:style>
    <style:style style:parent-style-name="832" style:display-name="T118" style:family="text" style:name="2093">
      <style:paragraph-properties/>
      <style:text-properties fo:font-family="Symbol" style:font-family-complex="Symbol"/>
    </style:style>
    <style:style style:parent-style-name="832" style:display-name="T119" style:family="text" style:name="2094">
      <style:paragraph-properties/>
      <style:text-properties fo:font-family="Symbol" style:font-family-complex="Symbol"/>
    </style:style>
    <style:style style:parent-style-name="832" style:display-name="T120" style:family="text" style:name="2095">
      <style:paragraph-properties/>
      <style:text-properties fo:font-family="Symbol" style:font-family-complex="Symbol"/>
    </style:style>
    <style:style style:parent-style-name="832" style:display-name="T121" style:family="text" style:name="2096">
      <style:paragraph-properties/>
      <style:text-properties fo:font-family="Symbol" style:font-family-complex="Symbol"/>
    </style:style>
    <style:style style:parent-style-name="832" style:display-name="T122" style:family="text" style:name="2097">
      <style:paragraph-properties/>
      <style:text-properties fo:font-family="Symbol" style:font-family-complex="Symbol"/>
    </style:style>
    <style:style style:parent-style-name="832" style:display-name="T123" style:family="text" style:name="2098">
      <style:paragraph-properties/>
      <style:text-properties fo:font-family="Symbol" style:font-family-complex="Symbol"/>
    </style:style>
    <style:style style:parent-style-name="832" style:display-name="T124" style:family="text" style:name="2099">
      <style:paragraph-properties/>
      <style:text-properties fo:font-family="Symbol" style:font-family-complex="Symbol"/>
    </style:style>
    <style:style style:parent-style-name="832" style:display-name="T125" style:family="text" style:name="2100">
      <style:paragraph-properties/>
      <style:text-properties fo:font-family="Symbol" style:font-family-complex="Symbol"/>
    </style:style>
    <style:style style:parent-style-name="832" style:display-name="T126" style:family="text" style:name="2101">
      <style:paragraph-properties/>
      <style:text-properties fo:font-family="Symbol" style:font-family-complex="Symbol"/>
    </style:style>
    <style:style style:parent-style-name="832" style:display-name="T127" style:family="text" style:name="2102">
      <style:paragraph-properties/>
      <style:text-properties fo:font-family="Symbol" style:font-family-complex="Symbol"/>
    </style:style>
    <style:style style:parent-style-name="832" style:display-name="T128" style:family="text" style:name="2103">
      <style:paragraph-properties/>
      <style:text-properties fo:font-family="Symbol" style:font-family-complex="Symbol"/>
    </style:style>
    <style:style style:parent-style-name="832" style:display-name="T129" style:family="text" style:name="2104">
      <style:paragraph-properties/>
      <style:text-properties fo:font-family="Symbol" style:font-family-complex="Symbol"/>
    </style:style>
    <style:style style:parent-style-name="832" style:display-name="T130" style:family="text" style:name="2105">
      <style:paragraph-properties/>
      <style:text-properties fo:font-family="Symbol" style:font-family-complex="Symbol"/>
    </style:style>
    <style:style style:parent-style-name="832" style:display-name="T131" style:family="text" style:name="2106">
      <style:paragraph-properties/>
      <style:text-properties fo:font-family="Symbol" style:font-family-complex="Symbol"/>
    </style:style>
    <style:style style:parent-style-name="832" style:display-name="T132" style:family="text" style:name="2107">
      <style:paragraph-properties/>
      <style:text-properties fo:font-family="Symbol" style:font-family-complex="Symbol"/>
    </style:style>
    <style:style style:parent-style-name="832" style:display-name="T133" style:family="text" style:name="2108">
      <style:paragraph-properties/>
      <style:text-properties fo:font-family="Symbol" style:font-family-complex="Symbol"/>
    </style:style>
    <style:style style:parent-style-name="832" style:display-name="T134" style:family="text" style:name="2109">
      <style:paragraph-properties/>
      <style:text-properties fo:font-family="Symbol" style:font-family-complex="Symbol"/>
    </style:style>
    <style:style style:parent-style-name="832" style:display-name="T135" style:family="text" style:name="2110">
      <style:paragraph-properties/>
      <style:text-properties fo:font-family="Symbol" style:font-family-complex="Symbol"/>
    </style:style>
    <style:style style:parent-style-name="832" style:display-name="T136" style:family="text" style:name="2111">
      <style:paragraph-properties/>
      <style:text-properties fo:font-family="Symbol" style:font-family-complex="Symbol"/>
    </style:style>
    <style:style style:parent-style-name="832" style:display-name="T137" style:family="text" style:name="2112">
      <style:paragraph-properties/>
      <style:text-properties fo:font-family="Symbol" style:font-family-complex="Symbol"/>
    </style:style>
    <style:style style:parent-style-name="832" style:display-name="T138" style:family="text" style:name="2113">
      <style:paragraph-properties/>
      <style:text-properties fo:font-family="Symbol" style:font-family-complex="Symbol"/>
    </style:style>
    <style:style style:parent-style-name="832" style:display-name="T139" style:family="text" style:name="2114">
      <style:paragraph-properties/>
      <style:text-properties fo:font-family="Symbol" style:font-family-complex="Symbol"/>
    </style:style>
    <style:style style:parent-style-name="832" style:display-name="T140" style:family="text" style:name="2115">
      <style:paragraph-properties/>
      <style:text-properties fo:font-family="Symbol" style:font-family-complex="Symbol"/>
    </style:style>
    <style:style style:parent-style-name="832" style:display-name="T141" style:family="text" style:name="2116">
      <style:paragraph-properties/>
      <style:text-properties fo:font-family="Symbol" style:font-family-complex="Symbol"/>
    </style:style>
    <style:style style:parent-style-name="832" style:display-name="T142" style:family="text" style:name="2117">
      <style:paragraph-properties/>
      <style:text-properties fo:font-family="Symbol" style:font-family-complex="Symbol"/>
    </style:style>
    <style:style style:parent-style-name="832" style:display-name="T143" style:family="text" style:name="2118">
      <style:paragraph-properties/>
      <style:text-properties fo:font-family="Symbol" style:font-family-complex="Symbol"/>
    </style:style>
    <style:style style:parent-style-name="832" style:display-name="T144" style:family="text" style:name="2119">
      <style:paragraph-properties/>
      <style:text-properties fo:font-family="Symbol" style:font-family-complex="Symbol"/>
    </style:style>
    <style:style style:parent-style-name="832" style:display-name="T145" style:family="text" style:name="2120">
      <style:paragraph-properties/>
      <style:text-properties fo:font-family="Symbol" style:font-family-complex="Symbol"/>
    </style:style>
    <style:style style:parent-style-name="832" style:display-name="T146" style:family="text" style:name="2121">
      <style:paragraph-properties/>
      <style:text-properties fo:font-family="Symbol" style:font-family-complex="Symbol"/>
    </style:style>
    <style:style style:parent-style-name="832" style:display-name="T147" style:family="text" style:name="2122">
      <style:paragraph-properties/>
      <style:text-properties fo:font-family="Symbol" style:font-family-complex="Symbol"/>
    </style:style>
    <style:style style:parent-style-name="832" style:display-name="T148" style:family="text" style:name="2123">
      <style:paragraph-properties/>
      <style:text-properties fo:font-family="Symbol" style:font-family-complex="Symbol"/>
    </style:style>
    <style:style style:parent-style-name="832" style:display-name="T149" style:family="text" style:name="2124">
      <style:paragraph-properties/>
      <style:text-properties fo:font-family="Symbol" style:font-family-complex="Symbol"/>
    </style:style>
    <style:style style:parent-style-name="832" style:display-name="T150" style:family="text" style:name="2125">
      <style:paragraph-properties/>
      <style:text-properties fo:font-family="Symbol" style:font-family-complex="Symbol"/>
    </style:style>
    <style:style style:parent-style-name="832" style:display-name="T151" style:family="text" style:name="2126">
      <style:paragraph-properties/>
      <style:text-properties fo:font-family="Symbol" style:font-family-complex="Symbol"/>
    </style:style>
    <style:style style:parent-style-name="832" style:display-name="T152" style:family="text" style:name="2127">
      <style:paragraph-properties/>
      <style:text-properties fo:font-family="Symbol" style:font-family-complex="Symbol"/>
    </style:style>
    <style:style style:parent-style-name="832" style:display-name="T153" style:family="text" style:name="2128">
      <style:paragraph-properties/>
      <style:text-properties fo:font-family="Symbol" style:font-family-complex="Symbol"/>
    </style:style>
    <style:style style:parent-style-name="832" style:display-name="T154" style:family="text" style:name="2129">
      <style:paragraph-properties/>
      <style:text-properties fo:font-family="Symbol" style:font-family-complex="Symbol"/>
    </style:style>
    <style:style style:parent-style-name="832" style:display-name="T155" style:family="text" style:name="2130">
      <style:paragraph-properties/>
      <style:text-properties fo:font-family="Symbol" style:font-family-complex="Symbol"/>
    </style:style>
    <style:style style:parent-style-name="832" style:display-name="T156" style:family="text" style:name="2131">
      <style:paragraph-properties/>
      <style:text-properties fo:font-family="Symbol" style:font-family-complex="Symbol"/>
    </style:style>
    <style:style style:parent-style-name="832" style:display-name="T157" style:family="text" style:name="2132">
      <style:paragraph-properties/>
      <style:text-properties fo:font-family="Symbol" style:font-family-complex="Symbol"/>
    </style:style>
    <style:style style:parent-style-name="832" style:display-name="T158" style:family="text" style:name="2133">
      <style:paragraph-properties/>
      <style:text-properties fo:font-family="Symbol" style:font-family-complex="Symbol"/>
    </style:style>
    <style:style style:parent-style-name="832" style:display-name="T159" style:family="text" style:name="2134">
      <style:paragraph-properties/>
      <style:text-properties fo:font-family="Symbol" style:font-family-complex="Symbol"/>
    </style:style>
    <style:style style:parent-style-name="832" style:display-name="T160" style:family="text" style:name="2135">
      <style:paragraph-properties/>
      <style:text-properties fo:font-family="Symbol" style:font-family-complex="Symbol"/>
    </style:style>
    <style:style style:parent-style-name="832" style:display-name="T161" style:family="text" style:name="2136">
      <style:paragraph-properties/>
      <style:text-properties fo:font-family="Symbol" style:font-family-complex="Symbol"/>
    </style:style>
    <style:style style:parent-style-name="832" style:display-name="T162" style:family="text" style:name="2137">
      <style:paragraph-properties/>
      <style:text-properties fo:font-family="Symbol" style:font-family-complex="Symbol"/>
    </style:style>
    <style:style style:parent-style-name="832" style:display-name="T163" style:family="text" style:name="2138">
      <style:paragraph-properties/>
      <style:text-properties fo:font-family="Symbol" style:font-family-complex="Symbol"/>
    </style:style>
    <style:style style:parent-style-name="832" style:display-name="T164" style:family="text" style:name="2139">
      <style:paragraph-properties/>
      <style:text-properties fo:font-family="Symbol" style:font-family-complex="Symbol"/>
    </style:style>
    <style:style style:parent-style-name="832" style:display-name="T165" style:family="text" style:name="2140">
      <style:paragraph-properties/>
      <style:text-properties fo:font-family="Symbol" style:font-family-complex="Symbol"/>
    </style:style>
    <style:style style:parent-style-name="832" style:display-name="T166" style:family="text" style:name="2141">
      <style:paragraph-properties/>
      <style:text-properties fo:font-family="Symbol" style:font-family-complex="Symbol"/>
    </style:style>
    <style:style style:parent-style-name="832" style:display-name="T167" style:family="text" style:name="2142">
      <style:paragraph-properties/>
      <style:text-properties fo:font-family="Symbol" style:font-family-complex="Symbol"/>
    </style:style>
    <style:style style:parent-style-name="832" style:display-name="T168" style:family="text" style:name="2143">
      <style:paragraph-properties/>
      <style:text-properties fo:font-family="Symbol" style:font-family-complex="Symbol"/>
    </style:style>
    <style:style style:parent-style-name="832" style:display-name="T169" style:family="text" style:name="2144">
      <style:paragraph-properties/>
      <style:text-properties fo:font-family="Symbol" style:font-family-complex="Symbol"/>
    </style:style>
    <style:style style:parent-style-name="832" style:display-name="T170" style:family="text" style:name="2145">
      <style:paragraph-properties/>
      <style:text-properties fo:font-family="Symbol" style:font-family-complex="Symbol"/>
    </style:style>
    <style:style style:parent-style-name="832" style:display-name="T171" style:family="text" style:name="2146">
      <style:paragraph-properties/>
      <style:text-properties fo:font-family="Symbol" style:font-family-complex="Symbol"/>
    </style:style>
    <style:style style:parent-style-name="832" style:display-name="T172" style:family="text" style:name="2147">
      <style:paragraph-properties/>
      <style:text-properties fo:font-family="Symbol" style:font-family-complex="Symbol"/>
    </style:style>
    <style:style style:parent-style-name="832" style:display-name="T173" style:family="text" style:name="2148">
      <style:paragraph-properties/>
      <style:text-properties fo:font-family="Symbol" style:font-family-complex="Symbol"/>
    </style:style>
    <style:style style:parent-style-name="832" style:display-name="T174" style:family="text" style:name="2149">
      <style:paragraph-properties/>
      <style:text-properties fo:font-family="Symbol" style:font-family-complex="Symbol"/>
    </style:style>
    <style:style style:parent-style-name="832" style:display-name="T175" style:family="text" style:name="2150">
      <style:paragraph-properties/>
      <style:text-properties fo:font-family="Symbol" style:font-family-complex="Symbol"/>
    </style:style>
    <style:style style:parent-style-name="832" style:display-name="T176" style:family="text" style:name="2151">
      <style:paragraph-properties/>
      <style:text-properties fo:font-family="Symbol" style:font-family-complex="Symbol"/>
    </style:style>
    <style:style style:parent-style-name="832" style:display-name="T177" style:family="text" style:name="2152">
      <style:paragraph-properties/>
      <style:text-properties fo:font-family="Symbol" style:font-family-complex="Symbol"/>
    </style:style>
    <style:style style:parent-style-name="832" style:display-name="T178" style:family="text" style:name="2153">
      <style:paragraph-properties/>
      <style:text-properties fo:font-family="Symbol" style:font-family-complex="Symbol"/>
    </style:style>
    <style:style style:parent-style-name="832" style:display-name="T179" style:family="text" style:name="2154">
      <style:paragraph-properties/>
      <style:text-properties fo:font-family="Symbol" style:font-family-complex="Symbol"/>
    </style:style>
    <style:style style:parent-style-name="832" style:display-name="T180" style:family="text" style:name="2155">
      <style:paragraph-properties/>
      <style:text-properties fo:font-family="Symbol" style:font-family-complex="Symbol"/>
    </style:style>
    <style:style style:parent-style-name="832" style:display-name="T181" style:family="text" style:name="2156">
      <style:paragraph-properties/>
      <style:text-properties fo:font-family="Symbol" style:font-family-complex="Symbol"/>
    </style:style>
    <style:style style:parent-style-name="832" style:display-name="T182" style:family="text" style:name="2157">
      <style:paragraph-properties/>
      <style:text-properties fo:font-family="Symbol" style:font-family-complex="Symbol"/>
    </style:style>
    <style:style style:parent-style-name="832" style:display-name="T183" style:family="text" style:name="2158">
      <style:paragraph-properties/>
      <style:text-properties fo:font-family="Symbol" style:font-family-complex="Symbol"/>
    </style:style>
    <style:style style:parent-style-name="832" style:display-name="T184" style:family="text" style:name="2159">
      <style:paragraph-properties/>
      <style:text-properties fo:font-family="Symbol" style:font-family-complex="Symbol"/>
    </style:style>
    <style:style style:parent-style-name="832" style:display-name="T185" style:family="text" style:name="2160">
      <style:paragraph-properties/>
      <style:text-properties fo:font-family="Symbol" style:font-family-complex="Symbol"/>
    </style:style>
    <style:style style:parent-style-name="832" style:display-name="T186" style:family="text" style:name="2161">
      <style:paragraph-properties/>
      <style:text-properties fo:font-family="Symbol" style:font-family-complex="Symbol"/>
    </style:style>
    <style:style style:parent-style-name="832" style:display-name="T187" style:family="text" style:name="2162">
      <style:paragraph-properties/>
      <style:text-properties fo:font-family="Symbol" style:font-family-complex="Symbol"/>
    </style:style>
    <style:style style:parent-style-name="832" style:display-name="T188" style:family="text" style:name="2163">
      <style:paragraph-properties/>
      <style:text-properties fo:font-family="Symbol" style:font-family-complex="Symbol"/>
    </style:style>
    <style:style style:parent-style-name="832" style:display-name="T189" style:family="text" style:name="2164">
      <style:paragraph-properties/>
      <style:text-properties fo:font-family="Symbol" style:font-family-complex="Symbol"/>
    </style:style>
    <style:style style:parent-style-name="832" style:display-name="T190" style:family="text" style:name="2165">
      <style:paragraph-properties/>
      <style:text-properties fo:font-family="Symbol" style:font-family-complex="Symbol"/>
    </style:style>
    <style:style style:parent-style-name="832" style:display-name="T191" style:family="text" style:name="2166">
      <style:paragraph-properties/>
      <style:text-properties fo:font-family="Symbol" style:font-family-complex="Symbol"/>
    </style:style>
    <style:style style:parent-style-name="832" style:display-name="T192" style:family="text" style:name="2167">
      <style:paragraph-properties/>
      <style:text-properties fo:font-family="Symbol" style:font-family-complex="Symbol"/>
    </style:style>
    <style:style style:parent-style-name="832" style:display-name="T193" style:family="text" style:name="2168">
      <style:paragraph-properties/>
      <style:text-properties fo:font-family="Symbol" style:font-family-complex="Symbol"/>
    </style:style>
    <style:style style:parent-style-name="832" style:display-name="T194" style:family="text" style:name="2169">
      <style:paragraph-properties/>
      <style:text-properties fo:font-family="Symbol" style:font-family-complex="Symbol"/>
    </style:style>
    <style:style style:parent-style-name="832" style:display-name="T195" style:family="text" style:name="2170">
      <style:paragraph-properties/>
      <style:text-properties fo:font-family="Symbol" style:font-family-complex="Symbol"/>
    </style:style>
    <style:style style:parent-style-name="832" style:display-name="T196" style:family="text" style:name="2171">
      <style:paragraph-properties/>
      <style:text-properties fo:font-family="Symbol" style:font-family-complex="Symbol"/>
    </style:style>
    <style:style style:parent-style-name="832" style:display-name="T197" style:family="text" style:name="2172">
      <style:paragraph-properties/>
      <style:text-properties fo:font-family="Symbol" style:font-family-complex="Symbol"/>
    </style:style>
    <style:style style:parent-style-name="832" style:display-name="T198" style:family="text" style:name="2173">
      <style:paragraph-properties/>
      <style:text-properties fo:font-family="Symbol" style:font-family-complex="Symbol"/>
    </style:style>
    <style:style style:parent-style-name="832" style:display-name="T199" style:family="text" style:name="2174">
      <style:paragraph-properties/>
      <style:text-properties fo:font-family="Symbol" style:font-family-complex="Symbol"/>
    </style:style>
    <style:style style:parent-style-name="832" style:display-name="T200" style:family="text" style:name="2175">
      <style:paragraph-properties/>
      <style:text-properties fo:font-family="Symbol" style:font-family-complex="Symbol"/>
    </style:style>
    <style:style style:parent-style-name="832" style:display-name="T201" style:family="text" style:name="2176">
      <style:paragraph-properties/>
      <style:text-properties fo:font-family="Symbol" style:font-family-complex="Symbol"/>
    </style:style>
    <style:style style:parent-style-name="832" style:display-name="T202" style:family="text" style:name="2177">
      <style:paragraph-properties/>
      <style:text-properties fo:font-family="Symbol" style:font-family-complex="Symbol"/>
    </style:style>
    <style:style style:parent-style-name="832" style:display-name="T203" style:family="text" style:name="2178">
      <style:paragraph-properties/>
      <style:text-properties fo:font-family="Symbol" style:font-family-complex="Symbol"/>
    </style:style>
    <style:style style:parent-style-name="832" style:display-name="T204" style:family="text" style:name="2179">
      <style:paragraph-properties/>
      <style:text-properties fo:font-family="Symbol" style:font-family-complex="Symbol"/>
    </style:style>
    <style:style style:parent-style-name="832" style:display-name="T205" style:family="text" style:name="2180">
      <style:paragraph-properties/>
      <style:text-properties fo:font-family="Symbol" style:font-family-complex="Symbol"/>
    </style:style>
    <style:style style:parent-style-name="832" style:display-name="T206" style:family="text" style:name="2181">
      <style:paragraph-properties/>
      <style:text-properties fo:font-family="Symbol" style:font-family-complex="Symbol"/>
    </style:style>
    <style:style style:parent-style-name="832" style:display-name="T207" style:family="text" style:name="2182">
      <style:paragraph-properties/>
      <style:text-properties fo:font-family="Symbol" style:font-family-complex="Symbol"/>
    </style:style>
    <style:style style:parent-style-name="832" style:display-name="T208" style:family="text" style:name="2183">
      <style:paragraph-properties/>
      <style:text-properties fo:font-family="Symbol" style:font-family-complex="Symbol"/>
    </style:style>
    <style:style style:parent-style-name="832" style:display-name="T209" style:family="text" style:name="2184">
      <style:paragraph-properties/>
    </style:style>
    <style:style style:parent-style-name="832" style:display-name="T210" style:family="text" style:name="2185">
      <style:paragraph-properties/>
    </style:style>
    <style:style style:parent-style-name="832" style:display-name="T211" style:family="text" style:name="2186">
      <style:paragraph-properties/>
    </style:style>
    <style:style style:parent-style-name="832" style:display-name="T212" style:family="text" style:name="2187">
      <style:paragraph-properties/>
    </style:style>
    <style:style style:parent-style-name="832" style:display-name="T213" style:family="text" style:name="2188">
      <style:paragraph-properties/>
    </style:style>
    <style:style style:parent-style-name="832" style:display-name="T214" style:family="text" style:name="2189">
      <style:paragraph-properties/>
    </style:style>
    <style:style style:parent-style-name="832" style:display-name="T215" style:family="text" style:name="2190">
      <style:paragraph-properties/>
    </style:style>
    <style:style style:parent-style-name="832" style:display-name="T216" style:family="text" style:name="2191">
      <style:paragraph-properties/>
    </style:style>
    <style:style style:parent-style-name="832" style:display-name="T217" style:family="text" style:name="2192">
      <style:paragraph-properties/>
      <style:text-properties fo:font-family="Symbol" style:font-family-complex="Symbol"/>
    </style:style>
    <style:style style:parent-style-name="832" style:display-name="T218" style:family="text" style:name="2193">
      <style:paragraph-properties/>
    </style:style>
    <style:style style:parent-style-name="832" style:display-name="T219" style:family="text" style:name="2194">
      <style:paragraph-properties/>
    </style:style>
    <style:style style:parent-style-name="832" style:display-name="T220" style:family="text" style:name="2195">
      <style:paragraph-properties/>
    </style:style>
    <style:style style:parent-style-name="832" style:display-name="T221" style:family="text" style:name="2196">
      <style:paragraph-properties/>
    </style:style>
    <style:style style:parent-style-name="832" style:display-name="T222" style:family="text" style:name="2197">
      <style:paragraph-properties/>
    </style:style>
    <style:style style:parent-style-name="832" style:display-name="T223" style:family="text" style:name="2198">
      <style:paragraph-properties/>
    </style:style>
    <style:style style:parent-style-name="832" style:display-name="T224" style:family="text" style:name="2199">
      <style:paragraph-properties/>
    </style:style>
    <style:style style:parent-style-name="832" style:display-name="T225" style:family="text" style:name="2200">
      <style:paragraph-properties/>
    </style:style>
    <style:style style:parent-style-name="832" style:display-name="T226" style:family="text" style:name="2201">
      <style:paragraph-properties/>
      <style:text-properties fo:font-family="Symbol" style:font-family-complex="Symbol"/>
    </style:style>
    <style:style style:parent-style-name="832" style:display-name="T227" style:family="text" style:name="2202">
      <style:paragraph-properties/>
    </style:style>
    <style:style style:parent-style-name="832" style:display-name="T228" style:family="text" style:name="2203">
      <style:paragraph-properties/>
    </style:style>
    <style:style style:parent-style-name="832" style:display-name="T229" style:family="text" style:name="2204">
      <style:paragraph-properties/>
    </style:style>
    <style:style style:parent-style-name="832" style:display-name="T230" style:family="text" style:name="2205">
      <style:paragraph-properties/>
    </style:style>
    <style:style style:parent-style-name="832" style:display-name="T231" style:family="text" style:name="2206">
      <style:paragraph-properties/>
    </style:style>
    <style:style style:parent-style-name="832" style:display-name="T232" style:family="text" style:name="2207">
      <style:paragraph-properties/>
    </style:style>
    <style:style style:parent-style-name="832" style:display-name="T233" style:family="text" style:name="2208">
      <style:paragraph-properties/>
    </style:style>
    <style:style style:parent-style-name="832" style:display-name="T234" style:family="text" style:name="2209">
      <style:paragraph-properties/>
    </style:style>
    <style:style style:parent-style-name="832" style:display-name="T235" style:family="text" style:name="2210">
      <style:paragraph-properties/>
      <style:text-properties fo:font-family="Symbol" style:font-family-complex="Symbol"/>
    </style:style>
    <style:style style:parent-style-name="832" style:display-name="T236" style:family="text" style:name="2211">
      <style:paragraph-properties/>
      <style:text-properties fo:font-family="OpenSymbol" style:font-family-complex="OpenSymbol"/>
    </style:style>
    <style:style style:parent-style-name="832" style:display-name="T237" style:family="text" style:name="2212">
      <style:paragraph-properties/>
      <style:text-properties fo:font-family="OpenSymbol" style:font-family-complex="OpenSymbol"/>
    </style:style>
    <style:style style:parent-style-name="832" style:display-name="T238" style:family="text" style:name="2213">
      <style:paragraph-properties/>
      <style:text-properties fo:font-family="Symbol" style:font-family-complex="Symbol"/>
    </style:style>
    <style:style style:parent-style-name="832" style:display-name="T239" style:family="text" style:name="2214">
      <style:paragraph-properties/>
      <style:text-properties fo:font-family="OpenSymbol" style:font-family-complex="OpenSymbol"/>
    </style:style>
    <style:style style:parent-style-name="832" style:display-name="T240" style:family="text" style:name="2215">
      <style:paragraph-properties/>
      <style:text-properties fo:font-family="OpenSymbol" style:font-family-complex="OpenSymbol"/>
    </style:style>
    <style:style style:parent-style-name="832" style:display-name="T241" style:family="text" style:name="2216">
      <style:paragraph-properties/>
      <style:text-properties fo:font-family="Symbol" style:font-family-complex="Symbol"/>
    </style:style>
    <style:style style:parent-style-name="832" style:display-name="T242" style:family="text" style:name="2217">
      <style:paragraph-properties/>
      <style:text-properties fo:font-family="OpenSymbol" style:font-family-complex="OpenSymbol"/>
    </style:style>
    <style:style style:parent-style-name="832" style:display-name="T243" style:family="text" style:name="2218">
      <style:paragraph-properties/>
      <style:text-properties fo:font-family="OpenSymbol" style:font-family-complex="OpenSymbol"/>
    </style:style>
    <style:style style:parent-style-name="832" style:display-name="T244" style:family="text" style:name="2219">
      <style:paragraph-properties/>
      <style:text-properties fo:font-family="Symbol" style:font-family-complex="Symbol"/>
    </style:style>
    <style:style style:parent-style-name="832" style:display-name="T245" style:family="text" style:name="2220">
      <style:paragraph-properties/>
      <style:text-properties fo:font-family="OpenSymbol" style:font-family-complex="OpenSymbol"/>
    </style:style>
    <style:style style:parent-style-name="832" style:display-name="T246" style:family="text" style:name="2221">
      <style:paragraph-properties/>
      <style:text-properties fo:font-family="OpenSymbol" style:font-family-complex="OpenSymbol"/>
    </style:style>
    <style:style style:parent-style-name="832" style:display-name="T247" style:family="text" style:name="2222">
      <style:paragraph-properties/>
      <style:text-properties fo:font-family="Symbol" style:font-family-complex="Symbol"/>
    </style:style>
    <style:style style:parent-style-name="832" style:display-name="T248" style:family="text" style:name="2223">
      <style:paragraph-properties/>
      <style:text-properties fo:font-family="OpenSymbol" style:font-family-complex="OpenSymbol"/>
    </style:style>
    <style:style style:parent-style-name="832" style:display-name="T249" style:family="text" style:name="2224">
      <style:paragraph-properties/>
      <style:text-properties fo:font-family="OpenSymbol" style:font-family-complex="OpenSymbol"/>
    </style:style>
    <style:style style:parent-style-name="832" style:display-name="T250" style:family="text" style:name="2225">
      <style:paragraph-properties/>
      <style:text-properties fo:font-family="Symbol" style:font-family-complex="Symbol"/>
    </style:style>
    <style:style style:parent-style-name="832" style:display-name="T251" style:family="text" style:name="2226">
      <style:paragraph-properties/>
      <style:text-properties fo:font-family="OpenSymbol" style:font-family-complex="OpenSymbol"/>
    </style:style>
    <style:style style:parent-style-name="832" style:display-name="T252" style:family="text" style:name="2227">
      <style:paragraph-properties/>
      <style:text-properties fo:font-family="OpenSymbol" style:font-family-complex="OpenSymbol"/>
    </style:style>
    <style:style style:parent-style-name="832" style:display-name="T253" style:family="text" style:name="2228">
      <style:paragraph-properties/>
    </style:style>
    <style:style style:parent-style-name="832" style:display-name="T254" style:family="text" style:name="2229">
      <style:paragraph-properties/>
    </style:style>
    <style:style style:parent-style-name="832" style:display-name="T255" style:family="text" style:name="2230">
      <style:paragraph-properties/>
    </style:style>
    <style:style style:parent-style-name="832" style:display-name="T256" style:family="text" style:name="2231">
      <style:paragraph-properties/>
    </style:style>
    <style:style style:parent-style-name="832" style:display-name="T257" style:family="text" style:name="2232">
      <style:paragraph-properties/>
    </style:style>
    <style:style style:parent-style-name="832" style:display-name="T258" style:family="text" style:name="2233">
      <style:paragraph-properties/>
    </style:style>
    <style:style style:parent-style-name="832" style:display-name="T259" style:family="text" style:name="2234">
      <style:paragraph-properties/>
    </style:style>
    <style:style style:parent-style-name="832" style:display-name="T260" style:family="text" style:name="2235">
      <style:paragraph-properties/>
    </style:style>
    <style:style style:parent-style-name="832" style:display-name="T261" style:family="text" style:name="2236">
      <style:paragraph-properties/>
    </style:style>
    <style:style style:parent-style-name="832" style:display-name="T262" style:family="text" style:name="2237">
      <style:paragraph-properties/>
    </style:style>
    <style:style style:parent-style-name="832" style:display-name="T263" style:family="text" style:name="2238">
      <style:paragraph-properties/>
    </style:style>
    <style:style style:parent-style-name="832" style:display-name="T264" style:family="text" style:name="2239">
      <style:paragraph-properties/>
    </style:style>
    <style:style style:parent-style-name="832" style:display-name="T265" style:family="text" style:name="2240">
      <style:paragraph-properties/>
    </style:style>
    <style:style style:parent-style-name="832" style:display-name="T266" style:family="text" style:name="2241">
      <style:paragraph-properties/>
    </style:style>
    <style:style style:parent-style-name="832" style:display-name="T267" style:family="text" style:name="2242">
      <style:paragraph-properties/>
    </style:style>
    <style:style style:parent-style-name="832" style:display-name="T268" style:family="text" style:name="2243">
      <style:paragraph-properties/>
    </style:style>
    <style:style style:parent-style-name="832" style:display-name="T269" style:family="text" style:name="2244">
      <style:paragraph-properties/>
    </style:style>
    <style:style style:parent-style-name="832" style:display-name="T270" style:family="text" style:name="2245">
      <style:paragraph-properties/>
    </style:style>
    <style:style style:parent-style-name="832" style:display-name="T271" style:family="text" style:name="2246">
      <style:paragraph-properties/>
    </style:style>
    <style:style style:parent-style-name="832" style:display-name="T272" style:family="text" style:name="2247">
      <style:paragraph-properties/>
    </style:style>
    <style:style style:parent-style-name="832" style:display-name="T273" style:family="text" style:name="2248">
      <style:paragraph-properties/>
    </style:style>
    <style:style style:parent-style-name="832" style:display-name="T274" style:family="text" style:name="2249">
      <style:paragraph-properties/>
    </style:style>
    <style:style style:parent-style-name="832" style:display-name="T275" style:family="text" style:name="2250">
      <style:paragraph-properties/>
    </style:style>
    <style:style style:parent-style-name="832" style:display-name="T276" style:family="text" style:name="2251">
      <style:paragraph-properties/>
    </style:style>
    <style:style style:parent-style-name="832" style:display-name="T277" style:family="text" style:name="2252">
      <style:paragraph-properties/>
    </style:style>
    <style:style style:parent-style-name="832" style:display-name="T278" style:family="text" style:name="2253">
      <style:paragraph-properties/>
    </style:style>
    <style:style style:parent-style-name="832" style:display-name="T279" style:family="text" style:name="2254">
      <style:paragraph-properties/>
    </style:style>
    <style:style style:parent-style-name="832" style:display-name="T280" style:family="text" style:name="2255">
      <style:paragraph-properties/>
    </style:style>
    <style:style style:parent-style-name="832" style:display-name="T281" style:family="text" style:name="2256">
      <style:paragraph-properties/>
    </style:style>
    <style:style style:parent-style-name="832" style:display-name="T282" style:family="text" style:name="2257">
      <style:paragraph-properties/>
    </style:style>
    <style:style style:parent-style-name="832" style:display-name="T283" style:family="text" style:name="2258">
      <style:paragraph-properties/>
    </style:style>
    <style:style style:parent-style-name="832" style:display-name="T284" style:family="text" style:name="2259">
      <style:paragraph-properties/>
    </style:style>
    <style:style style:parent-style-name="832" style:display-name="T285" style:family="text" style:name="2260">
      <style:paragraph-properties/>
    </style:style>
    <style:style style:parent-style-name="832" style:display-name="T286" style:family="text" style:name="2261">
      <style:paragraph-properties/>
    </style:style>
    <style:style style:parent-style-name="832" style:display-name="T287" style:family="text" style:name="2262">
      <style:paragraph-properties/>
    </style:style>
    <style:style style:parent-style-name="832" style:display-name="T288" style:family="text" style:name="2263">
      <style:paragraph-properties/>
    </style:style>
    <style:style style:parent-style-name="832" style:display-name="T289" style:family="text" style:name="2264">
      <style:paragraph-properties/>
    </style:style>
    <style:style style:parent-style-name="832" style:display-name="T290" style:family="text" style:name="2265">
      <style:paragraph-properties/>
    </style:style>
    <style:style style:parent-style-name="832" style:display-name="T291" style:family="text" style:name="2266">
      <style:paragraph-properties/>
    </style:style>
    <style:style style:parent-style-name="832" style:display-name="T292" style:family="text" style:name="2267">
      <style:paragraph-properties/>
    </style:style>
    <style:style style:parent-style-name="832" style:display-name="T293" style:family="text" style:name="2268">
      <style:paragraph-properties/>
    </style:style>
    <style:style style:parent-style-name="832" style:display-name="T294" style:family="text" style:name="2269">
      <style:paragraph-properties/>
    </style:style>
    <style:style style:parent-style-name="832" style:display-name="T295" style:family="text" style:name="2270">
      <style:paragraph-properties/>
    </style:style>
    <style:style style:parent-style-name="832" style:display-name="T296" style:family="text" style:name="2271">
      <style:paragraph-properties/>
    </style:style>
    <style:style style:parent-style-name="832" style:display-name="T297" style:family="text" style:name="2272">
      <style:paragraph-properties/>
    </style:style>
    <style:style style:parent-style-name="832" style:display-name="T298" style:family="text" style:name="2273">
      <style:paragraph-properties/>
      <style:text-properties fo:font-family="Symbol" style:font-family-complex="Symbol"/>
    </style:style>
    <style:style style:parent-style-name="832" style:display-name="T299" style:family="text" style:name="2274">
      <style:paragraph-properties/>
      <style:text-properties fo:font-family="Courier New" style:font-family-complex="Courier New"/>
    </style:style>
    <style:style style:parent-style-name="832" style:display-name="T300" style:family="text" style:name="2275">
      <style:paragraph-properties/>
      <style:text-properties fo:font-family="Wingdings" style:font-family-complex="Wingdings"/>
    </style:style>
    <style:style style:parent-style-name="832" style:display-name="T301" style:family="text" style:name="2276">
      <style:paragraph-properties/>
      <style:text-properties fo:font-family="Symbol" style:font-family-complex="Symbol"/>
    </style:style>
    <style:style style:parent-style-name="832" style:display-name="T302" style:family="text" style:name="2277">
      <style:paragraph-properties/>
      <style:text-properties fo:font-family="Courier New" style:font-family-complex="Courier New"/>
    </style:style>
    <style:style style:parent-style-name="832" style:display-name="T303" style:family="text" style:name="2278">
      <style:paragraph-properties/>
      <style:text-properties fo:font-family="Wingdings" style:font-family-complex="Wingdings"/>
    </style:style>
    <style:style style:parent-style-name="832" style:display-name="T304" style:family="text" style:name="2279">
      <style:paragraph-properties/>
      <style:text-properties fo:font-family="Symbol" style:font-family-complex="Symbol"/>
    </style:style>
    <style:style style:parent-style-name="832" style:display-name="T305" style:family="text" style:name="2280">
      <style:paragraph-properties/>
      <style:text-properties fo:font-family="Courier New" style:font-family-complex="Courier New"/>
    </style:style>
    <style:style style:parent-style-name="832" style:display-name="T306" style:family="text" style:name="2281">
      <style:paragraph-properties/>
      <style:text-properties fo:font-family="Wingdings" style:font-family-complex="Wingdings"/>
    </style:style>
    <style:style style:parent-style-name="832" style:display-name="T307" style:family="text" style:name="2282">
      <style:paragraph-properties/>
    </style:style>
    <style:style style:parent-style-name="832" style:display-name="T308" style:family="text" style:name="2283">
      <style:paragraph-properties/>
    </style:style>
    <style:style style:parent-style-name="832" style:display-name="T309" style:family="text" style:name="2284">
      <style:paragraph-properties/>
    </style:style>
    <style:style style:parent-style-name="832" style:display-name="T310" style:family="text" style:name="2285">
      <style:paragraph-properties/>
    </style:style>
    <style:style style:parent-style-name="832" style:display-name="T311" style:family="text" style:name="2286">
      <style:paragraph-properties/>
    </style:style>
    <style:style style:parent-style-name="832" style:display-name="T312" style:family="text" style:name="2287">
      <style:paragraph-properties/>
    </style:style>
    <style:style style:parent-style-name="832" style:display-name="T313" style:family="text" style:name="2288">
      <style:paragraph-properties/>
    </style:style>
    <style:style style:parent-style-name="832" style:display-name="T314" style:family="text" style:name="2289">
      <style:paragraph-properties/>
    </style:style>
    <style:style style:parent-style-name="832" style:display-name="T315" style:family="text" style:name="2290">
      <style:paragraph-properties/>
    </style:style>
    <style:style style:parent-style-name="832" style:display-name="T316" style:family="text" style:name="2291">
      <style:paragraph-properties/>
      <style:text-properties fo:color="#000000" fo:font-family="Symbol" style:font-family-complex="Symbol" fo:font-size="10pt"/>
    </style:style>
    <style:style style:parent-style-name="832" style:display-name="T317" style:family="text" style:name="2292">
      <style:paragraph-properties/>
      <style:text-properties fo:color="#000000" fo:font-family="Symbol" style:font-family-complex="Symbol" fo:font-size="10pt"/>
    </style:style>
    <style:style style:parent-style-name="832" style:display-name="T318" style:family="text" style:name="2293">
      <style:paragraph-properties/>
      <style:text-properties fo:color="#000000" fo:font-family="Symbol" style:font-family-complex="Symbol" fo:font-size="10pt"/>
    </style:style>
    <style:style style:parent-style-name="832" style:display-name="T319" style:family="text" style:name="2294">
      <style:paragraph-properties/>
      <style:text-properties fo:color="#000000" fo:font-family="Symbol" style:font-family-complex="Symbol" fo:font-size="10pt"/>
    </style:style>
    <style:style style:parent-style-name="832" style:display-name="T320" style:family="text" style:name="2295">
      <style:paragraph-properties/>
      <style:text-properties fo:color="#000000" fo:font-family="Symbol" style:font-family-complex="Symbol" fo:font-size="10pt"/>
    </style:style>
    <style:style style:parent-style-name="832" style:display-name="T321" style:family="text" style:name="2296">
      <style:paragraph-properties/>
      <style:text-properties fo:color="#000000" fo:font-family="Symbol" style:font-family-complex="Symbol" fo:font-size="10pt"/>
    </style:style>
    <style:style style:parent-style-name="832" style:display-name="T322" style:family="text" style:name="2297">
      <style:paragraph-properties/>
      <style:text-properties fo:color="#000000" fo:font-family="Symbol" style:font-family-complex="Symbol" fo:font-size="10pt"/>
    </style:style>
    <style:style style:parent-style-name="832" style:display-name="T323" style:family="text" style:name="2298">
      <style:paragraph-properties/>
      <style:text-properties fo:color="#000000" fo:font-family="Symbol" style:font-family-complex="Symbol" fo:font-size="10pt"/>
    </style:style>
    <style:style style:parent-style-name="832" style:display-name="T324" style:family="text" style:name="2299">
      <style:paragraph-properties/>
      <style:text-properties fo:color="#000000" fo:font-family="Symbol" style:font-family-complex="Symbol" fo:font-size="10pt"/>
    </style:style>
    <style:style style:parent-style-name="832" style:display-name="T325" style:family="text" style:name="2300">
      <style:paragraph-properties/>
      <style:text-properties fo:color="#000000" fo:font-family="Symbol" style:font-family-complex="Symbol" fo:font-size="10pt"/>
    </style:style>
    <style:style style:parent-style-name="832" style:display-name="T326" style:family="text" style:name="2301">
      <style:paragraph-properties/>
      <style:text-properties fo:color="#000000" fo:font-family="Symbol" style:font-family-complex="Symbol" fo:font-size="10pt"/>
    </style:style>
    <style:style style:parent-style-name="832" style:display-name="T327" style:family="text" style:name="2302">
      <style:paragraph-properties/>
      <style:text-properties fo:color="#000000" fo:font-family="Symbol" style:font-family-complex="Symbol" fo:font-size="10pt"/>
    </style:style>
    <style:style style:parent-style-name="832" style:display-name="T328" style:family="text" style:name="2303">
      <style:paragraph-properties/>
      <style:text-properties fo:color="#000000" fo:font-family="Symbol" style:font-family-complex="Symbol" fo:font-size="10pt"/>
    </style:style>
    <style:style style:parent-style-name="832" style:display-name="T329" style:family="text" style:name="2304">
      <style:paragraph-properties/>
      <style:text-properties fo:color="#000000" fo:font-family="Symbol" style:font-family-complex="Symbol" fo:font-size="10pt"/>
    </style:style>
    <style:style style:parent-style-name="832" style:display-name="T330" style:family="text" style:name="2305">
      <style:paragraph-properties/>
      <style:text-properties fo:color="#000000" fo:font-family="Symbol" style:font-family-complex="Symbol" fo:font-size="10pt"/>
    </style:style>
    <style:style style:parent-style-name="832" style:display-name="T331" style:family="text" style:name="2306">
      <style:paragraph-properties/>
      <style:text-properties fo:color="#000000" fo:font-family="Symbol" style:font-family-complex="Symbol" fo:font-size="10pt"/>
    </style:style>
    <style:style style:parent-style-name="832" style:display-name="T332" style:family="text" style:name="2307">
      <style:paragraph-properties/>
      <style:text-properties fo:color="#000000" fo:font-family="Symbol" style:font-family-complex="Symbol" fo:font-size="10pt"/>
    </style:style>
    <style:style style:parent-style-name="832" style:display-name="T333" style:family="text" style:name="2308">
      <style:paragraph-properties/>
      <style:text-properties fo:color="#000000" fo:font-family="Symbol" style:font-family-complex="Symbol" fo:font-size="10pt"/>
    </style:style>
    <style:style style:parent-style-name="832" style:display-name="T334" style:family="text" style:name="2309">
      <style:paragraph-properties/>
      <style:text-properties fo:color="#000000" fo:font-family="Symbol" style:font-family-complex="Symbol" fo:font-size="10pt"/>
    </style:style>
    <style:style style:parent-style-name="832" style:display-name="T335" style:family="text" style:name="2310">
      <style:paragraph-properties/>
      <style:text-properties fo:color="#000000" fo:font-family="Symbol" style:font-family-complex="Symbol" fo:font-size="10pt"/>
    </style:style>
    <style:style style:parent-style-name="832" style:display-name="T336" style:family="text" style:name="2311">
      <style:paragraph-properties/>
      <style:text-properties fo:color="#000000" fo:font-family="Symbol" style:font-family-complex="Symbol" fo:font-size="10pt"/>
    </style:style>
    <style:style style:parent-style-name="832" style:display-name="T337" style:family="text" style:name="2312">
      <style:paragraph-properties/>
      <style:text-properties fo:color="#000000" fo:font-family="Symbol" style:font-family-complex="Symbol" fo:font-size="10pt"/>
    </style:style>
    <style:style style:parent-style-name="832" style:display-name="T338" style:family="text" style:name="2313">
      <style:paragraph-properties/>
      <style:text-properties fo:color="#000000" fo:font-family="Symbol" style:font-family-complex="Symbol" fo:font-size="10pt"/>
    </style:style>
    <style:style style:parent-style-name="832" style:display-name="T339" style:family="text" style:name="2314">
      <style:paragraph-properties/>
      <style:text-properties fo:color="#000000" fo:font-family="Symbol" style:font-family-complex="Symbol" fo:font-size="10pt"/>
    </style:style>
    <style:style style:parent-style-name="832" style:display-name="T340" style:family="text" style:name="2315">
      <style:paragraph-properties/>
      <style:text-properties fo:color="#000000" fo:font-family="Symbol" style:font-family-complex="Symbol" fo:font-size="10pt"/>
    </style:style>
    <style:style style:parent-style-name="832" style:display-name="T341" style:family="text" style:name="2316">
      <style:paragraph-properties/>
      <style:text-properties fo:color="#000000" fo:font-family="Symbol" style:font-family-complex="Symbol" fo:font-size="10pt"/>
    </style:style>
    <style:style style:parent-style-name="832" style:display-name="T342" style:family="text" style:name="2317">
      <style:paragraph-properties/>
      <style:text-properties fo:color="#000000" fo:font-family="Symbol" style:font-family-complex="Symbol" fo:font-size="10pt"/>
    </style:style>
    <style:style style:parent-style-name="832" style:display-name="T343" style:family="text" style:name="2318">
      <style:paragraph-properties/>
      <style:text-properties fo:color="#000000" fo:font-family="Symbol" style:font-family-complex="Symbol" fo:font-size="10pt"/>
    </style:style>
    <style:style style:parent-style-name="832" style:display-name="T344" style:family="text" style:name="2319">
      <style:paragraph-properties/>
      <style:text-properties fo:color="#000000" fo:font-family="Symbol" style:font-family-complex="Symbol" fo:font-size="10pt"/>
    </style:style>
    <style:style style:parent-style-name="832" style:display-name="T345" style:family="text" style:name="2320">
      <style:paragraph-properties/>
      <style:text-properties fo:color="#000000" fo:font-family="Symbol" style:font-family-complex="Symbol" fo:font-size="10pt"/>
    </style:style>
    <style:style style:parent-style-name="832" style:display-name="T346" style:family="text" style:name="2321">
      <style:paragraph-properties/>
      <style:text-properties fo:color="#000000" fo:font-family="Symbol" style:font-family-complex="Symbol" fo:font-size="10pt"/>
    </style:style>
    <style:style style:parent-style-name="832" style:display-name="T347" style:family="text" style:name="2322">
      <style:paragraph-properties/>
      <style:text-properties fo:color="#000000" fo:font-family="Symbol" style:font-family-complex="Symbol" fo:font-size="10pt"/>
    </style:style>
    <style:style style:parent-style-name="832" style:display-name="T348" style:family="text" style:name="2323">
      <style:paragraph-properties/>
      <style:text-properties fo:color="#000000" fo:font-family="Symbol" style:font-family-complex="Symbol" fo:font-size="10pt"/>
    </style:style>
    <style:style style:parent-style-name="832" style:display-name="T349" style:family="text" style:name="2324">
      <style:paragraph-properties/>
      <style:text-properties fo:color="#000000" fo:font-family="Symbol" style:font-family-complex="Symbol" fo:font-size="10pt"/>
    </style:style>
    <style:style style:parent-style-name="832" style:display-name="T350" style:family="text" style:name="2325">
      <style:paragraph-properties/>
      <style:text-properties fo:color="#000000" fo:font-family="Symbol" style:font-family-complex="Symbol" fo:font-size="10pt"/>
    </style:style>
    <style:style style:parent-style-name="832" style:display-name="T351" style:family="text" style:name="2326">
      <style:paragraph-properties/>
      <style:text-properties fo:color="#000000" fo:font-family="Symbol" style:font-family-complex="Symbol" fo:font-size="10pt"/>
    </style:style>
    <style:style style:parent-style-name="832" style:display-name="T352" style:family="text" style:name="2327">
      <style:paragraph-properties/>
      <style:text-properties fo:color="#000000" fo:font-family="Symbol" style:font-family-complex="Symbol" fo:font-size="10pt"/>
    </style:style>
    <style:style style:parent-style-name="832" style:display-name="T353" style:family="text" style:name="2328">
      <style:paragraph-properties/>
      <style:text-properties fo:color="#000000" fo:font-family="Symbol" style:font-family-complex="Symbol" fo:font-size="10pt"/>
    </style:style>
    <style:style style:parent-style-name="832" style:display-name="T354" style:family="text" style:name="2329">
      <style:paragraph-properties/>
      <style:text-properties fo:color="#000000" fo:font-family="Symbol" style:font-family-complex="Symbol" fo:font-size="10pt"/>
    </style:style>
    <style:style style:parent-style-name="832" style:display-name="T355" style:family="text" style:name="2330">
      <style:paragraph-properties/>
      <style:text-properties fo:color="#000000" fo:font-family="Symbol" style:font-family-complex="Symbol" fo:font-size="10pt"/>
    </style:style>
    <style:style style:parent-style-name="832" style:display-name="T356" style:family="text" style:name="2331">
      <style:paragraph-properties/>
      <style:text-properties fo:color="#000000" fo:font-family="Symbol" style:font-family-complex="Symbol" fo:font-size="10pt"/>
    </style:style>
    <style:style style:parent-style-name="832" style:display-name="T357" style:family="text" style:name="2332">
      <style:paragraph-properties/>
      <style:text-properties fo:color="#000000" fo:font-family="Symbol" style:font-family-complex="Symbol" fo:font-size="10pt"/>
    </style:style>
    <style:style style:parent-style-name="832" style:display-name="T358" style:family="text" style:name="2333">
      <style:paragraph-properties/>
      <style:text-properties fo:color="#000000" fo:font-family="Symbol" style:font-family-complex="Symbol" fo:font-size="10pt"/>
    </style:style>
    <style:style style:parent-style-name="832" style:display-name="T359" style:family="text" style:name="2334">
      <style:paragraph-properties/>
      <style:text-properties fo:color="#000000" fo:font-family="Symbol" style:font-family-complex="Symbol" fo:font-size="10pt"/>
    </style:style>
    <style:style style:parent-style-name="832" style:display-name="T360" style:family="text" style:name="2335">
      <style:paragraph-properties/>
      <style:text-properties fo:color="#000000" fo:font-family="Symbol" style:font-family-complex="Symbol" fo:font-size="10pt"/>
    </style:style>
    <style:style style:parent-style-name="832" style:display-name="T361" style:family="text" style:name="2336">
      <style:paragraph-properties/>
      <style:text-properties fo:color="#000000" fo:font-family="Symbol" style:font-family-complex="Symbol" fo:font-size="10pt"/>
    </style:style>
    <style:style style:parent-style-name="832" style:display-name="T362" style:family="text" style:name="2337">
      <style:paragraph-properties/>
      <style:text-properties fo:color="#000000" fo:font-family="Symbol" style:font-family-complex="Symbol" fo:font-size="10pt"/>
    </style:style>
    <style:style style:parent-style-name="832" style:display-name="T363" style:family="text" style:name="2338">
      <style:paragraph-properties/>
      <style:text-properties fo:color="#000000" fo:font-family="Symbol" style:font-family-complex="Symbol" fo:font-size="10pt"/>
    </style:style>
    <style:style style:parent-style-name="832" style:display-name="T364" style:family="text" style:name="2339">
      <style:paragraph-properties/>
      <style:text-properties fo:color="#000000" fo:font-family="Symbol" style:font-family-complex="Symbol" fo:font-size="10pt"/>
    </style:style>
    <style:style style:parent-style-name="832" style:display-name="T365" style:family="text" style:name="2340">
      <style:paragraph-properties/>
      <style:text-properties fo:color="#000000" fo:font-family="Symbol" style:font-family-complex="Symbol" fo:font-size="10pt"/>
    </style:style>
    <style:style style:parent-style-name="832" style:display-name="T366" style:family="text" style:name="2341">
      <style:paragraph-properties/>
      <style:text-properties fo:color="#000000" fo:font-family="Symbol" style:font-family-complex="Symbol" fo:font-size="10pt"/>
    </style:style>
    <style:style style:parent-style-name="832" style:display-name="T367" style:family="text" style:name="2342">
      <style:paragraph-properties/>
      <style:text-properties fo:color="#000000" fo:font-family="Symbol" style:font-family-complex="Symbol" fo:font-size="10pt"/>
    </style:style>
    <style:style style:parent-style-name="832" style:display-name="T368" style:family="text" style:name="2343">
      <style:paragraph-properties/>
      <style:text-properties fo:color="#000000" fo:font-family="Symbol" style:font-family-complex="Symbol" fo:font-size="10pt"/>
    </style:style>
    <style:style style:parent-style-name="832" style:display-name="T369" style:family="text" style:name="2344">
      <style:paragraph-properties/>
      <style:text-properties fo:color="#000000" fo:font-family="Symbol" style:font-family-complex="Symbol" fo:font-size="10pt"/>
    </style:style>
    <style:style style:parent-style-name="832" style:display-name="T370" style:family="text" style:name="2345">
      <style:paragraph-properties/>
      <style:text-properties fo:color="#000000" fo:font-family="Symbol" style:font-family-complex="Symbol" fo:font-size="10pt"/>
    </style:style>
    <style:style style:parent-style-name="832" style:display-name="T371" style:family="text" style:name="2346">
      <style:paragraph-properties/>
      <style:text-properties fo:color="#000000" fo:font-family="Symbol" style:font-family-complex="Symbol" fo:font-size="10pt"/>
    </style:style>
    <style:style style:parent-style-name="832" style:display-name="T372" style:family="text" style:name="2347">
      <style:paragraph-properties/>
      <style:text-properties fo:color="#000000" fo:font-family="Symbol" style:font-family-complex="Symbol" fo:font-size="10pt"/>
    </style:style>
    <style:style style:parent-style-name="832" style:display-name="T373" style:family="text" style:name="2348">
      <style:paragraph-properties/>
      <style:text-properties fo:color="#000000" fo:font-family="Symbol" style:font-family-complex="Symbol" fo:font-size="10pt"/>
    </style:style>
    <style:style style:parent-style-name="832" style:display-name="T374" style:family="text" style:name="2349">
      <style:paragraph-properties/>
      <style:text-properties fo:color="#000000" fo:font-family="Symbol" style:font-family-complex="Symbol" fo:font-size="10pt"/>
    </style:style>
    <style:style style:parent-style-name="832" style:display-name="T375" style:family="text" style:name="2350">
      <style:paragraph-properties/>
      <style:text-properties fo:color="#000000" fo:font-family="Symbol" style:font-family-complex="Symbol" fo:font-size="10pt"/>
    </style:style>
    <style:style style:parent-style-name="832" style:display-name="T376" style:family="text" style:name="2351">
      <style:paragraph-properties/>
      <style:text-properties fo:color="#000000" fo:font-family="Symbol" style:font-family-complex="Symbol" fo:font-size="10pt"/>
    </style:style>
    <style:style style:parent-style-name="832" style:display-name="T377" style:family="text" style:name="2352">
      <style:paragraph-properties/>
      <style:text-properties fo:color="#000000" fo:font-family="Symbol" style:font-family-complex="Symbol" fo:font-size="10pt"/>
    </style:style>
    <style:style style:parent-style-name="832" style:display-name="T378" style:family="text" style:name="2353">
      <style:paragraph-properties/>
      <style:text-properties fo:color="#000000" fo:font-family="Symbol" style:font-family-complex="Symbol" fo:font-size="10pt"/>
    </style:style>
    <style:style style:parent-style-name="832" style:display-name="T379" style:family="text" style:name="2354">
      <style:paragraph-properties/>
      <style:text-properties fo:font-family="Symbol" style:font-family-complex="Symbol"/>
    </style:style>
    <style:style style:parent-style-name="832" style:display-name="T380" style:family="text" style:name="2355">
      <style:paragraph-properties/>
      <style:text-properties fo:font-family="Symbol" style:font-family-complex="Symbol"/>
    </style:style>
    <style:style style:parent-style-name="832" style:display-name="T381" style:family="text" style:name="2356">
      <style:paragraph-properties/>
      <style:text-properties fo:font-family="Symbol" style:font-family-complex="Symbol"/>
    </style:style>
    <style:style style:parent-style-name="832" style:display-name="T382" style:family="text" style:name="2357">
      <style:paragraph-properties/>
      <style:text-properties fo:font-family="Symbol" style:font-family-complex="Symbol"/>
    </style:style>
    <style:style style:parent-style-name="832" style:display-name="T383" style:family="text" style:name="2358">
      <style:paragraph-properties/>
      <style:text-properties fo:font-family="Symbol" style:font-family-complex="Symbol"/>
    </style:style>
    <style:style style:parent-style-name="832" style:display-name="T384" style:family="text" style:name="2359">
      <style:paragraph-properties/>
      <style:text-properties fo:font-family="Symbol" style:font-family-complex="Symbol"/>
    </style:style>
    <style:style style:parent-style-name="832" style:display-name="T385" style:family="text" style:name="2360">
      <style:paragraph-properties/>
      <style:text-properties fo:font-family="Symbol" style:font-family-complex="Symbol"/>
    </style:style>
    <style:style style:parent-style-name="832" style:display-name="T386" style:family="text" style:name="2361">
      <style:paragraph-properties/>
      <style:text-properties fo:font-family="Symbol" style:font-family-complex="Symbol"/>
    </style:style>
    <style:style style:parent-style-name="832" style:display-name="T387" style:family="text" style:name="2362">
      <style:paragraph-properties/>
      <style:text-properties fo:font-family="Symbol" style:font-family-complex="Symbol"/>
    </style:style>
    <style:style style:parent-style-name="832" style:display-name="T388" style:family="text" style:name="2363">
      <style:paragraph-properties/>
      <style:text-properties fo:font-family="Symbol" style:font-family-complex="Symbol"/>
    </style:style>
    <style:style style:parent-style-name="832" style:display-name="T389" style:family="text" style:name="2364">
      <style:paragraph-properties/>
      <style:text-properties fo:font-family="Symbol" style:font-family-complex="Symbol"/>
    </style:style>
    <style:style style:parent-style-name="832" style:display-name="T390" style:family="text" style:name="2365">
      <style:paragraph-properties/>
      <style:text-properties fo:font-family="Symbol" style:font-family-complex="Symbol"/>
    </style:style>
    <style:style style:parent-style-name="832" style:display-name="T391" style:family="text" style:name="2366">
      <style:paragraph-properties/>
      <style:text-properties fo:font-family="Symbol" style:font-family-complex="Symbol"/>
    </style:style>
    <style:style style:parent-style-name="832" style:display-name="T392" style:family="text" style:name="2367">
      <style:paragraph-properties/>
      <style:text-properties fo:font-family="Symbol" style:font-family-complex="Symbol"/>
    </style:style>
    <style:style style:parent-style-name="832" style:display-name="T393" style:family="text" style:name="2368">
      <style:paragraph-properties/>
      <style:text-properties fo:font-family="Symbol" style:font-family-complex="Symbol"/>
    </style:style>
    <style:style style:parent-style-name="832" style:display-name="T394" style:family="text" style:name="2369">
      <style:paragraph-properties/>
      <style:text-properties fo:font-family="Symbol" style:font-family-complex="Symbol"/>
    </style:style>
    <style:style style:parent-style-name="832" style:display-name="T395" style:family="text" style:name="2370">
      <style:paragraph-properties/>
      <style:text-properties fo:font-family="Symbol" style:font-family-complex="Symbol"/>
    </style:style>
    <style:style style:parent-style-name="832" style:display-name="T396" style:family="text" style:name="2371">
      <style:paragraph-properties/>
      <style:text-properties fo:font-family="Symbol" style:font-family-complex="Symbol"/>
    </style:style>
    <style:style style:parent-style-name="832" style:display-name="T1" style:family="text" style:name="2372">
      <style:paragraph-properties/>
    </style:style>
    <style:style style:parent-style-name="832" style:display-name="T2" style:family="text" style:name="2373">
      <style:paragraph-properties/>
    </style:style>
    <style:style style:parent-style-name="832" style:display-name="T3" style:family="text" style:name="2374">
      <style:paragraph-properties/>
    </style:style>
    <style:style style:parent-style-name="832" style:display-name="T4" style:family="text" style:name="2375">
      <style:paragraph-properties/>
    </style:style>
    <style:style style:parent-style-name="832" style:display-name="T5" style:family="text" style:name="2376">
      <style:paragraph-properties/>
    </style:style>
    <style:style style:parent-style-name="832" style:display-name="T6" style:family="text" style:name="2377">
      <style:paragraph-properties/>
    </style:style>
    <style:style style:parent-style-name="832" style:display-name="T7" style:family="text" style:name="2378">
      <style:paragraph-properties/>
    </style:style>
    <style:style style:parent-style-name="832" style:display-name="T8" style:family="text" style:name="2379">
      <style:paragraph-properties/>
    </style:style>
    <style:style style:parent-style-name="832" style:display-name="T9" style:family="text" style:name="2380">
      <style:paragraph-properties/>
    </style:style>
    <style:style style:parent-style-name="832" style:display-name="T10" style:family="text" style:name="2381">
      <style:paragraph-properties/>
      <style:text-properties fo:font-family="Symbol" style:font-family-complex="Symbol"/>
    </style:style>
    <style:style style:parent-style-name="832" style:display-name="T11" style:family="text" style:name="2382">
      <style:paragraph-properties/>
      <style:text-properties fo:font-family="Symbol" style:font-family-complex="Symbol"/>
    </style:style>
    <style:style style:parent-style-name="832" style:display-name="T12" style:family="text" style:name="2383">
      <style:paragraph-properties/>
      <style:text-properties fo:font-family="Symbol" style:font-family-complex="Symbol"/>
    </style:style>
    <style:style style:parent-style-name="832" style:display-name="T13" style:family="text" style:name="2384">
      <style:paragraph-properties/>
      <style:text-properties fo:font-family="Symbol" style:font-family-complex="Symbol"/>
    </style:style>
    <style:style style:parent-style-name="832" style:display-name="T14" style:family="text" style:name="2385">
      <style:paragraph-properties/>
      <style:text-properties fo:font-family="Symbol" style:font-family-complex="Symbol"/>
    </style:style>
    <style:style style:parent-style-name="832" style:display-name="T15" style:family="text" style:name="2386">
      <style:paragraph-properties/>
      <style:text-properties fo:font-family="Symbol" style:font-family-complex="Symbol"/>
    </style:style>
    <style:style style:parent-style-name="832" style:display-name="T16" style:family="text" style:name="2387">
      <style:paragraph-properties/>
      <style:text-properties fo:font-family="Symbol" style:font-family-complex="Symbol"/>
    </style:style>
    <style:style style:parent-style-name="832" style:display-name="T17" style:family="text" style:name="2388">
      <style:paragraph-properties/>
      <style:text-properties fo:font-family="Symbol" style:font-family-complex="Symbol"/>
    </style:style>
    <style:style style:parent-style-name="832" style:display-name="T18" style:family="text" style:name="2389">
      <style:paragraph-properties/>
      <style:text-properties fo:font-family="Symbol" style:font-family-complex="Symbol"/>
    </style:style>
    <style:style style:parent-style-name="832" style:display-name="T19" style:family="text" style:name="2390">
      <style:paragraph-properties/>
      <style:text-properties fo:font-family="Symbol" style:font-family-complex="Symbol"/>
    </style:style>
    <style:style style:parent-style-name="832" style:display-name="T20" style:family="text" style:name="2391">
      <style:paragraph-properties/>
      <style:text-properties fo:font-family="Symbol" style:font-family-complex="Symbol"/>
    </style:style>
    <style:style style:parent-style-name="832" style:display-name="T21" style:family="text" style:name="2392">
      <style:paragraph-properties/>
      <style:text-properties fo:font-family="Symbol" style:font-family-complex="Symbol"/>
    </style:style>
    <style:style style:parent-style-name="832" style:display-name="T22" style:family="text" style:name="2393">
      <style:paragraph-properties/>
      <style:text-properties fo:font-family="Symbol" style:font-family-complex="Symbol"/>
    </style:style>
    <style:style style:parent-style-name="832" style:display-name="T23" style:family="text" style:name="2394">
      <style:paragraph-properties/>
      <style:text-properties fo:font-family="Symbol" style:font-family-complex="Symbol"/>
    </style:style>
    <style:style style:parent-style-name="832" style:display-name="T24" style:family="text" style:name="2395">
      <style:paragraph-properties/>
      <style:text-properties fo:font-family="Symbol" style:font-family-complex="Symbol"/>
    </style:style>
    <style:style style:parent-style-name="832" style:display-name="T25" style:family="text" style:name="2396">
      <style:paragraph-properties/>
      <style:text-properties fo:font-family="Symbol" style:font-family-complex="Symbol"/>
    </style:style>
    <style:style style:parent-style-name="832" style:display-name="T26" style:family="text" style:name="2397">
      <style:paragraph-properties/>
      <style:text-properties fo:font-family="Symbol" style:font-family-complex="Symbol"/>
    </style:style>
    <style:style style:parent-style-name="832" style:display-name="T27" style:family="text" style:name="2398">
      <style:paragraph-properties/>
      <style:text-properties fo:font-family="Symbol" style:font-family-complex="Symbol"/>
    </style:style>
    <style:style style:parent-style-name="832" style:display-name="T28" style:family="text" style:name="2399">
      <style:paragraph-properties/>
    </style:style>
    <style:style style:parent-style-name="832" style:display-name="T29" style:family="text" style:name="2400">
      <style:paragraph-properties/>
    </style:style>
    <style:style style:parent-style-name="832" style:display-name="T30" style:family="text" style:name="2401">
      <style:paragraph-properties/>
    </style:style>
    <style:style style:parent-style-name="832" style:display-name="T31" style:family="text" style:name="2402">
      <style:paragraph-properties/>
    </style:style>
    <style:style style:parent-style-name="832" style:display-name="T32" style:family="text" style:name="2403">
      <style:paragraph-properties/>
    </style:style>
    <style:style style:parent-style-name="832" style:display-name="T33" style:family="text" style:name="2404">
      <style:paragraph-properties/>
    </style:style>
    <style:style style:parent-style-name="832" style:display-name="T34" style:family="text" style:name="2405">
      <style:paragraph-properties/>
    </style:style>
    <style:style style:parent-style-name="832" style:display-name="T35" style:family="text" style:name="2406">
      <style:paragraph-properties/>
    </style:style>
    <style:style style:parent-style-name="832" style:display-name="T36" style:family="text" style:name="2407">
      <style:paragraph-properties/>
    </style:style>
    <style:style style:parent-style-name="832" style:display-name="T37" style:family="text" style:name="2408">
      <style:paragraph-properties/>
      <style:text-properties fo:font-family="Symbol" style:font-family-complex="Symbol"/>
    </style:style>
    <style:style style:parent-style-name="832" style:display-name="T38" style:family="text" style:name="2409">
      <style:paragraph-properties/>
      <style:text-properties fo:font-family="OpenSymbol" style:font-family-complex="OpenSymbol"/>
    </style:style>
    <style:style style:parent-style-name="832" style:display-name="T39" style:family="text" style:name="2410">
      <style:paragraph-properties/>
      <style:text-properties fo:font-family="OpenSymbol" style:font-family-complex="OpenSymbol"/>
    </style:style>
    <style:style style:parent-style-name="832" style:display-name="T40" style:family="text" style:name="2411">
      <style:paragraph-properties/>
      <style:text-properties fo:font-family="Symbol" style:font-family-complex="Symbol"/>
    </style:style>
    <style:style style:parent-style-name="832" style:display-name="T41" style:family="text" style:name="2412">
      <style:paragraph-properties/>
      <style:text-properties fo:font-family="OpenSymbol" style:font-family-complex="OpenSymbol"/>
    </style:style>
    <style:style style:parent-style-name="832" style:display-name="T42" style:family="text" style:name="2413">
      <style:paragraph-properties/>
      <style:text-properties fo:font-family="OpenSymbol" style:font-family-complex="OpenSymbol"/>
    </style:style>
    <style:style style:parent-style-name="832" style:display-name="T43" style:family="text" style:name="2414">
      <style:paragraph-properties/>
      <style:text-properties fo:font-family="Symbol" style:font-family-complex="Symbol"/>
    </style:style>
    <style:style style:parent-style-name="832" style:display-name="T44" style:family="text" style:name="2415">
      <style:paragraph-properties/>
      <style:text-properties fo:font-family="OpenSymbol" style:font-family-complex="OpenSymbol"/>
    </style:style>
    <style:style style:parent-style-name="832" style:display-name="T45" style:family="text" style:name="2416">
      <style:paragraph-properties/>
      <style:text-properties fo:font-family="OpenSymbol" style:font-family-complex="OpenSymbol"/>
    </style:style>
    <style:style style:parent-style-name="832" style:display-name="T46" style:family="text" style:name="2417">
      <style:paragraph-properties/>
      <style:text-properties fo:font-family="Symbol" style:font-family-complex="Symbol"/>
    </style:style>
    <style:style style:parent-style-name="832" style:display-name="T47" style:family="text" style:name="2418">
      <style:paragraph-properties/>
      <style:text-properties fo:font-family="Symbol" style:font-family-complex="Symbol"/>
    </style:style>
    <style:style style:parent-style-name="832" style:display-name="T48" style:family="text" style:name="2419">
      <style:paragraph-properties/>
      <style:text-properties fo:font-family="Symbol" style:font-family-complex="Symbol"/>
    </style:style>
    <style:style style:parent-style-name="832" style:display-name="T49" style:family="text" style:name="2420">
      <style:paragraph-properties/>
      <style:text-properties fo:font-family="Symbol" style:font-family-complex="Symbol"/>
    </style:style>
    <style:style style:parent-style-name="832" style:display-name="T50" style:family="text" style:name="2421">
      <style:paragraph-properties/>
      <style:text-properties fo:font-family="Symbol" style:font-family-complex="Symbol"/>
    </style:style>
    <style:style style:parent-style-name="832" style:display-name="T51" style:family="text" style:name="2422">
      <style:paragraph-properties/>
      <style:text-properties fo:font-family="Symbol" style:font-family-complex="Symbol"/>
    </style:style>
    <style:style style:parent-style-name="832" style:display-name="T52" style:family="text" style:name="2423">
      <style:paragraph-properties/>
      <style:text-properties fo:font-family="Symbol" style:font-family-complex="Symbol"/>
    </style:style>
    <style:style style:parent-style-name="832" style:display-name="T53" style:family="text" style:name="2424">
      <style:paragraph-properties/>
      <style:text-properties fo:font-family="Symbol" style:font-family-complex="Symbol"/>
    </style:style>
    <style:style style:parent-style-name="832" style:display-name="T54" style:family="text" style:name="2425">
      <style:paragraph-properties/>
      <style:text-properties fo:font-family="Symbol" style:font-family-complex="Symbol"/>
    </style:style>
    <style:style style:parent-style-name="832" style:display-name="T55" style:family="text" style:name="2426">
      <style:paragraph-properties/>
      <style:text-properties fo:font-family="Symbol" style:font-family-complex="Symbol"/>
    </style:style>
    <style:style style:parent-style-name="832" style:display-name="T56" style:family="text" style:name="2427">
      <style:paragraph-properties/>
      <style:text-properties fo:font-family="Symbol" style:font-family-complex="Symbol"/>
    </style:style>
    <style:style style:parent-style-name="832" style:display-name="T57" style:family="text" style:name="2428">
      <style:paragraph-properties/>
      <style:text-properties fo:font-family="Symbol" style:font-family-complex="Symbol"/>
    </style:style>
    <style:style style:parent-style-name="832" style:display-name="T58" style:family="text" style:name="2429">
      <style:paragraph-properties/>
      <style:text-properties fo:font-family="Symbol" style:font-family-complex="Symbol"/>
    </style:style>
    <style:style style:parent-style-name="832" style:display-name="T59" style:family="text" style:name="2430">
      <style:paragraph-properties/>
      <style:text-properties fo:font-family="Symbol" style:font-family-complex="Symbol"/>
    </style:style>
    <style:style style:parent-style-name="832" style:display-name="T60" style:family="text" style:name="2431">
      <style:paragraph-properties/>
      <style:text-properties fo:font-family="Symbol" style:font-family-complex="Symbol"/>
    </style:style>
    <style:style style:parent-style-name="832" style:display-name="T61" style:family="text" style:name="2432">
      <style:paragraph-properties/>
      <style:text-properties fo:font-family="Symbol" style:font-family-complex="Symbol"/>
    </style:style>
    <style:style style:parent-style-name="832" style:display-name="T62" style:family="text" style:name="2433">
      <style:paragraph-properties/>
      <style:text-properties fo:font-family="Symbol" style:font-family-complex="Symbol"/>
    </style:style>
    <style:style style:parent-style-name="832" style:display-name="T63" style:family="text" style:name="2434">
      <style:paragraph-properties/>
      <style:text-properties fo:font-family="Symbol" style:font-family-complex="Symbol"/>
    </style:style>
    <style:style style:parent-style-name="832" style:display-name="T64" style:family="text" style:name="2435">
      <style:paragraph-properties/>
      <style:text-properties fo:font-family="Symbol" style:font-family-complex="Symbol"/>
    </style:style>
    <style:style style:parent-style-name="832" style:display-name="T65" style:family="text" style:name="2436">
      <style:paragraph-properties/>
      <style:text-properties fo:font-family="Symbol" style:font-family-complex="Symbol"/>
    </style:style>
    <style:style style:parent-style-name="832" style:display-name="T66" style:family="text" style:name="2437">
      <style:paragraph-properties/>
      <style:text-properties fo:font-family="Symbol" style:font-family-complex="Symbol"/>
    </style:style>
    <style:style style:parent-style-name="832" style:display-name="T67" style:family="text" style:name="2438">
      <style:paragraph-properties/>
      <style:text-properties fo:font-family="Symbol" style:font-family-complex="Symbol"/>
    </style:style>
    <style:style style:parent-style-name="832" style:display-name="T68" style:family="text" style:name="2439">
      <style:paragraph-properties/>
      <style:text-properties fo:font-family="Symbol" style:font-family-complex="Symbol"/>
    </style:style>
    <style:style style:parent-style-name="832" style:display-name="T69" style:family="text" style:name="2440">
      <style:paragraph-properties/>
      <style:text-properties fo:font-family="Symbol" style:font-family-complex="Symbol"/>
    </style:style>
    <style:style style:parent-style-name="832" style:display-name="T70" style:family="text" style:name="2441">
      <style:paragraph-properties/>
      <style:text-properties fo:font-family="Symbol" style:font-family-complex="Symbol"/>
    </style:style>
    <style:style style:parent-style-name="832" style:display-name="T71" style:family="text" style:name="2442">
      <style:paragraph-properties/>
      <style:text-properties fo:font-family="Symbol" style:font-family-complex="Symbol"/>
    </style:style>
    <style:style style:parent-style-name="832" style:display-name="T72" style:family="text" style:name="2443">
      <style:paragraph-properties/>
      <style:text-properties fo:font-family="Symbol" style:font-family-complex="Symbol"/>
    </style:style>
    <style:style style:parent-style-name="832" style:display-name="T73" style:family="text" style:name="2444">
      <style:paragraph-properties/>
      <style:text-properties fo:font-family="Symbol" style:font-family-complex="Symbol"/>
    </style:style>
    <style:style style:parent-style-name="832" style:display-name="T74" style:family="text" style:name="2445">
      <style:paragraph-properties/>
      <style:text-properties fo:font-family="OpenSymbol" style:font-family-complex="OpenSymbol"/>
    </style:style>
    <style:style style:parent-style-name="832" style:display-name="T75" style:family="text" style:name="2446">
      <style:paragraph-properties/>
      <style:text-properties fo:font-family="OpenSymbol" style:font-family-complex="OpenSymbol"/>
    </style:style>
    <style:style style:parent-style-name="832" style:display-name="T76" style:family="text" style:name="2447">
      <style:paragraph-properties/>
      <style:text-properties fo:font-family="Symbol" style:font-family-complex="Symbol"/>
    </style:style>
    <style:style style:parent-style-name="832" style:display-name="T77" style:family="text" style:name="2448">
      <style:paragraph-properties/>
      <style:text-properties fo:font-family="OpenSymbol" style:font-family-complex="OpenSymbol"/>
    </style:style>
    <style:style style:parent-style-name="832" style:display-name="T78" style:family="text" style:name="2449">
      <style:paragraph-properties/>
      <style:text-properties fo:font-family="OpenSymbol" style:font-family-complex="OpenSymbol"/>
    </style:style>
    <style:style style:parent-style-name="832" style:display-name="T79" style:family="text" style:name="2450">
      <style:paragraph-properties/>
      <style:text-properties fo:font-family="Symbol" style:font-family-complex="Symbol"/>
    </style:style>
    <style:style style:parent-style-name="832" style:display-name="T80" style:family="text" style:name="2451">
      <style:paragraph-properties/>
      <style:text-properties fo:font-family="OpenSymbol" style:font-family-complex="OpenSymbol"/>
    </style:style>
    <style:style style:parent-style-name="832" style:display-name="T81" style:family="text" style:name="2452">
      <style:paragraph-properties/>
      <style:text-properties fo:font-family="OpenSymbol" style:font-family-complex="OpenSymbol"/>
    </style:style>
    <style:style style:parent-style-name="832" style:display-name="T82" style:family="text" style:name="2453">
      <style:paragraph-properties/>
      <style:text-properties fo:font-family="Symbol" style:font-family-complex="Symbol"/>
    </style:style>
    <style:style style:parent-style-name="832" style:display-name="T83" style:family="text" style:name="2454">
      <style:paragraph-properties/>
      <style:text-properties fo:font-family="Symbol" style:font-family-complex="Symbol"/>
    </style:style>
    <style:style style:parent-style-name="832" style:display-name="T84" style:family="text" style:name="2455">
      <style:paragraph-properties/>
      <style:text-properties fo:font-family="Symbol" style:font-family-complex="Symbol"/>
    </style:style>
    <style:style style:parent-style-name="832" style:display-name="T85" style:family="text" style:name="2456">
      <style:paragraph-properties/>
      <style:text-properties fo:font-family="Symbol" style:font-family-complex="Symbol"/>
    </style:style>
    <style:style style:parent-style-name="832" style:display-name="T86" style:family="text" style:name="2457">
      <style:paragraph-properties/>
      <style:text-properties fo:font-family="Symbol" style:font-family-complex="Symbol"/>
    </style:style>
    <style:style style:parent-style-name="832" style:display-name="T87" style:family="text" style:name="2458">
      <style:paragraph-properties/>
      <style:text-properties fo:font-family="Symbol" style:font-family-complex="Symbol"/>
    </style:style>
    <style:style style:parent-style-name="832" style:display-name="T88" style:family="text" style:name="2459">
      <style:paragraph-properties/>
      <style:text-properties fo:font-family="Symbol" style:font-family-complex="Symbol"/>
    </style:style>
    <style:style style:parent-style-name="832" style:display-name="T89" style:family="text" style:name="2460">
      <style:paragraph-properties/>
      <style:text-properties fo:font-family="Symbol" style:font-family-complex="Symbol"/>
    </style:style>
    <style:style style:parent-style-name="832" style:display-name="T90" style:family="text" style:name="2461">
      <style:paragraph-properties/>
      <style:text-properties fo:font-family="Symbol" style:font-family-complex="Symbol"/>
    </style:style>
    <style:style style:parent-style-name="832" style:display-name="T91" style:family="text" style:name="2462">
      <style:paragraph-properties/>
      <style:text-properties fo:font-family="Symbol" style:font-family-complex="Symbol"/>
    </style:style>
    <style:style style:parent-style-name="832" style:display-name="T92" style:family="text" style:name="2463">
      <style:paragraph-properties/>
      <style:text-properties fo:font-family="Symbol" style:font-family-complex="Symbol"/>
    </style:style>
    <style:style style:parent-style-name="832" style:display-name="T93" style:family="text" style:name="2464">
      <style:paragraph-properties/>
      <style:text-properties fo:font-family="Symbol" style:font-family-complex="Symbol"/>
    </style:style>
    <style:style style:parent-style-name="832" style:display-name="T94" style:family="text" style:name="2465">
      <style:paragraph-properties/>
      <style:text-properties fo:font-family="Symbol" style:font-family-complex="Symbol"/>
    </style:style>
    <style:style style:parent-style-name="832" style:display-name="T95" style:family="text" style:name="2466">
      <style:paragraph-properties/>
      <style:text-properties fo:font-family="Symbol" style:font-family-complex="Symbol"/>
    </style:style>
    <style:style style:parent-style-name="832" style:display-name="T96" style:family="text" style:name="2467">
      <style:paragraph-properties/>
      <style:text-properties fo:font-family="Symbol" style:font-family-complex="Symbol"/>
    </style:style>
    <style:style style:parent-style-name="832" style:display-name="T97" style:family="text" style:name="2468">
      <style:paragraph-properties/>
      <style:text-properties fo:font-family="Symbol" style:font-family-complex="Symbol"/>
    </style:style>
    <style:style style:parent-style-name="832" style:display-name="T98" style:family="text" style:name="2469">
      <style:paragraph-properties/>
      <style:text-properties fo:font-family="Symbol" style:font-family-complex="Symbol"/>
    </style:style>
    <style:style style:parent-style-name="832" style:display-name="T99" style:family="text" style:name="2470">
      <style:paragraph-properties/>
      <style:text-properties fo:font-family="Symbol" style:font-family-complex="Symbol"/>
    </style:style>
    <style:style style:parent-style-name="832" style:display-name="T100" style:family="text" style:name="2471">
      <style:paragraph-properties/>
      <style:text-properties fo:font-family="Symbol" style:font-family-complex="Symbol"/>
    </style:style>
    <style:style style:parent-style-name="832" style:display-name="T101" style:family="text" style:name="2472">
      <style:paragraph-properties/>
      <style:text-properties fo:font-family="OpenSymbol" style:font-family-complex="OpenSymbol"/>
    </style:style>
    <style:style style:parent-style-name="832" style:display-name="T102" style:family="text" style:name="2473">
      <style:paragraph-properties/>
      <style:text-properties fo:font-family="OpenSymbol" style:font-family-complex="OpenSymbol"/>
    </style:style>
    <style:style style:parent-style-name="832" style:display-name="T103" style:family="text" style:name="2474">
      <style:paragraph-properties/>
      <style:text-properties fo:font-family="Symbol" style:font-family-complex="Symbol"/>
    </style:style>
    <style:style style:parent-style-name="832" style:display-name="T104" style:family="text" style:name="2475">
      <style:paragraph-properties/>
      <style:text-properties fo:font-family="OpenSymbol" style:font-family-complex="OpenSymbol"/>
    </style:style>
    <style:style style:parent-style-name="832" style:display-name="T105" style:family="text" style:name="2476">
      <style:paragraph-properties/>
      <style:text-properties fo:font-family="OpenSymbol" style:font-family-complex="OpenSymbol"/>
    </style:style>
    <style:style style:parent-style-name="832" style:display-name="T106" style:family="text" style:name="2477">
      <style:paragraph-properties/>
      <style:text-properties fo:font-family="Symbol" style:font-family-complex="Symbol"/>
    </style:style>
    <style:style style:parent-style-name="832" style:display-name="T107" style:family="text" style:name="2478">
      <style:paragraph-properties/>
      <style:text-properties fo:font-family="OpenSymbol" style:font-family-complex="OpenSymbol"/>
    </style:style>
    <style:style style:parent-style-name="832" style:display-name="T108" style:family="text" style:name="2479">
      <style:paragraph-properties/>
      <style:text-properties fo:font-family="OpenSymbol" style:font-family-complex="OpenSymbol"/>
    </style:style>
    <style:style style:parent-style-name="832" style:display-name="T109" style:family="text" style:name="2480">
      <style:paragraph-properties/>
      <style:text-properties fo:font-family="Symbol" style:font-family-complex="Symbol"/>
    </style:style>
    <style:style style:parent-style-name="832" style:display-name="T110" style:family="text" style:name="2481">
      <style:paragraph-properties/>
      <style:text-properties fo:font-family="Symbol" style:font-family-complex="Symbol"/>
    </style:style>
    <style:style style:parent-style-name="832" style:display-name="T111" style:family="text" style:name="2482">
      <style:paragraph-properties/>
      <style:text-properties fo:font-family="Symbol" style:font-family-complex="Symbol"/>
    </style:style>
    <style:style style:parent-style-name="832" style:display-name="T112" style:family="text" style:name="2483">
      <style:paragraph-properties/>
      <style:text-properties fo:font-family="Symbol" style:font-family-complex="Symbol"/>
    </style:style>
    <style:style style:parent-style-name="832" style:display-name="T113" style:family="text" style:name="2484">
      <style:paragraph-properties/>
      <style:text-properties fo:font-family="Symbol" style:font-family-complex="Symbol"/>
    </style:style>
    <style:style style:parent-style-name="832" style:display-name="T114" style:family="text" style:name="2485">
      <style:paragraph-properties/>
      <style:text-properties fo:font-family="Symbol" style:font-family-complex="Symbol"/>
    </style:style>
    <style:style style:parent-style-name="832" style:display-name="T115" style:family="text" style:name="2486">
      <style:paragraph-properties/>
      <style:text-properties fo:font-family="Symbol" style:font-family-complex="Symbol"/>
    </style:style>
    <style:style style:parent-style-name="832" style:display-name="T116" style:family="text" style:name="2487">
      <style:paragraph-properties/>
      <style:text-properties fo:font-family="Symbol" style:font-family-complex="Symbol"/>
    </style:style>
    <style:style style:parent-style-name="832" style:display-name="T117" style:family="text" style:name="2488">
      <style:paragraph-properties/>
      <style:text-properties fo:font-family="Symbol" style:font-family-complex="Symbol"/>
    </style:style>
    <style:style style:parent-style-name="832" style:display-name="T118" style:family="text" style:name="2489">
      <style:paragraph-properties/>
      <style:text-properties fo:font-family="Symbol" style:font-family-complex="Symbol"/>
    </style:style>
    <style:style style:parent-style-name="832" style:display-name="T119" style:family="text" style:name="2490">
      <style:paragraph-properties/>
      <style:text-properties fo:font-family="Symbol" style:font-family-complex="Symbol"/>
    </style:style>
    <style:style style:parent-style-name="832" style:display-name="T120" style:family="text" style:name="2491">
      <style:paragraph-properties/>
      <style:text-properties fo:font-family="Symbol" style:font-family-complex="Symbol"/>
    </style:style>
    <style:style style:parent-style-name="832" style:display-name="T121" style:family="text" style:name="2492">
      <style:paragraph-properties/>
      <style:text-properties fo:font-family="Symbol" style:font-family-complex="Symbol"/>
    </style:style>
    <style:style style:parent-style-name="832" style:display-name="T122" style:family="text" style:name="2493">
      <style:paragraph-properties/>
      <style:text-properties fo:font-family="Symbol" style:font-family-complex="Symbol"/>
    </style:style>
    <style:style style:parent-style-name="832" style:display-name="T123" style:family="text" style:name="2494">
      <style:paragraph-properties/>
      <style:text-properties fo:font-family="Symbol" style:font-family-complex="Symbol"/>
    </style:style>
    <style:style style:parent-style-name="832" style:display-name="T124" style:family="text" style:name="2495">
      <style:paragraph-properties/>
      <style:text-properties fo:font-family="Symbol" style:font-family-complex="Symbol"/>
    </style:style>
    <style:style style:parent-style-name="832" style:display-name="T125" style:family="text" style:name="2496">
      <style:paragraph-properties/>
      <style:text-properties fo:font-family="Symbol" style:font-family-complex="Symbol"/>
    </style:style>
    <style:style style:parent-style-name="832" style:display-name="T126" style:family="text" style:name="2497">
      <style:paragraph-properties/>
      <style:text-properties fo:font-family="Symbol" style:font-family-complex="Symbol"/>
    </style:style>
    <style:style style:parent-style-name="832" style:display-name="T127" style:family="text" style:name="2498">
      <style:paragraph-properties/>
      <style:text-properties fo:font-family="Symbol" style:font-family-complex="Symbol"/>
    </style:style>
    <style:style style:parent-style-name="832" style:display-name="T128" style:family="text" style:name="2499">
      <style:paragraph-properties/>
      <style:text-properties fo:font-family="Symbol" style:font-family-complex="Symbol"/>
    </style:style>
    <style:style style:parent-style-name="832" style:display-name="T129" style:family="text" style:name="2500">
      <style:paragraph-properties/>
      <style:text-properties fo:font-family="Symbol" style:font-family-complex="Symbol"/>
    </style:style>
    <style:style style:parent-style-name="832" style:display-name="T130" style:family="text" style:name="2501">
      <style:paragraph-properties/>
      <style:text-properties fo:font-family="Symbol" style:font-family-complex="Symbol"/>
    </style:style>
    <style:style style:parent-style-name="832" style:display-name="T131" style:family="text" style:name="2502">
      <style:paragraph-properties/>
      <style:text-properties fo:font-family="Symbol" style:font-family-complex="Symbol"/>
    </style:style>
    <style:style style:parent-style-name="832" style:display-name="T132" style:family="text" style:name="2503">
      <style:paragraph-properties/>
      <style:text-properties fo:font-family="Symbol" style:font-family-complex="Symbol"/>
    </style:style>
    <style:style style:parent-style-name="832" style:display-name="T133" style:family="text" style:name="2504">
      <style:paragraph-properties/>
      <style:text-properties fo:font-family="Symbol" style:font-family-complex="Symbol"/>
    </style:style>
    <style:style style:parent-style-name="832" style:display-name="T134" style:family="text" style:name="2505">
      <style:paragraph-properties/>
      <style:text-properties fo:font-family="Symbol" style:font-family-complex="Symbol"/>
    </style:style>
    <style:style style:parent-style-name="832" style:display-name="T135" style:family="text" style:name="2506">
      <style:paragraph-properties/>
      <style:text-properties fo:font-family="Symbol" style:font-family-complex="Symbol"/>
    </style:style>
    <style:style style:parent-style-name="832" style:display-name="T136" style:family="text" style:name="2507">
      <style:paragraph-properties/>
      <style:text-properties fo:font-family="Symbol" style:font-family-complex="Symbol"/>
    </style:style>
    <style:style style:parent-style-name="832" style:display-name="T137" style:family="text" style:name="2508">
      <style:paragraph-properties/>
      <style:text-properties fo:font-family="Symbol" style:font-family-complex="Symbol"/>
    </style:style>
    <style:style style:parent-style-name="832" style:display-name="T138" style:family="text" style:name="2509">
      <style:paragraph-properties/>
      <style:text-properties fo:font-family="Symbol" style:font-family-complex="Symbol"/>
    </style:style>
    <style:style style:parent-style-name="832" style:display-name="T139" style:family="text" style:name="2510">
      <style:paragraph-properties/>
      <style:text-properties fo:font-family="Symbol" style:font-family-complex="Symbol"/>
    </style:style>
    <style:style style:parent-style-name="832" style:display-name="T140" style:family="text" style:name="2511">
      <style:paragraph-properties/>
      <style:text-properties fo:font-family="Symbol" style:font-family-complex="Symbol"/>
    </style:style>
    <style:style style:parent-style-name="832" style:display-name="T141" style:family="text" style:name="2512">
      <style:paragraph-properties/>
      <style:text-properties fo:font-family="Symbol" style:font-family-complex="Symbol"/>
    </style:style>
    <style:style style:parent-style-name="832" style:display-name="T142" style:family="text" style:name="2513">
      <style:paragraph-properties/>
      <style:text-properties fo:font-family="Symbol" style:font-family-complex="Symbol"/>
    </style:style>
    <style:style style:parent-style-name="832" style:display-name="T143" style:family="text" style:name="2514">
      <style:paragraph-properties/>
      <style:text-properties fo:font-family="Symbol" style:font-family-complex="Symbol"/>
    </style:style>
    <style:style style:parent-style-name="832" style:display-name="T144" style:family="text" style:name="2515">
      <style:paragraph-properties/>
      <style:text-properties fo:font-family="Symbol" style:font-family-complex="Symbol"/>
    </style:style>
    <style:style style:parent-style-name="832" style:display-name="T145" style:family="text" style:name="2516">
      <style:paragraph-properties/>
      <style:text-properties fo:font-family="Symbol" style:font-family-complex="Symbol"/>
    </style:style>
    <style:style style:parent-style-name="832" style:display-name="T146" style:family="text" style:name="2517">
      <style:paragraph-properties/>
      <style:text-properties fo:font-family="Symbol" style:font-family-complex="Symbol"/>
    </style:style>
    <style:style style:parent-style-name="832" style:display-name="T147" style:family="text" style:name="2518">
      <style:paragraph-properties/>
      <style:text-properties fo:font-family="Symbol" style:font-family-complex="Symbol"/>
    </style:style>
    <style:style style:parent-style-name="832" style:display-name="T148" style:family="text" style:name="2519">
      <style:paragraph-properties/>
      <style:text-properties fo:font-family="Symbol" style:font-family-complex="Symbol"/>
    </style:style>
    <style:style style:parent-style-name="832" style:display-name="T149" style:family="text" style:name="2520">
      <style:paragraph-properties/>
      <style:text-properties fo:font-family="Symbol" style:font-family-complex="Symbol"/>
    </style:style>
    <style:style style:parent-style-name="832" style:display-name="T150" style:family="text" style:name="2521">
      <style:paragraph-properties/>
      <style:text-properties fo:font-family="Symbol" style:font-family-complex="Symbol"/>
    </style:style>
    <style:style style:parent-style-name="832" style:display-name="T151" style:family="text" style:name="2522">
      <style:paragraph-properties/>
      <style:text-properties fo:font-family="Symbol" style:font-family-complex="Symbol"/>
    </style:style>
    <style:style style:parent-style-name="832" style:display-name="T152" style:family="text" style:name="2523">
      <style:paragraph-properties/>
      <style:text-properties fo:font-family="Symbol" style:font-family-complex="Symbol"/>
    </style:style>
    <style:style style:parent-style-name="832" style:display-name="T153" style:family="text" style:name="2524">
      <style:paragraph-properties/>
      <style:text-properties fo:font-family="Symbol" style:font-family-complex="Symbol"/>
    </style:style>
    <style:style style:parent-style-name="832" style:display-name="T154" style:family="text" style:name="2525">
      <style:paragraph-properties/>
      <style:text-properties fo:font-family="Symbol" style:font-family-complex="Symbol"/>
    </style:style>
    <style:style style:parent-style-name="832" style:display-name="T155" style:family="text" style:name="2526">
      <style:paragraph-properties/>
      <style:text-properties fo:font-family="Symbol" style:font-family-complex="Symbol"/>
    </style:style>
    <style:style style:parent-style-name="832" style:display-name="T156" style:family="text" style:name="2527">
      <style:paragraph-properties/>
      <style:text-properties fo:font-family="Symbol" style:font-family-complex="Symbol"/>
    </style:style>
    <style:style style:parent-style-name="832" style:display-name="T157" style:family="text" style:name="2528">
      <style:paragraph-properties/>
      <style:text-properties fo:font-family="Symbol" style:font-family-complex="Symbol"/>
    </style:style>
    <style:style style:parent-style-name="832" style:display-name="T158" style:family="text" style:name="2529">
      <style:paragraph-properties/>
      <style:text-properties fo:font-family="Symbol" style:font-family-complex="Symbol"/>
    </style:style>
    <style:style style:parent-style-name="832" style:display-name="T159" style:family="text" style:name="2530">
      <style:paragraph-properties/>
      <style:text-properties fo:font-family="Symbol" style:font-family-complex="Symbol"/>
    </style:style>
    <style:style style:parent-style-name="832" style:display-name="T160" style:family="text" style:name="2531">
      <style:paragraph-properties/>
      <style:text-properties fo:font-family="Symbol" style:font-family-complex="Symbol"/>
    </style:style>
    <style:style style:parent-style-name="832" style:display-name="T161" style:family="text" style:name="2532">
      <style:paragraph-properties/>
      <style:text-properties fo:font-family="Symbol" style:font-family-complex="Symbol"/>
    </style:style>
    <style:style style:parent-style-name="832" style:display-name="T162" style:family="text" style:name="2533">
      <style:paragraph-properties/>
      <style:text-properties fo:font-family="Symbol" style:font-family-complex="Symbol"/>
    </style:style>
    <style:style style:parent-style-name="832" style:display-name="T163" style:family="text" style:name="2534">
      <style:paragraph-properties/>
      <style:text-properties fo:font-family="Symbol" style:font-family-complex="Symbol"/>
    </style:style>
    <style:style style:parent-style-name="832" style:display-name="T164" style:family="text" style:name="2535">
      <style:paragraph-properties/>
      <style:text-properties fo:font-family="Symbol" style:font-family-complex="Symbol"/>
    </style:style>
    <style:style style:parent-style-name="832" style:display-name="T165" style:family="text" style:name="2536">
      <style:paragraph-properties/>
      <style:text-properties fo:font-family="Symbol" style:font-family-complex="Symbol"/>
    </style:style>
    <style:style style:parent-style-name="832" style:display-name="T166" style:family="text" style:name="2537">
      <style:paragraph-properties/>
      <style:text-properties fo:font-family="Symbol" style:font-family-complex="Symbol"/>
    </style:style>
    <style:style style:parent-style-name="832" style:display-name="T167" style:family="text" style:name="2538">
      <style:paragraph-properties/>
      <style:text-properties fo:font-family="Symbol" style:font-family-complex="Symbol"/>
    </style:style>
    <style:style style:parent-style-name="832" style:display-name="T168" style:family="text" style:name="2539">
      <style:paragraph-properties/>
      <style:text-properties fo:font-family="Symbol" style:font-family-complex="Symbol"/>
    </style:style>
    <style:style style:parent-style-name="832" style:display-name="T169" style:family="text" style:name="2540">
      <style:paragraph-properties/>
      <style:text-properties fo:font-family="Symbol" style:font-family-complex="Symbol"/>
    </style:style>
    <style:style style:parent-style-name="832" style:display-name="T170" style:family="text" style:name="2541">
      <style:paragraph-properties/>
      <style:text-properties fo:font-family="Symbol" style:font-family-complex="Symbol"/>
    </style:style>
    <style:style style:parent-style-name="832" style:display-name="T171" style:family="text" style:name="2542">
      <style:paragraph-properties/>
      <style:text-properties fo:font-family="Symbol" style:font-family-complex="Symbol"/>
    </style:style>
    <style:style style:parent-style-name="832" style:display-name="T172" style:family="text" style:name="2543">
      <style:paragraph-properties/>
      <style:text-properties fo:font-family="Symbol" style:font-family-complex="Symbol"/>
    </style:style>
    <style:style style:parent-style-name="832" style:display-name="T173" style:family="text" style:name="2544">
      <style:paragraph-properties/>
      <style:text-properties fo:font-family="Symbol" style:font-family-complex="Symbol"/>
    </style:style>
    <style:style style:parent-style-name="832" style:display-name="T174" style:family="text" style:name="2545">
      <style:paragraph-properties/>
      <style:text-properties fo:font-family="Symbol" style:font-family-complex="Symbol"/>
    </style:style>
    <style:style style:parent-style-name="832" style:display-name="T175" style:family="text" style:name="2546">
      <style:paragraph-properties/>
      <style:text-properties fo:font-family="Symbol" style:font-family-complex="Symbol"/>
    </style:style>
    <style:style style:parent-style-name="832" style:display-name="T176" style:family="text" style:name="2547">
      <style:paragraph-properties/>
      <style:text-properties fo:font-family="Symbol" style:font-family-complex="Symbol"/>
    </style:style>
    <style:style style:parent-style-name="832" style:display-name="T177" style:family="text" style:name="2548">
      <style:paragraph-properties/>
      <style:text-properties fo:font-family="Symbol" style:font-family-complex="Symbol"/>
    </style:style>
    <style:style style:parent-style-name="832" style:display-name="T178" style:family="text" style:name="2549">
      <style:paragraph-properties/>
      <style:text-properties fo:font-family="Symbol" style:font-family-complex="Symbol"/>
    </style:style>
    <style:style style:parent-style-name="832" style:display-name="T179" style:family="text" style:name="2550">
      <style:paragraph-properties/>
      <style:text-properties fo:font-family="Symbol" style:font-family-complex="Symbol"/>
    </style:style>
    <style:style style:parent-style-name="832" style:display-name="T180" style:family="text" style:name="2551">
      <style:paragraph-properties/>
      <style:text-properties fo:font-family="Symbol" style:font-family-complex="Symbol"/>
    </style:style>
    <style:style style:parent-style-name="832" style:display-name="T181" style:family="text" style:name="2552">
      <style:paragraph-properties/>
      <style:text-properties fo:font-family="Symbol" style:font-family-complex="Symbol"/>
    </style:style>
    <style:style style:parent-style-name="832" style:display-name="T182" style:family="text" style:name="2553">
      <style:paragraph-properties/>
      <style:text-properties fo:font-family="Symbol" style:font-family-complex="Symbol"/>
    </style:style>
    <style:style style:parent-style-name="832" style:display-name="T183" style:family="text" style:name="2554">
      <style:paragraph-properties/>
      <style:text-properties fo:font-family="Symbol" style:font-family-complex="Symbol"/>
    </style:style>
    <style:style style:parent-style-name="832" style:display-name="T184" style:family="text" style:name="2555">
      <style:paragraph-properties/>
      <style:text-properties fo:font-family="Symbol" style:font-family-complex="Symbol"/>
    </style:style>
    <style:style style:parent-style-name="832" style:display-name="T185" style:family="text" style:name="2556">
      <style:paragraph-properties/>
      <style:text-properties fo:font-family="Symbol" style:font-family-complex="Symbol"/>
    </style:style>
    <style:style style:parent-style-name="832" style:display-name="T186" style:family="text" style:name="2557">
      <style:paragraph-properties/>
      <style:text-properties fo:font-family="Symbol" style:font-family-complex="Symbol"/>
    </style:style>
    <style:style style:parent-style-name="832" style:display-name="T187" style:family="text" style:name="2558">
      <style:paragraph-properties/>
      <style:text-properties fo:font-family="Symbol" style:font-family-complex="Symbol"/>
    </style:style>
    <style:style style:parent-style-name="832" style:display-name="T188" style:family="text" style:name="2559">
      <style:paragraph-properties/>
      <style:text-properties fo:font-family="Symbol" style:font-family-complex="Symbol"/>
    </style:style>
    <style:style style:parent-style-name="832" style:display-name="T189" style:family="text" style:name="2560">
      <style:paragraph-properties/>
      <style:text-properties fo:font-family="Symbol" style:font-family-complex="Symbol"/>
    </style:style>
    <style:style style:parent-style-name="832" style:display-name="T190" style:family="text" style:name="2561">
      <style:paragraph-properties/>
      <style:text-properties fo:font-family="Symbol" style:font-family-complex="Symbol"/>
    </style:style>
    <style:style style:parent-style-name="832" style:display-name="T191" style:family="text" style:name="2562">
      <style:paragraph-properties/>
      <style:text-properties fo:font-family="Symbol" style:font-family-complex="Symbol"/>
    </style:style>
    <style:style style:parent-style-name="832" style:display-name="T192" style:family="text" style:name="2563">
      <style:paragraph-properties/>
      <style:text-properties fo:font-family="Symbol" style:font-family-complex="Symbol"/>
    </style:style>
    <style:style style:parent-style-name="832" style:display-name="T193" style:family="text" style:name="2564">
      <style:paragraph-properties/>
      <style:text-properties fo:font-family="Symbol" style:font-family-complex="Symbol"/>
    </style:style>
    <style:style style:parent-style-name="832" style:display-name="T194" style:family="text" style:name="2565">
      <style:paragraph-properties/>
      <style:text-properties fo:font-family="Symbol" style:font-family-complex="Symbol"/>
    </style:style>
    <style:style style:parent-style-name="832" style:display-name="T195" style:family="text" style:name="2566">
      <style:paragraph-properties/>
      <style:text-properties fo:font-family="Symbol" style:font-family-complex="Symbol"/>
    </style:style>
    <style:style style:parent-style-name="832" style:display-name="T196" style:family="text" style:name="2567">
      <style:paragraph-properties/>
      <style:text-properties fo:font-family="Symbol" style:font-family-complex="Symbol"/>
    </style:style>
    <style:style style:parent-style-name="832" style:display-name="T197" style:family="text" style:name="2568">
      <style:paragraph-properties/>
      <style:text-properties fo:font-family="Symbol" style:font-family-complex="Symbol"/>
    </style:style>
    <style:style style:parent-style-name="832" style:display-name="T198" style:family="text" style:name="2569">
      <style:paragraph-properties/>
      <style:text-properties fo:font-family="Symbol" style:font-family-complex="Symbol"/>
    </style:style>
    <style:style style:parent-style-name="832" style:display-name="T199" style:family="text" style:name="2570">
      <style:paragraph-properties/>
      <style:text-properties fo:font-family="Symbol" style:font-family-complex="Symbol"/>
    </style:style>
    <style:style style:parent-style-name="832" style:display-name="T200" style:family="text" style:name="2571">
      <style:paragraph-properties/>
      <style:text-properties fo:font-family="Symbol" style:font-family-complex="Symbol"/>
    </style:style>
    <style:style style:parent-style-name="832" style:display-name="T201" style:family="text" style:name="2572">
      <style:paragraph-properties/>
      <style:text-properties fo:font-family="Symbol" style:font-family-complex="Symbol"/>
    </style:style>
    <style:style style:parent-style-name="832" style:display-name="T202" style:family="text" style:name="2573">
      <style:paragraph-properties/>
      <style:text-properties fo:font-family="Symbol" style:font-family-complex="Symbol"/>
    </style:style>
    <style:style style:parent-style-name="832" style:display-name="T203" style:family="text" style:name="2574">
      <style:paragraph-properties/>
      <style:text-properties fo:font-family="Symbol" style:font-family-complex="Symbol"/>
    </style:style>
    <style:style style:parent-style-name="832" style:display-name="T204" style:family="text" style:name="2575">
      <style:paragraph-properties/>
      <style:text-properties fo:font-family="Symbol" style:font-family-complex="Symbol"/>
    </style:style>
    <style:style style:parent-style-name="832" style:display-name="T205" style:family="text" style:name="2576">
      <style:paragraph-properties/>
      <style:text-properties fo:font-family="Symbol" style:font-family-complex="Symbol"/>
    </style:style>
    <style:style style:parent-style-name="832" style:display-name="T206" style:family="text" style:name="2577">
      <style:paragraph-properties/>
      <style:text-properties fo:font-family="Symbol" style:font-family-complex="Symbol"/>
    </style:style>
    <style:style style:parent-style-name="832" style:display-name="T207" style:family="text" style:name="2578">
      <style:paragraph-properties/>
      <style:text-properties fo:font-family="Symbol" style:font-family-complex="Symbol"/>
    </style:style>
    <style:style style:parent-style-name="832" style:display-name="T208" style:family="text" style:name="2579">
      <style:paragraph-properties/>
      <style:text-properties fo:font-family="Symbol" style:font-family-complex="Symbol"/>
    </style:style>
    <style:style style:parent-style-name="832" style:display-name="T209" style:family="text" style:name="2580">
      <style:paragraph-properties/>
    </style:style>
    <style:style style:parent-style-name="832" style:display-name="T210" style:family="text" style:name="2581">
      <style:paragraph-properties/>
    </style:style>
    <style:style style:parent-style-name="832" style:display-name="T211" style:family="text" style:name="2582">
      <style:paragraph-properties/>
    </style:style>
    <style:style style:parent-style-name="832" style:display-name="T212" style:family="text" style:name="2583">
      <style:paragraph-properties/>
    </style:style>
    <style:style style:parent-style-name="832" style:display-name="T213" style:family="text" style:name="2584">
      <style:paragraph-properties/>
    </style:style>
    <style:style style:parent-style-name="832" style:display-name="T214" style:family="text" style:name="2585">
      <style:paragraph-properties/>
    </style:style>
    <style:style style:parent-style-name="832" style:display-name="T215" style:family="text" style:name="2586">
      <style:paragraph-properties/>
    </style:style>
    <style:style style:parent-style-name="832" style:display-name="T216" style:family="text" style:name="2587">
      <style:paragraph-properties/>
    </style:style>
    <style:style style:parent-style-name="832" style:display-name="T217" style:family="text" style:name="2588">
      <style:paragraph-properties/>
      <style:text-properties fo:font-family="Symbol" style:font-family-complex="Symbol"/>
    </style:style>
    <style:style style:parent-style-name="832" style:display-name="T218" style:family="text" style:name="2589">
      <style:paragraph-properties/>
    </style:style>
    <style:style style:parent-style-name="832" style:display-name="T219" style:family="text" style:name="2590">
      <style:paragraph-properties/>
    </style:style>
    <style:style style:parent-style-name="832" style:display-name="T220" style:family="text" style:name="2591">
      <style:paragraph-properties/>
    </style:style>
    <style:style style:parent-style-name="832" style:display-name="T221" style:family="text" style:name="2592">
      <style:paragraph-properties/>
    </style:style>
    <style:style style:parent-style-name="832" style:display-name="T222" style:family="text" style:name="2593">
      <style:paragraph-properties/>
    </style:style>
    <style:style style:parent-style-name="832" style:display-name="T223" style:family="text" style:name="2594">
      <style:paragraph-properties/>
    </style:style>
    <style:style style:parent-style-name="832" style:display-name="T224" style:family="text" style:name="2595">
      <style:paragraph-properties/>
    </style:style>
    <style:style style:parent-style-name="832" style:display-name="T225" style:family="text" style:name="2596">
      <style:paragraph-properties/>
    </style:style>
    <style:style style:parent-style-name="832" style:display-name="T226" style:family="text" style:name="2597">
      <style:paragraph-properties/>
      <style:text-properties fo:font-family="Symbol" style:font-family-complex="Symbol"/>
    </style:style>
    <style:style style:parent-style-name="832" style:display-name="T227" style:family="text" style:name="2598">
      <style:paragraph-properties/>
    </style:style>
    <style:style style:parent-style-name="832" style:display-name="T228" style:family="text" style:name="2599">
      <style:paragraph-properties/>
    </style:style>
    <style:style style:parent-style-name="832" style:display-name="T229" style:family="text" style:name="2600">
      <style:paragraph-properties/>
    </style:style>
    <style:style style:parent-style-name="832" style:display-name="T230" style:family="text" style:name="2601">
      <style:paragraph-properties/>
    </style:style>
    <style:style style:parent-style-name="832" style:display-name="T231" style:family="text" style:name="2602">
      <style:paragraph-properties/>
    </style:style>
    <style:style style:parent-style-name="832" style:display-name="T232" style:family="text" style:name="2603">
      <style:paragraph-properties/>
    </style:style>
    <style:style style:parent-style-name="832" style:display-name="T233" style:family="text" style:name="2604">
      <style:paragraph-properties/>
    </style:style>
    <style:style style:parent-style-name="832" style:display-name="T234" style:family="text" style:name="2605">
      <style:paragraph-properties/>
    </style:style>
    <style:style style:parent-style-name="832" style:display-name="T235" style:family="text" style:name="2606">
      <style:paragraph-properties/>
      <style:text-properties fo:font-family="Symbol" style:font-family-complex="Symbol"/>
    </style:style>
    <style:style style:parent-style-name="832" style:display-name="T236" style:family="text" style:name="2607">
      <style:paragraph-properties/>
      <style:text-properties fo:font-family="OpenSymbol" style:font-family-complex="OpenSymbol"/>
    </style:style>
    <style:style style:parent-style-name="832" style:display-name="T237" style:family="text" style:name="2608">
      <style:paragraph-properties/>
      <style:text-properties fo:font-family="OpenSymbol" style:font-family-complex="OpenSymbol"/>
    </style:style>
    <style:style style:parent-style-name="832" style:display-name="T238" style:family="text" style:name="2609">
      <style:paragraph-properties/>
      <style:text-properties fo:font-family="Symbol" style:font-family-complex="Symbol"/>
    </style:style>
    <style:style style:parent-style-name="832" style:display-name="T239" style:family="text" style:name="2610">
      <style:paragraph-properties/>
      <style:text-properties fo:font-family="OpenSymbol" style:font-family-complex="OpenSymbol"/>
    </style:style>
    <style:style style:parent-style-name="832" style:display-name="T240" style:family="text" style:name="2611">
      <style:paragraph-properties/>
      <style:text-properties fo:font-family="OpenSymbol" style:font-family-complex="OpenSymbol"/>
    </style:style>
    <style:style style:parent-style-name="832" style:display-name="T241" style:family="text" style:name="2612">
      <style:paragraph-properties/>
      <style:text-properties fo:font-family="Symbol" style:font-family-complex="Symbol"/>
    </style:style>
    <style:style style:parent-style-name="832" style:display-name="T242" style:family="text" style:name="2613">
      <style:paragraph-properties/>
      <style:text-properties fo:font-family="OpenSymbol" style:font-family-complex="OpenSymbol"/>
    </style:style>
    <style:style style:parent-style-name="832" style:display-name="T243" style:family="text" style:name="2614">
      <style:paragraph-properties/>
      <style:text-properties fo:font-family="OpenSymbol" style:font-family-complex="OpenSymbol"/>
    </style:style>
    <style:style style:parent-style-name="832" style:display-name="T244" style:family="text" style:name="2615">
      <style:paragraph-properties/>
      <style:text-properties fo:font-family="Symbol" style:font-family-complex="Symbol"/>
    </style:style>
    <style:style style:parent-style-name="832" style:display-name="T245" style:family="text" style:name="2616">
      <style:paragraph-properties/>
      <style:text-properties fo:font-family="OpenSymbol" style:font-family-complex="OpenSymbol"/>
    </style:style>
    <style:style style:parent-style-name="832" style:display-name="T246" style:family="text" style:name="2617">
      <style:paragraph-properties/>
      <style:text-properties fo:font-family="OpenSymbol" style:font-family-complex="OpenSymbol"/>
    </style:style>
    <style:style style:parent-style-name="832" style:display-name="T247" style:family="text" style:name="2618">
      <style:paragraph-properties/>
      <style:text-properties fo:font-family="Symbol" style:font-family-complex="Symbol"/>
    </style:style>
    <style:style style:parent-style-name="832" style:display-name="T248" style:family="text" style:name="2619">
      <style:paragraph-properties/>
      <style:text-properties fo:font-family="OpenSymbol" style:font-family-complex="OpenSymbol"/>
    </style:style>
    <style:style style:parent-style-name="832" style:display-name="T249" style:family="text" style:name="2620">
      <style:paragraph-properties/>
      <style:text-properties fo:font-family="OpenSymbol" style:font-family-complex="OpenSymbol"/>
    </style:style>
    <style:style style:parent-style-name="832" style:display-name="T250" style:family="text" style:name="2621">
      <style:paragraph-properties/>
      <style:text-properties fo:font-family="Symbol" style:font-family-complex="Symbol"/>
    </style:style>
    <style:style style:parent-style-name="832" style:display-name="T251" style:family="text" style:name="2622">
      <style:paragraph-properties/>
      <style:text-properties fo:font-family="OpenSymbol" style:font-family-complex="OpenSymbol"/>
    </style:style>
    <style:style style:parent-style-name="832" style:display-name="T252" style:family="text" style:name="2623">
      <style:paragraph-properties/>
      <style:text-properties fo:font-family="OpenSymbol" style:font-family-complex="OpenSymbol"/>
    </style:style>
    <style:style style:parent-style-name="832" style:display-name="T253" style:family="text" style:name="2624">
      <style:paragraph-properties/>
    </style:style>
    <style:style style:parent-style-name="832" style:display-name="T254" style:family="text" style:name="2625">
      <style:paragraph-properties/>
    </style:style>
    <style:style style:parent-style-name="832" style:display-name="T255" style:family="text" style:name="2626">
      <style:paragraph-properties/>
    </style:style>
    <style:style style:parent-style-name="832" style:display-name="T256" style:family="text" style:name="2627">
      <style:paragraph-properties/>
    </style:style>
    <style:style style:parent-style-name="832" style:display-name="T257" style:family="text" style:name="2628">
      <style:paragraph-properties/>
    </style:style>
    <style:style style:parent-style-name="832" style:display-name="T258" style:family="text" style:name="2629">
      <style:paragraph-properties/>
    </style:style>
    <style:style style:parent-style-name="832" style:display-name="T259" style:family="text" style:name="2630">
      <style:paragraph-properties/>
    </style:style>
    <style:style style:parent-style-name="832" style:display-name="T260" style:family="text" style:name="2631">
      <style:paragraph-properties/>
    </style:style>
    <style:style style:parent-style-name="832" style:display-name="T261" style:family="text" style:name="2632">
      <style:paragraph-properties/>
    </style:style>
    <style:style style:parent-style-name="832" style:display-name="T262" style:family="text" style:name="2633">
      <style:paragraph-properties/>
    </style:style>
    <style:style style:parent-style-name="832" style:display-name="T263" style:family="text" style:name="2634">
      <style:paragraph-properties/>
    </style:style>
    <style:style style:parent-style-name="832" style:display-name="T264" style:family="text" style:name="2635">
      <style:paragraph-properties/>
    </style:style>
    <style:style style:parent-style-name="832" style:display-name="T265" style:family="text" style:name="2636">
      <style:paragraph-properties/>
    </style:style>
    <style:style style:parent-style-name="832" style:display-name="T266" style:family="text" style:name="2637">
      <style:paragraph-properties/>
    </style:style>
    <style:style style:parent-style-name="832" style:display-name="T267" style:family="text" style:name="2638">
      <style:paragraph-properties/>
    </style:style>
    <style:style style:parent-style-name="832" style:display-name="T268" style:family="text" style:name="2639">
      <style:paragraph-properties/>
    </style:style>
    <style:style style:parent-style-name="832" style:display-name="T269" style:family="text" style:name="2640">
      <style:paragraph-properties/>
    </style:style>
    <style:style style:parent-style-name="832" style:display-name="T270" style:family="text" style:name="2641">
      <style:paragraph-properties/>
    </style:style>
    <style:style style:parent-style-name="832" style:display-name="T271" style:family="text" style:name="2642">
      <style:paragraph-properties/>
    </style:style>
    <style:style style:parent-style-name="832" style:display-name="T272" style:family="text" style:name="2643">
      <style:paragraph-properties/>
    </style:style>
    <style:style style:parent-style-name="832" style:display-name="T273" style:family="text" style:name="2644">
      <style:paragraph-properties/>
    </style:style>
    <style:style style:parent-style-name="832" style:display-name="T274" style:family="text" style:name="2645">
      <style:paragraph-properties/>
    </style:style>
    <style:style style:parent-style-name="832" style:display-name="T275" style:family="text" style:name="2646">
      <style:paragraph-properties/>
    </style:style>
    <style:style style:parent-style-name="832" style:display-name="T276" style:family="text" style:name="2647">
      <style:paragraph-properties/>
    </style:style>
    <style:style style:parent-style-name="832" style:display-name="T277" style:family="text" style:name="2648">
      <style:paragraph-properties/>
    </style:style>
    <style:style style:parent-style-name="832" style:display-name="T278" style:family="text" style:name="2649">
      <style:paragraph-properties/>
    </style:style>
    <style:style style:parent-style-name="832" style:display-name="T279" style:family="text" style:name="2650">
      <style:paragraph-properties/>
    </style:style>
    <style:style style:parent-style-name="832" style:display-name="T280" style:family="text" style:name="2651">
      <style:paragraph-properties/>
    </style:style>
    <style:style style:parent-style-name="832" style:display-name="T281" style:family="text" style:name="2652">
      <style:paragraph-properties/>
    </style:style>
    <style:style style:parent-style-name="832" style:display-name="T282" style:family="text" style:name="2653">
      <style:paragraph-properties/>
    </style:style>
    <style:style style:parent-style-name="832" style:display-name="T283" style:family="text" style:name="2654">
      <style:paragraph-properties/>
    </style:style>
    <style:style style:parent-style-name="832" style:display-name="T284" style:family="text" style:name="2655">
      <style:paragraph-properties/>
    </style:style>
    <style:style style:parent-style-name="832" style:display-name="T285" style:family="text" style:name="2656">
      <style:paragraph-properties/>
    </style:style>
    <style:style style:parent-style-name="832" style:display-name="T286" style:family="text" style:name="2657">
      <style:paragraph-properties/>
    </style:style>
    <style:style style:parent-style-name="832" style:display-name="T287" style:family="text" style:name="2658">
      <style:paragraph-properties/>
    </style:style>
    <style:style style:parent-style-name="832" style:display-name="T288" style:family="text" style:name="2659">
      <style:paragraph-properties/>
    </style:style>
    <style:style style:parent-style-name="832" style:display-name="T289" style:family="text" style:name="2660">
      <style:paragraph-properties/>
    </style:style>
    <style:style style:parent-style-name="832" style:display-name="T290" style:family="text" style:name="2661">
      <style:paragraph-properties/>
    </style:style>
    <style:style style:parent-style-name="832" style:display-name="T291" style:family="text" style:name="2662">
      <style:paragraph-properties/>
    </style:style>
    <style:style style:parent-style-name="832" style:display-name="T292" style:family="text" style:name="2663">
      <style:paragraph-properties/>
    </style:style>
    <style:style style:parent-style-name="832" style:display-name="T293" style:family="text" style:name="2664">
      <style:paragraph-properties/>
    </style:style>
    <style:style style:parent-style-name="832" style:display-name="T294" style:family="text" style:name="2665">
      <style:paragraph-properties/>
    </style:style>
    <style:style style:parent-style-name="832" style:display-name="T295" style:family="text" style:name="2666">
      <style:paragraph-properties/>
    </style:style>
    <style:style style:parent-style-name="832" style:display-name="T296" style:family="text" style:name="2667">
      <style:paragraph-properties/>
    </style:style>
    <style:style style:parent-style-name="832" style:display-name="T297" style:family="text" style:name="2668">
      <style:paragraph-properties/>
    </style:style>
    <style:style style:parent-style-name="832" style:display-name="T298" style:family="text" style:name="2669">
      <style:paragraph-properties/>
      <style:text-properties fo:font-family="Symbol" style:font-family-complex="Symbol"/>
    </style:style>
    <style:style style:parent-style-name="832" style:display-name="T299" style:family="text" style:name="2670">
      <style:paragraph-properties/>
      <style:text-properties fo:font-family="Courier New" style:font-family-complex="Courier New"/>
    </style:style>
    <style:style style:parent-style-name="832" style:display-name="T300" style:family="text" style:name="2671">
      <style:paragraph-properties/>
      <style:text-properties fo:font-family="Wingdings" style:font-family-complex="Wingdings"/>
    </style:style>
    <style:style style:parent-style-name="832" style:display-name="T301" style:family="text" style:name="2672">
      <style:paragraph-properties/>
      <style:text-properties fo:font-family="Symbol" style:font-family-complex="Symbol"/>
    </style:style>
    <style:style style:parent-style-name="832" style:display-name="T302" style:family="text" style:name="2673">
      <style:paragraph-properties/>
      <style:text-properties fo:font-family="Courier New" style:font-family-complex="Courier New"/>
    </style:style>
    <style:style style:parent-style-name="832" style:display-name="T303" style:family="text" style:name="2674">
      <style:paragraph-properties/>
      <style:text-properties fo:font-family="Wingdings" style:font-family-complex="Wingdings"/>
    </style:style>
    <style:style style:parent-style-name="832" style:display-name="T304" style:family="text" style:name="2675">
      <style:paragraph-properties/>
      <style:text-properties fo:font-family="Symbol" style:font-family-complex="Symbol"/>
    </style:style>
    <style:style style:parent-style-name="832" style:display-name="T305" style:family="text" style:name="2676">
      <style:paragraph-properties/>
      <style:text-properties fo:font-family="Courier New" style:font-family-complex="Courier New"/>
    </style:style>
    <style:style style:parent-style-name="832" style:display-name="T306" style:family="text" style:name="2677">
      <style:paragraph-properties/>
      <style:text-properties fo:font-family="Wingdings" style:font-family-complex="Wingdings"/>
    </style:style>
    <style:style style:parent-style-name="832" style:display-name="T307" style:family="text" style:name="2678">
      <style:paragraph-properties/>
    </style:style>
    <style:style style:parent-style-name="832" style:display-name="T308" style:family="text" style:name="2679">
      <style:paragraph-properties/>
    </style:style>
    <style:style style:parent-style-name="832" style:display-name="T309" style:family="text" style:name="2680">
      <style:paragraph-properties/>
    </style:style>
    <style:style style:parent-style-name="832" style:display-name="T310" style:family="text" style:name="2681">
      <style:paragraph-properties/>
    </style:style>
    <style:style style:parent-style-name="832" style:display-name="T311" style:family="text" style:name="2682">
      <style:paragraph-properties/>
    </style:style>
    <style:style style:parent-style-name="832" style:display-name="T312" style:family="text" style:name="2683">
      <style:paragraph-properties/>
    </style:style>
    <style:style style:parent-style-name="832" style:display-name="T313" style:family="text" style:name="2684">
      <style:paragraph-properties/>
    </style:style>
    <style:style style:parent-style-name="832" style:display-name="T314" style:family="text" style:name="2685">
      <style:paragraph-properties/>
    </style:style>
    <style:style style:parent-style-name="832" style:display-name="T315" style:family="text" style:name="2686">
      <style:paragraph-properties/>
    </style:style>
    <style:style style:parent-style-name="832" style:display-name="T316" style:family="text" style:name="2687">
      <style:paragraph-properties/>
      <style:text-properties fo:color="#000000" fo:font-family="Symbol" style:font-family-complex="Symbol" fo:font-size="10pt"/>
    </style:style>
    <style:style style:parent-style-name="832" style:display-name="T317" style:family="text" style:name="2688">
      <style:paragraph-properties/>
      <style:text-properties fo:color="#000000" fo:font-family="Symbol" style:font-family-complex="Symbol" fo:font-size="10pt"/>
    </style:style>
    <style:style style:parent-style-name="832" style:display-name="T318" style:family="text" style:name="2689">
      <style:paragraph-properties/>
      <style:text-properties fo:color="#000000" fo:font-family="Symbol" style:font-family-complex="Symbol" fo:font-size="10pt"/>
    </style:style>
    <style:style style:parent-style-name="832" style:display-name="T319" style:family="text" style:name="2690">
      <style:paragraph-properties/>
      <style:text-properties fo:color="#000000" fo:font-family="Symbol" style:font-family-complex="Symbol" fo:font-size="10pt"/>
    </style:style>
    <style:style style:parent-style-name="832" style:display-name="T320" style:family="text" style:name="2691">
      <style:paragraph-properties/>
      <style:text-properties fo:color="#000000" fo:font-family="Symbol" style:font-family-complex="Symbol" fo:font-size="10pt"/>
    </style:style>
    <style:style style:parent-style-name="832" style:display-name="T321" style:family="text" style:name="2692">
      <style:paragraph-properties/>
      <style:text-properties fo:color="#000000" fo:font-family="Symbol" style:font-family-complex="Symbol" fo:font-size="10pt"/>
    </style:style>
    <style:style style:parent-style-name="832" style:display-name="T322" style:family="text" style:name="2693">
      <style:paragraph-properties/>
      <style:text-properties fo:color="#000000" fo:font-family="Symbol" style:font-family-complex="Symbol" fo:font-size="10pt"/>
    </style:style>
    <style:style style:parent-style-name="832" style:display-name="T323" style:family="text" style:name="2694">
      <style:paragraph-properties/>
      <style:text-properties fo:color="#000000" fo:font-family="Symbol" style:font-family-complex="Symbol" fo:font-size="10pt"/>
    </style:style>
    <style:style style:parent-style-name="832" style:display-name="T324" style:family="text" style:name="2695">
      <style:paragraph-properties/>
      <style:text-properties fo:color="#000000" fo:font-family="Symbol" style:font-family-complex="Symbol" fo:font-size="10pt"/>
    </style:style>
    <style:style style:parent-style-name="832" style:display-name="T325" style:family="text" style:name="2696">
      <style:paragraph-properties/>
      <style:text-properties fo:color="#000000" fo:font-family="Symbol" style:font-family-complex="Symbol" fo:font-size="10pt"/>
    </style:style>
    <style:style style:parent-style-name="832" style:display-name="T326" style:family="text" style:name="2697">
      <style:paragraph-properties/>
      <style:text-properties fo:color="#000000" fo:font-family="Symbol" style:font-family-complex="Symbol" fo:font-size="10pt"/>
    </style:style>
    <style:style style:parent-style-name="832" style:display-name="T327" style:family="text" style:name="2698">
      <style:paragraph-properties/>
      <style:text-properties fo:color="#000000" fo:font-family="Symbol" style:font-family-complex="Symbol" fo:font-size="10pt"/>
    </style:style>
    <style:style style:parent-style-name="832" style:display-name="T328" style:family="text" style:name="2699">
      <style:paragraph-properties/>
      <style:text-properties fo:color="#000000" fo:font-family="Symbol" style:font-family-complex="Symbol" fo:font-size="10pt"/>
    </style:style>
    <style:style style:parent-style-name="832" style:display-name="T329" style:family="text" style:name="2700">
      <style:paragraph-properties/>
      <style:text-properties fo:color="#000000" fo:font-family="Symbol" style:font-family-complex="Symbol" fo:font-size="10pt"/>
    </style:style>
    <style:style style:parent-style-name="832" style:display-name="T330" style:family="text" style:name="2701">
      <style:paragraph-properties/>
      <style:text-properties fo:color="#000000" fo:font-family="Symbol" style:font-family-complex="Symbol" fo:font-size="10pt"/>
    </style:style>
    <style:style style:parent-style-name="832" style:display-name="T331" style:family="text" style:name="2702">
      <style:paragraph-properties/>
      <style:text-properties fo:color="#000000" fo:font-family="Symbol" style:font-family-complex="Symbol" fo:font-size="10pt"/>
    </style:style>
    <style:style style:parent-style-name="832" style:display-name="T332" style:family="text" style:name="2703">
      <style:paragraph-properties/>
      <style:text-properties fo:color="#000000" fo:font-family="Symbol" style:font-family-complex="Symbol" fo:font-size="10pt"/>
    </style:style>
    <style:style style:parent-style-name="832" style:display-name="T333" style:family="text" style:name="2704">
      <style:paragraph-properties/>
      <style:text-properties fo:color="#000000" fo:font-family="Symbol" style:font-family-complex="Symbol" fo:font-size="10pt"/>
    </style:style>
    <style:style style:parent-style-name="832" style:display-name="T334" style:family="text" style:name="2705">
      <style:paragraph-properties/>
      <style:text-properties fo:color="#000000" fo:font-family="Symbol" style:font-family-complex="Symbol" fo:font-size="10pt"/>
    </style:style>
    <style:style style:parent-style-name="832" style:display-name="T335" style:family="text" style:name="2706">
      <style:paragraph-properties/>
      <style:text-properties fo:color="#000000" fo:font-family="Symbol" style:font-family-complex="Symbol" fo:font-size="10pt"/>
    </style:style>
    <style:style style:parent-style-name="832" style:display-name="T336" style:family="text" style:name="2707">
      <style:paragraph-properties/>
      <style:text-properties fo:color="#000000" fo:font-family="Symbol" style:font-family-complex="Symbol" fo:font-size="10pt"/>
    </style:style>
    <style:style style:parent-style-name="832" style:display-name="T337" style:family="text" style:name="2708">
      <style:paragraph-properties/>
      <style:text-properties fo:color="#000000" fo:font-family="Symbol" style:font-family-complex="Symbol" fo:font-size="10pt"/>
    </style:style>
    <style:style style:parent-style-name="832" style:display-name="T338" style:family="text" style:name="2709">
      <style:paragraph-properties/>
      <style:text-properties fo:color="#000000" fo:font-family="Symbol" style:font-family-complex="Symbol" fo:font-size="10pt"/>
    </style:style>
    <style:style style:parent-style-name="832" style:display-name="T339" style:family="text" style:name="2710">
      <style:paragraph-properties/>
      <style:text-properties fo:color="#000000" fo:font-family="Symbol" style:font-family-complex="Symbol" fo:font-size="10pt"/>
    </style:style>
    <style:style style:parent-style-name="832" style:display-name="T340" style:family="text" style:name="2711">
      <style:paragraph-properties/>
      <style:text-properties fo:color="#000000" fo:font-family="Symbol" style:font-family-complex="Symbol" fo:font-size="10pt"/>
    </style:style>
    <style:style style:parent-style-name="832" style:display-name="T341" style:family="text" style:name="2712">
      <style:paragraph-properties/>
      <style:text-properties fo:color="#000000" fo:font-family="Symbol" style:font-family-complex="Symbol" fo:font-size="10pt"/>
    </style:style>
    <style:style style:parent-style-name="832" style:display-name="T342" style:family="text" style:name="2713">
      <style:paragraph-properties/>
      <style:text-properties fo:color="#000000" fo:font-family="Symbol" style:font-family-complex="Symbol" fo:font-size="10pt"/>
    </style:style>
    <style:style style:parent-style-name="832" style:display-name="T343" style:family="text" style:name="2714">
      <style:paragraph-properties/>
      <style:text-properties fo:color="#000000" fo:font-family="Symbol" style:font-family-complex="Symbol" fo:font-size="10pt"/>
    </style:style>
    <style:style style:parent-style-name="832" style:display-name="T344" style:family="text" style:name="2715">
      <style:paragraph-properties/>
      <style:text-properties fo:color="#000000" fo:font-family="Symbol" style:font-family-complex="Symbol" fo:font-size="10pt"/>
    </style:style>
    <style:style style:parent-style-name="832" style:display-name="T345" style:family="text" style:name="2716">
      <style:paragraph-properties/>
      <style:text-properties fo:color="#000000" fo:font-family="Symbol" style:font-family-complex="Symbol" fo:font-size="10pt"/>
    </style:style>
    <style:style style:parent-style-name="832" style:display-name="T346" style:family="text" style:name="2717">
      <style:paragraph-properties/>
      <style:text-properties fo:color="#000000" fo:font-family="Symbol" style:font-family-complex="Symbol" fo:font-size="10pt"/>
    </style:style>
    <style:style style:parent-style-name="832" style:display-name="T347" style:family="text" style:name="2718">
      <style:paragraph-properties/>
      <style:text-properties fo:color="#000000" fo:font-family="Symbol" style:font-family-complex="Symbol" fo:font-size="10pt"/>
    </style:style>
    <style:style style:parent-style-name="832" style:display-name="T348" style:family="text" style:name="2719">
      <style:paragraph-properties/>
      <style:text-properties fo:color="#000000" fo:font-family="Symbol" style:font-family-complex="Symbol" fo:font-size="10pt"/>
    </style:style>
    <style:style style:parent-style-name="832" style:display-name="T349" style:family="text" style:name="2720">
      <style:paragraph-properties/>
      <style:text-properties fo:color="#000000" fo:font-family="Symbol" style:font-family-complex="Symbol" fo:font-size="10pt"/>
    </style:style>
    <style:style style:parent-style-name="832" style:display-name="T350" style:family="text" style:name="2721">
      <style:paragraph-properties/>
      <style:text-properties fo:color="#000000" fo:font-family="Symbol" style:font-family-complex="Symbol" fo:font-size="10pt"/>
    </style:style>
    <style:style style:parent-style-name="832" style:display-name="T351" style:family="text" style:name="2722">
      <style:paragraph-properties/>
      <style:text-properties fo:color="#000000" fo:font-family="Symbol" style:font-family-complex="Symbol" fo:font-size="10pt"/>
    </style:style>
    <style:style style:parent-style-name="832" style:display-name="T352" style:family="text" style:name="2723">
      <style:paragraph-properties/>
      <style:text-properties fo:color="#000000" fo:font-family="Symbol" style:font-family-complex="Symbol" fo:font-size="10pt"/>
    </style:style>
    <style:style style:parent-style-name="832" style:display-name="T353" style:family="text" style:name="2724">
      <style:paragraph-properties/>
      <style:text-properties fo:color="#000000" fo:font-family="Symbol" style:font-family-complex="Symbol" fo:font-size="10pt"/>
    </style:style>
    <style:style style:parent-style-name="832" style:display-name="T354" style:family="text" style:name="2725">
      <style:paragraph-properties/>
      <style:text-properties fo:color="#000000" fo:font-family="Symbol" style:font-family-complex="Symbol" fo:font-size="10pt"/>
    </style:style>
    <style:style style:parent-style-name="832" style:display-name="T355" style:family="text" style:name="2726">
      <style:paragraph-properties/>
      <style:text-properties fo:color="#000000" fo:font-family="Symbol" style:font-family-complex="Symbol" fo:font-size="10pt"/>
    </style:style>
    <style:style style:parent-style-name="832" style:display-name="T356" style:family="text" style:name="2727">
      <style:paragraph-properties/>
      <style:text-properties fo:color="#000000" fo:font-family="Symbol" style:font-family-complex="Symbol" fo:font-size="10pt"/>
    </style:style>
    <style:style style:parent-style-name="832" style:display-name="T357" style:family="text" style:name="2728">
      <style:paragraph-properties/>
      <style:text-properties fo:color="#000000" fo:font-family="Symbol" style:font-family-complex="Symbol" fo:font-size="10pt"/>
    </style:style>
    <style:style style:parent-style-name="832" style:display-name="T358" style:family="text" style:name="2729">
      <style:paragraph-properties/>
      <style:text-properties fo:color="#000000" fo:font-family="Symbol" style:font-family-complex="Symbol" fo:font-size="10pt"/>
    </style:style>
    <style:style style:parent-style-name="832" style:display-name="T359" style:family="text" style:name="2730">
      <style:paragraph-properties/>
      <style:text-properties fo:color="#000000" fo:font-family="Symbol" style:font-family-complex="Symbol" fo:font-size="10pt"/>
    </style:style>
    <style:style style:parent-style-name="832" style:display-name="T360" style:family="text" style:name="2731">
      <style:paragraph-properties/>
      <style:text-properties fo:color="#000000" fo:font-family="Symbol" style:font-family-complex="Symbol" fo:font-size="10pt"/>
    </style:style>
    <style:style style:parent-style-name="832" style:display-name="T361" style:family="text" style:name="2732">
      <style:paragraph-properties/>
      <style:text-properties fo:color="#000000" fo:font-family="Symbol" style:font-family-complex="Symbol" fo:font-size="10pt"/>
    </style:style>
    <style:style style:parent-style-name="832" style:display-name="T362" style:family="text" style:name="2733">
      <style:paragraph-properties/>
      <style:text-properties fo:color="#000000" fo:font-family="Symbol" style:font-family-complex="Symbol" fo:font-size="10pt"/>
    </style:style>
    <style:style style:parent-style-name="832" style:display-name="T363" style:family="text" style:name="2734">
      <style:paragraph-properties/>
      <style:text-properties fo:color="#000000" fo:font-family="Symbol" style:font-family-complex="Symbol" fo:font-size="10pt"/>
    </style:style>
    <style:style style:parent-style-name="832" style:display-name="T364" style:family="text" style:name="2735">
      <style:paragraph-properties/>
      <style:text-properties fo:color="#000000" fo:font-family="Symbol" style:font-family-complex="Symbol" fo:font-size="10pt"/>
    </style:style>
    <style:style style:parent-style-name="832" style:display-name="T365" style:family="text" style:name="2736">
      <style:paragraph-properties/>
      <style:text-properties fo:color="#000000" fo:font-family="Symbol" style:font-family-complex="Symbol" fo:font-size="10pt"/>
    </style:style>
    <style:style style:parent-style-name="832" style:display-name="T366" style:family="text" style:name="2737">
      <style:paragraph-properties/>
      <style:text-properties fo:color="#000000" fo:font-family="Symbol" style:font-family-complex="Symbol" fo:font-size="10pt"/>
    </style:style>
    <style:style style:parent-style-name="832" style:display-name="T367" style:family="text" style:name="2738">
      <style:paragraph-properties/>
      <style:text-properties fo:color="#000000" fo:font-family="Symbol" style:font-family-complex="Symbol" fo:font-size="10pt"/>
    </style:style>
    <style:style style:parent-style-name="832" style:display-name="T368" style:family="text" style:name="2739">
      <style:paragraph-properties/>
      <style:text-properties fo:color="#000000" fo:font-family="Symbol" style:font-family-complex="Symbol" fo:font-size="10pt"/>
    </style:style>
    <style:style style:parent-style-name="832" style:display-name="T369" style:family="text" style:name="2740">
      <style:paragraph-properties/>
      <style:text-properties fo:color="#000000" fo:font-family="Symbol" style:font-family-complex="Symbol" fo:font-size="10pt"/>
    </style:style>
    <style:style style:parent-style-name="832" style:display-name="T370" style:family="text" style:name="2741">
      <style:paragraph-properties/>
      <style:text-properties fo:color="#000000" fo:font-family="Symbol" style:font-family-complex="Symbol" fo:font-size="10pt"/>
    </style:style>
    <style:style style:parent-style-name="832" style:display-name="T371" style:family="text" style:name="2742">
      <style:paragraph-properties/>
      <style:text-properties fo:color="#000000" fo:font-family="Symbol" style:font-family-complex="Symbol" fo:font-size="10pt"/>
    </style:style>
    <style:style style:parent-style-name="832" style:display-name="T372" style:family="text" style:name="2743">
      <style:paragraph-properties/>
      <style:text-properties fo:color="#000000" fo:font-family="Symbol" style:font-family-complex="Symbol" fo:font-size="10pt"/>
    </style:style>
    <style:style style:parent-style-name="832" style:display-name="T373" style:family="text" style:name="2744">
      <style:paragraph-properties/>
      <style:text-properties fo:color="#000000" fo:font-family="Symbol" style:font-family-complex="Symbol" fo:font-size="10pt"/>
    </style:style>
    <style:style style:parent-style-name="832" style:display-name="T374" style:family="text" style:name="2745">
      <style:paragraph-properties/>
      <style:text-properties fo:color="#000000" fo:font-family="Symbol" style:font-family-complex="Symbol" fo:font-size="10pt"/>
    </style:style>
    <style:style style:parent-style-name="832" style:display-name="T375" style:family="text" style:name="2746">
      <style:paragraph-properties/>
      <style:text-properties fo:color="#000000" fo:font-family="Symbol" style:font-family-complex="Symbol" fo:font-size="10pt"/>
    </style:style>
    <style:style style:parent-style-name="832" style:display-name="T376" style:family="text" style:name="2747">
      <style:paragraph-properties/>
      <style:text-properties fo:color="#000000" fo:font-family="Symbol" style:font-family-complex="Symbol" fo:font-size="10pt"/>
    </style:style>
    <style:style style:parent-style-name="832" style:display-name="T377" style:family="text" style:name="2748">
      <style:paragraph-properties/>
      <style:text-properties fo:color="#000000" fo:font-family="Symbol" style:font-family-complex="Symbol" fo:font-size="10pt"/>
    </style:style>
    <style:style style:parent-style-name="832" style:display-name="T378" style:family="text" style:name="2749">
      <style:paragraph-properties/>
      <style:text-properties fo:color="#000000" fo:font-family="Symbol" style:font-family-complex="Symbol" fo:font-size="10pt"/>
    </style:style>
    <style:style style:parent-style-name="832" style:display-name="T379" style:family="text" style:name="2750">
      <style:paragraph-properties/>
      <style:text-properties fo:font-family="Symbol" style:font-family-complex="Symbol"/>
    </style:style>
    <style:style style:parent-style-name="832" style:display-name="T380" style:family="text" style:name="2751">
      <style:paragraph-properties/>
      <style:text-properties fo:font-family="Symbol" style:font-family-complex="Symbol"/>
    </style:style>
    <style:style style:parent-style-name="832" style:display-name="T381" style:family="text" style:name="2752">
      <style:paragraph-properties/>
      <style:text-properties fo:font-family="Symbol" style:font-family-complex="Symbol"/>
    </style:style>
    <style:style style:parent-style-name="832" style:display-name="T382" style:family="text" style:name="2753">
      <style:paragraph-properties/>
      <style:text-properties fo:font-family="Symbol" style:font-family-complex="Symbol"/>
    </style:style>
    <style:style style:parent-style-name="832" style:display-name="T383" style:family="text" style:name="2754">
      <style:paragraph-properties/>
      <style:text-properties fo:font-family="Symbol" style:font-family-complex="Symbol"/>
    </style:style>
    <style:style style:parent-style-name="832" style:display-name="T384" style:family="text" style:name="2755">
      <style:paragraph-properties/>
      <style:text-properties fo:font-family="Symbol" style:font-family-complex="Symbol"/>
    </style:style>
    <style:style style:parent-style-name="832" style:display-name="T385" style:family="text" style:name="2756">
      <style:paragraph-properties/>
      <style:text-properties fo:font-family="Symbol" style:font-family-complex="Symbol"/>
    </style:style>
    <style:style style:parent-style-name="832" style:display-name="T386" style:family="text" style:name="2757">
      <style:paragraph-properties/>
      <style:text-properties fo:font-family="Symbol" style:font-family-complex="Symbol"/>
    </style:style>
    <style:style style:parent-style-name="832" style:display-name="T387" style:family="text" style:name="2758">
      <style:paragraph-properties/>
      <style:text-properties fo:font-family="Symbol" style:font-family-complex="Symbol"/>
    </style:style>
    <style:style style:parent-style-name="832" style:display-name="T388" style:family="text" style:name="2759">
      <style:paragraph-properties/>
      <style:text-properties fo:font-family="Symbol" style:font-family-complex="Symbol"/>
    </style:style>
    <style:style style:parent-style-name="832" style:display-name="T389" style:family="text" style:name="2760">
      <style:paragraph-properties/>
      <style:text-properties fo:font-family="Symbol" style:font-family-complex="Symbol"/>
    </style:style>
    <style:style style:parent-style-name="832" style:display-name="T390" style:family="text" style:name="2761">
      <style:paragraph-properties/>
      <style:text-properties fo:font-family="Symbol" style:font-family-complex="Symbol"/>
    </style:style>
    <style:style style:parent-style-name="832" style:display-name="T391" style:family="text" style:name="2762">
      <style:paragraph-properties/>
      <style:text-properties fo:font-family="Symbol" style:font-family-complex="Symbol"/>
    </style:style>
    <style:style style:parent-style-name="832" style:display-name="T392" style:family="text" style:name="2763">
      <style:paragraph-properties/>
      <style:text-properties fo:font-family="Symbol" style:font-family-complex="Symbol"/>
    </style:style>
    <style:style style:parent-style-name="832" style:display-name="T393" style:family="text" style:name="2764">
      <style:paragraph-properties/>
      <style:text-properties fo:font-family="Symbol" style:font-family-complex="Symbol"/>
    </style:style>
    <style:style style:parent-style-name="832" style:display-name="T394" style:family="text" style:name="2765">
      <style:paragraph-properties/>
      <style:text-properties fo:font-family="Symbol" style:font-family-complex="Symbol"/>
    </style:style>
    <style:style style:parent-style-name="832" style:display-name="T395" style:family="text" style:name="2766">
      <style:paragraph-properties/>
      <style:text-properties fo:font-family="Symbol" style:font-family-complex="Symbol"/>
    </style:style>
    <style:style style:parent-style-name="832" style:display-name="T396" style:family="text" style:name="2767">
      <style:paragraph-properties/>
      <style:text-properties fo:font-family="Symbol" style:font-family-complex="Symbol"/>
    </style:style>
    <style:style style:parent-style-name="832" style:display-name="T397" style:family="text" style:name="2768">
      <style:paragraph-properties/>
      <style:text-properties fo:color="#000000" fo:font-family="Times New Roman" style:font-family-complex="Times New Roman" fo:font-size="12pt"/>
    </style:style>
    <style:style style:parent-style-name="832" style:display-name="T398" style:family="text" style:name="2769">
      <style:paragraph-properties/>
    </style:style>
    <style:style style:parent-style-name="832" style:display-name="T399" style:family="text" style:name="2770">
      <style:paragraph-properties/>
    </style:style>
    <style:style style:parent-style-name="832" style:display-name="T400" style:family="text" style:name="2771">
      <style:paragraph-properties/>
    </style:style>
    <style:style style:parent-style-name="832" style:display-name="T401" style:family="text" style:name="2772">
      <style:paragraph-properties/>
    </style:style>
    <style:style style:parent-style-name="832" style:display-name="T402" style:family="text" style:name="2773">
      <style:paragraph-properties/>
    </style:style>
    <style:style style:parent-style-name="832" style:display-name="T403" style:family="text" style:name="2774">
      <style:paragraph-properties/>
    </style:style>
    <style:style style:parent-style-name="832" style:display-name="T404" style:family="text" style:name="2775">
      <style:paragraph-properties/>
    </style:style>
    <style:style style:parent-style-name="832" style:display-name="T405" style:family="text" style:name="2776">
      <style:paragraph-properties/>
    </style:style>
    <style:style style:parent-style-name="832" style:display-name="T406" style:family="text" style:name="2777">
      <style:paragraph-properties/>
      <style:text-properties fo:color="#000000" fo:font-family="Symbol" style:font-family-complex="Symbol" fo:font-size="10pt"/>
    </style:style>
    <style:style style:parent-style-name="832" style:display-name="T407" style:family="text" style:name="2778">
      <style:paragraph-properties/>
      <style:text-properties fo:color="#000000" fo:font-family="Symbol" style:font-family-complex="Symbol" fo:font-size="10pt"/>
    </style:style>
    <style:style style:parent-style-name="832" style:display-name="T408" style:family="text" style:name="2779">
      <style:paragraph-properties/>
      <style:text-properties fo:color="#000000" fo:font-family="Symbol" style:font-family-complex="Symbol" fo:font-size="10pt"/>
    </style:style>
    <style:style style:parent-style-name="832" style:display-name="T409" style:family="text" style:name="2780">
      <style:paragraph-properties/>
      <style:text-properties fo:color="#000000" fo:font-family="Symbol" style:font-family-complex="Symbol" fo:font-size="10pt"/>
    </style:style>
    <style:style style:parent-style-name="832" style:display-name="T410" style:family="text" style:name="2781">
      <style:paragraph-properties/>
      <style:text-properties fo:color="#000000" fo:font-family="Symbol" style:font-family-complex="Symbol" fo:font-size="10pt"/>
    </style:style>
    <style:style style:parent-style-name="832" style:display-name="T411" style:family="text" style:name="2782">
      <style:paragraph-properties/>
      <style:text-properties fo:color="#000000" fo:font-family="Symbol" style:font-family-complex="Symbol" fo:font-size="10pt"/>
    </style:style>
    <style:style style:parent-style-name="832" style:display-name="T412" style:family="text" style:name="2783">
      <style:paragraph-properties/>
      <style:text-properties fo:color="#000000" fo:font-family="Symbol" style:font-family-complex="Symbol" fo:font-size="10pt"/>
    </style:style>
    <style:style style:parent-style-name="832" style:display-name="T413" style:family="text" style:name="2784">
      <style:paragraph-properties/>
      <style:text-properties fo:color="#000000" fo:font-family="Symbol" style:font-family-complex="Symbol" fo:font-size="10pt"/>
    </style:style>
    <style:style style:parent-style-name="832" style:display-name="T414" style:family="text" style:name="2785">
      <style:paragraph-properties/>
      <style:text-properties fo:color="#000000" fo:font-family="Symbol" style:font-family-complex="Symbol" fo:font-size="10pt"/>
    </style:style>
    <style:style style:parent-style-name="832" style:display-name="T415" style:family="text" style:name="2786">
      <style:paragraph-properties/>
      <style:text-properties fo:color="#000000" fo:font-family="Times New Roman" style:font-family-complex="Times New Roman" fo:font-size="12pt"/>
    </style:style>
    <style:style style:parent-style-name="832" style:display-name="T416" style:family="text" style:name="2787">
      <style:paragraph-properties/>
    </style:style>
    <style:style style:parent-style-name="832" style:display-name="T417" style:family="text" style:name="2788">
      <style:paragraph-properties/>
    </style:style>
    <style:style style:parent-style-name="832" style:display-name="T418" style:family="text" style:name="2789">
      <style:paragraph-properties/>
    </style:style>
    <style:style style:parent-style-name="832" style:display-name="T419" style:family="text" style:name="2790">
      <style:paragraph-properties/>
    </style:style>
    <style:style style:parent-style-name="832" style:display-name="T420" style:family="text" style:name="2791">
      <style:paragraph-properties/>
    </style:style>
    <style:style style:parent-style-name="832" style:display-name="T421" style:family="text" style:name="2792">
      <style:paragraph-properties/>
    </style:style>
    <style:style style:parent-style-name="832" style:display-name="T422" style:family="text" style:name="2793">
      <style:paragraph-properties/>
    </style:style>
    <style:style style:parent-style-name="832" style:display-name="T423" style:family="text" style:name="2794">
      <style:paragraph-properties/>
    </style:style>
    <style:style style:parent-style-name="832" style:display-name="T424" style:family="text" style:name="2795">
      <style:paragraph-properties/>
      <style:text-properties fo:font-family="Symbol" style:font-family-complex="Symbol"/>
    </style:style>
    <style:style style:parent-style-name="832" style:display-name="T425" style:family="text" style:name="2796">
      <style:paragraph-properties/>
      <style:text-properties fo:font-family="Symbol" style:font-family-complex="Symbol"/>
    </style:style>
    <style:style style:parent-style-name="832" style:display-name="T426" style:family="text" style:name="2797">
      <style:paragraph-properties/>
      <style:text-properties fo:font-family="Symbol" style:font-family-complex="Symbol"/>
    </style:style>
    <style:style style:parent-style-name="832" style:display-name="T427" style:family="text" style:name="2798">
      <style:paragraph-properties/>
      <style:text-properties fo:font-family="Symbol" style:font-family-complex="Symbol"/>
    </style:style>
    <style:style style:parent-style-name="832" style:display-name="T428" style:family="text" style:name="2799">
      <style:paragraph-properties/>
      <style:text-properties fo:font-family="Symbol" style:font-family-complex="Symbol"/>
    </style:style>
    <style:style style:parent-style-name="832" style:display-name="T429" style:family="text" style:name="2800">
      <style:paragraph-properties/>
      <style:text-properties fo:font-family="Symbol" style:font-family-complex="Symbol"/>
    </style:style>
    <style:style style:parent-style-name="832" style:display-name="T430" style:family="text" style:name="2801">
      <style:paragraph-properties/>
      <style:text-properties fo:font-family="Symbol" style:font-family-complex="Symbol"/>
    </style:style>
    <style:style style:parent-style-name="832" style:display-name="T431" style:family="text" style:name="2802">
      <style:paragraph-properties/>
      <style:text-properties fo:font-family="Symbol" style:font-family-complex="Symbol"/>
    </style:style>
    <style:style style:parent-style-name="832" style:display-name="T432" style:family="text" style:name="2803">
      <style:paragraph-properties/>
      <style:text-properties fo:font-family="Symbol" style:font-family-complex="Symbol"/>
    </style:style>
    <style:style style:parent-style-name="832" style:display-name="T433" style:family="text" style:name="2804">
      <style:paragraph-properties/>
      <style:text-properties fo:color="#000000" fo:font-family="Times New Roman" style:font-family-complex="Times New Roman" fo:font-size="12pt"/>
    </style:style>
    <style:style style:parent-style-name="832" style:display-name="T434" style:family="text" style:name="2805">
      <style:paragraph-properties/>
    </style:style>
    <style:style style:parent-style-name="832" style:display-name="T435" style:family="text" style:name="2806">
      <style:paragraph-properties/>
    </style:style>
    <style:style style:parent-style-name="832" style:display-name="T436" style:family="text" style:name="2807">
      <style:paragraph-properties/>
    </style:style>
    <style:style style:parent-style-name="832" style:display-name="T437" style:family="text" style:name="2808">
      <style:paragraph-properties/>
    </style:style>
    <style:style style:parent-style-name="832" style:display-name="T438" style:family="text" style:name="2809">
      <style:paragraph-properties/>
    </style:style>
    <style:style style:parent-style-name="832" style:display-name="T439" style:family="text" style:name="2810">
      <style:paragraph-properties/>
    </style:style>
    <style:style style:parent-style-name="832" style:display-name="T440" style:family="text" style:name="2811">
      <style:paragraph-properties/>
    </style:style>
    <style:style style:parent-style-name="832" style:display-name="T441" style:family="text" style:name="2812">
      <style:paragraph-properties/>
    </style:style>
    <style:style style:parent-style-name="832" style:display-name="T442" style:family="text" style:name="2813">
      <style:paragraph-properties/>
      <style:text-properties fo:font-family="Symbol" style:font-family-complex="Symbol"/>
    </style:style>
    <style:style style:parent-style-name="832" style:display-name="T443" style:family="text" style:name="2814">
      <style:paragraph-properties/>
      <style:text-properties fo:font-family="Symbol" style:font-family-complex="Symbol"/>
    </style:style>
    <style:style style:parent-style-name="832" style:display-name="T444" style:family="text" style:name="2815">
      <style:paragraph-properties/>
      <style:text-properties fo:font-family="Symbol" style:font-family-complex="Symbol"/>
    </style:style>
    <style:style style:parent-style-name="832" style:display-name="T445" style:family="text" style:name="2816">
      <style:paragraph-properties/>
      <style:text-properties fo:font-family="Symbol" style:font-family-complex="Symbol"/>
    </style:style>
    <style:style style:parent-style-name="832" style:display-name="T446" style:family="text" style:name="2817">
      <style:paragraph-properties/>
      <style:text-properties fo:font-family="Symbol" style:font-family-complex="Symbol"/>
    </style:style>
    <style:style style:parent-style-name="832" style:display-name="T447" style:family="text" style:name="2818">
      <style:paragraph-properties/>
      <style:text-properties fo:font-family="Symbol" style:font-family-complex="Symbol"/>
    </style:style>
    <style:style style:parent-style-name="832" style:display-name="T448" style:family="text" style:name="2819">
      <style:paragraph-properties/>
      <style:text-properties fo:font-family="Symbol" style:font-family-complex="Symbol"/>
    </style:style>
    <style:style style:parent-style-name="832" style:display-name="T449" style:family="text" style:name="2820">
      <style:paragraph-properties/>
      <style:text-properties fo:font-family="Symbol" style:font-family-complex="Symbol"/>
    </style:style>
    <style:style style:parent-style-name="832" style:display-name="T450" style:family="text" style:name="2821">
      <style:paragraph-properties/>
      <style:text-properties fo:font-family="Symbol" style:font-family-complex="Symbol"/>
    </style:style>
    <style:style style:parent-style-name="832" style:display-name="T451" style:family="text" style:name="2822">
      <style:paragraph-properties/>
      <style:text-properties fo:color="#000000" fo:font-family="Times New Roman" style:font-family-complex="Times New Roman" fo:font-size="12pt"/>
    </style:style>
    <style:style style:parent-style-name="832" style:display-name="T452" style:family="text" style:name="2823">
      <style:paragraph-properties/>
    </style:style>
    <style:style style:parent-style-name="832" style:display-name="T453" style:family="text" style:name="2824">
      <style:paragraph-properties/>
    </style:style>
    <style:style style:parent-style-name="832" style:display-name="T454" style:family="text" style:name="2825">
      <style:paragraph-properties/>
    </style:style>
    <style:style style:parent-style-name="832" style:display-name="T455" style:family="text" style:name="2826">
      <style:paragraph-properties/>
    </style:style>
    <style:style style:parent-style-name="832" style:display-name="T456" style:family="text" style:name="2827">
      <style:paragraph-properties/>
    </style:style>
    <style:style style:parent-style-name="832" style:display-name="T457" style:family="text" style:name="2828">
      <style:paragraph-properties/>
    </style:style>
    <style:style style:parent-style-name="832" style:display-name="T458" style:family="text" style:name="2829">
      <style:paragraph-properties/>
    </style:style>
    <style:style style:parent-style-name="832" style:display-name="T459" style:family="text" style:name="2830">
      <style:paragraph-properties/>
    </style:style>
    <style:style style:parent-style-name="832" style:display-name="T460" style:family="text" style:name="2831">
      <style:paragraph-properties/>
      <style:text-properties fo:font-family="Symbol" style:font-family-complex="Symbol"/>
    </style:style>
    <style:style style:parent-style-name="832" style:display-name="T461" style:family="text" style:name="2832">
      <style:paragraph-properties/>
      <style:text-properties fo:font-family="Symbol" style:font-family-complex="Symbol"/>
    </style:style>
    <style:style style:parent-style-name="832" style:display-name="T462" style:family="text" style:name="2833">
      <style:paragraph-properties/>
      <style:text-properties fo:font-family="Symbol" style:font-family-complex="Symbol"/>
    </style:style>
    <style:style style:parent-style-name="832" style:display-name="T463" style:family="text" style:name="2834">
      <style:paragraph-properties/>
      <style:text-properties fo:font-family="Symbol" style:font-family-complex="Symbol"/>
    </style:style>
    <style:style style:parent-style-name="832" style:display-name="T464" style:family="text" style:name="2835">
      <style:paragraph-properties/>
      <style:text-properties fo:font-family="Symbol" style:font-family-complex="Symbol"/>
    </style:style>
    <style:style style:parent-style-name="832" style:display-name="T465" style:family="text" style:name="2836">
      <style:paragraph-properties/>
      <style:text-properties fo:font-family="Symbol" style:font-family-complex="Symbol"/>
    </style:style>
    <style:style style:parent-style-name="832" style:display-name="T466" style:family="text" style:name="2837">
      <style:paragraph-properties/>
      <style:text-properties fo:font-family="Symbol" style:font-family-complex="Symbol"/>
    </style:style>
    <style:style style:parent-style-name="832" style:display-name="T467" style:family="text" style:name="2838">
      <style:paragraph-properties/>
      <style:text-properties fo:font-family="Symbol" style:font-family-complex="Symbol"/>
    </style:style>
    <style:style style:parent-style-name="832" style:display-name="T468" style:family="text" style:name="2839">
      <style:paragraph-properties/>
      <style:text-properties fo:font-family="Symbol" style:font-family-complex="Symbol"/>
    </style:style>
    <style:style style:parent-style-name="832" style:display-name="T469" style:family="text" style:name="2840">
      <style:paragraph-properties/>
      <style:text-properties fo:font-family="Symbol" style:font-family-complex="Symbol"/>
    </style:style>
    <style:style style:parent-style-name="832" style:display-name="T470" style:family="text" style:name="2841">
      <style:paragraph-properties/>
      <style:text-properties fo:font-family="Symbol" style:font-family-complex="Symbol"/>
    </style:style>
    <style:style style:parent-style-name="832" style:display-name="T471" style:family="text" style:name="2842">
      <style:paragraph-properties/>
      <style:text-properties fo:font-family="Symbol" style:font-family-complex="Symbol"/>
    </style:style>
    <style:style style:parent-style-name="832" style:display-name="T472" style:family="text" style:name="2843">
      <style:paragraph-properties/>
      <style:text-properties fo:font-family="Symbol" style:font-family-complex="Symbol"/>
    </style:style>
    <style:style style:parent-style-name="832" style:display-name="T473" style:family="text" style:name="2844">
      <style:paragraph-properties/>
      <style:text-properties fo:font-family="Symbol" style:font-family-complex="Symbol"/>
    </style:style>
    <style:style style:parent-style-name="832" style:display-name="T474" style:family="text" style:name="2845">
      <style:paragraph-properties/>
      <style:text-properties fo:font-family="Symbol" style:font-family-complex="Symbol"/>
    </style:style>
    <style:style style:parent-style-name="832" style:display-name="T475" style:family="text" style:name="2846">
      <style:paragraph-properties/>
      <style:text-properties fo:font-family="Symbol" style:font-family-complex="Symbol"/>
    </style:style>
    <style:style style:parent-style-name="832" style:display-name="T476" style:family="text" style:name="2847">
      <style:paragraph-properties/>
      <style:text-properties fo:font-family="Symbol" style:font-family-complex="Symbol"/>
    </style:style>
    <style:style style:parent-style-name="832" style:display-name="T477" style:family="text" style:name="2848">
      <style:paragraph-properties/>
      <style:text-properties fo:font-family="Symbol" style:font-family-complex="Symbol"/>
    </style:style>
    <style:style style:parent-style-name="832" style:display-name="T478" style:family="text" style:name="2849">
      <style:paragraph-properties/>
      <style:text-properties fo:color="#000000" fo:font-family="Symbol" style:font-family-complex="Symbol" fo:font-size="10pt"/>
    </style:style>
    <style:style style:parent-style-name="832" style:display-name="T479" style:family="text" style:name="2850">
      <style:paragraph-properties/>
      <style:text-properties fo:color="#000000" fo:font-family="Symbol" style:font-family-complex="Symbol" fo:font-size="10pt"/>
    </style:style>
    <style:style style:parent-style-name="832" style:display-name="T480" style:family="text" style:name="2851">
      <style:paragraph-properties/>
      <style:text-properties fo:color="#000000" fo:font-family="Symbol" style:font-family-complex="Symbol" fo:font-size="10pt"/>
    </style:style>
    <style:style style:parent-style-name="832" style:display-name="T481" style:family="text" style:name="2852">
      <style:paragraph-properties/>
      <style:text-properties fo:color="#000000" fo:font-family="Symbol" style:font-family-complex="Symbol" fo:font-size="10pt"/>
    </style:style>
    <style:style style:parent-style-name="832" style:display-name="T482" style:family="text" style:name="2853">
      <style:paragraph-properties/>
      <style:text-properties fo:color="#000000" fo:font-family="Symbol" style:font-family-complex="Symbol" fo:font-size="10pt"/>
    </style:style>
    <style:style style:parent-style-name="832" style:display-name="T483" style:family="text" style:name="2854">
      <style:paragraph-properties/>
      <style:text-properties fo:color="#000000" fo:font-family="Symbol" style:font-family-complex="Symbol" fo:font-size="10pt"/>
    </style:style>
    <style:style style:parent-style-name="832" style:display-name="T484" style:family="text" style:name="2855">
      <style:paragraph-properties/>
      <style:text-properties fo:color="#000000" fo:font-family="Symbol" style:font-family-complex="Symbol" fo:font-size="10pt"/>
    </style:style>
    <style:style style:parent-style-name="832" style:display-name="T485" style:family="text" style:name="2856">
      <style:paragraph-properties/>
      <style:text-properties fo:color="#000000" fo:font-family="Symbol" style:font-family-complex="Symbol" fo:font-size="10pt"/>
    </style:style>
    <style:style style:parent-style-name="832" style:display-name="T486" style:family="text" style:name="2857">
      <style:paragraph-properties/>
      <style:text-properties fo:color="#000000" fo:font-family="Symbol" style:font-family-complex="Symbol" fo:font-size="10pt"/>
    </style:style>
    <style:style style:parent-style-name="832" style:display-name="T487" style:family="text" style:name="2858">
      <style:paragraph-properties/>
      <style:text-properties fo:color="#000000" fo:font-family="Symbol" style:font-family-complex="Symbol" fo:font-size="10pt"/>
    </style:style>
    <style:style style:parent-style-name="832" style:display-name="T488" style:family="text" style:name="2859">
      <style:paragraph-properties/>
      <style:text-properties fo:color="#000000" fo:font-family="Symbol" style:font-family-complex="Symbol" fo:font-size="10pt"/>
    </style:style>
    <style:style style:parent-style-name="832" style:display-name="T489" style:family="text" style:name="2860">
      <style:paragraph-properties/>
      <style:text-properties fo:color="#000000" fo:font-family="Symbol" style:font-family-complex="Symbol" fo:font-size="10pt"/>
    </style:style>
    <style:style style:parent-style-name="832" style:display-name="T490" style:family="text" style:name="2861">
      <style:paragraph-properties/>
      <style:text-properties fo:color="#000000" fo:font-family="Symbol" style:font-family-complex="Symbol" fo:font-size="10pt"/>
    </style:style>
    <style:style style:parent-style-name="832" style:display-name="T491" style:family="text" style:name="2862">
      <style:paragraph-properties/>
      <style:text-properties fo:color="#000000" fo:font-family="Symbol" style:font-family-complex="Symbol" fo:font-size="10pt"/>
    </style:style>
    <style:style style:parent-style-name="832" style:display-name="T492" style:family="text" style:name="2863">
      <style:paragraph-properties/>
      <style:text-properties fo:color="#000000" fo:font-family="Symbol" style:font-family-complex="Symbol" fo:font-size="10pt"/>
    </style:style>
    <style:style style:parent-style-name="832" style:display-name="T493" style:family="text" style:name="2864">
      <style:paragraph-properties/>
      <style:text-properties fo:color="#000000" fo:font-family="Symbol" style:font-family-complex="Symbol" fo:font-size="10pt"/>
    </style:style>
    <style:style style:parent-style-name="832" style:display-name="T494" style:family="text" style:name="2865">
      <style:paragraph-properties/>
      <style:text-properties fo:color="#000000" fo:font-family="Symbol" style:font-family-complex="Symbol" fo:font-size="10pt"/>
    </style:style>
    <style:style style:parent-style-name="832" style:display-name="T495" style:family="text" style:name="2866">
      <style:paragraph-properties/>
      <style:text-properties fo:color="#000000" fo:font-family="Symbol" style:font-family-complex="Symbol" fo:font-size="10pt"/>
    </style:style>
    <style:style style:parent-style-name="832" style:display-name="T496" style:family="text" style:name="2867">
      <style:paragraph-properties/>
      <style:text-properties fo:font-family="Symbol" style:font-family-complex="Symbol"/>
    </style:style>
    <style:style style:parent-style-name="832" style:display-name="T497" style:family="text" style:name="2868">
      <style:paragraph-properties/>
      <style:text-properties fo:font-family="Courier New" style:font-family-complex="Courier New"/>
    </style:style>
    <style:style style:parent-style-name="832" style:display-name="T498" style:family="text" style:name="2869">
      <style:paragraph-properties/>
      <style:text-properties fo:font-family="Wingdings" style:font-family-complex="Wingdings"/>
    </style:style>
    <style:style style:parent-style-name="832" style:display-name="T499" style:family="text" style:name="2870">
      <style:paragraph-properties/>
      <style:text-properties fo:font-family="Symbol" style:font-family-complex="Symbol"/>
    </style:style>
    <style:style style:parent-style-name="832" style:display-name="T500" style:family="text" style:name="2871">
      <style:paragraph-properties/>
      <style:text-properties fo:font-family="Courier New" style:font-family-complex="Courier New"/>
    </style:style>
    <style:style style:parent-style-name="832" style:display-name="T501" style:family="text" style:name="2872">
      <style:paragraph-properties/>
      <style:text-properties fo:font-family="Wingdings" style:font-family-complex="Wingdings"/>
    </style:style>
    <style:style style:parent-style-name="832" style:display-name="T502" style:family="text" style:name="2873">
      <style:paragraph-properties/>
      <style:text-properties fo:font-family="Symbol" style:font-family-complex="Symbol"/>
    </style:style>
    <style:style style:parent-style-name="832" style:display-name="T503" style:family="text" style:name="2874">
      <style:paragraph-properties/>
      <style:text-properties fo:font-family="Courier New" style:font-family-complex="Courier New"/>
    </style:style>
    <style:style style:parent-style-name="832" style:display-name="T504" style:family="text" style:name="2875">
      <style:paragraph-properties/>
      <style:text-properties fo:font-family="Wingdings" style:font-family-complex="Wingdings"/>
    </style:style>
    <style:style style:parent-style-name="832" style:display-name="T505" style:family="text" style:name="2876">
      <style:paragraph-properties/>
      <style:text-properties fo:color="#000000" fo:font-family="Symbol" style:font-family-complex="Symbol" fo:font-size="10pt"/>
    </style:style>
    <style:style style:parent-style-name="832" style:display-name="T506" style:family="text" style:name="2877">
      <style:paragraph-properties/>
      <style:text-properties fo:color="#000000" fo:font-family="Symbol" style:font-family-complex="Symbol" fo:font-size="10pt"/>
    </style:style>
    <style:style style:parent-style-name="832" style:display-name="T507" style:family="text" style:name="2878">
      <style:paragraph-properties/>
      <style:text-properties fo:color="#000000" fo:font-family="Symbol" style:font-family-complex="Symbol" fo:font-size="10pt"/>
    </style:style>
    <style:style style:parent-style-name="832" style:display-name="T508" style:family="text" style:name="2879">
      <style:paragraph-properties/>
      <style:text-properties fo:color="#000000" fo:font-family="Symbol" style:font-family-complex="Symbol" fo:font-size="10pt"/>
    </style:style>
    <style:style style:parent-style-name="832" style:display-name="T509" style:family="text" style:name="2880">
      <style:paragraph-properties/>
      <style:text-properties fo:color="#000000" fo:font-family="Symbol" style:font-family-complex="Symbol" fo:font-size="10pt"/>
    </style:style>
    <style:style style:parent-style-name="832" style:display-name="T510" style:family="text" style:name="2881">
      <style:paragraph-properties/>
      <style:text-properties fo:color="#000000" fo:font-family="Symbol" style:font-family-complex="Symbol" fo:font-size="10pt"/>
    </style:style>
    <style:style style:parent-style-name="832" style:display-name="T511" style:family="text" style:name="2882">
      <style:paragraph-properties/>
      <style:text-properties fo:color="#000000" fo:font-family="Symbol" style:font-family-complex="Symbol" fo:font-size="10pt"/>
    </style:style>
    <style:style style:parent-style-name="832" style:display-name="T512" style:family="text" style:name="2883">
      <style:paragraph-properties/>
      <style:text-properties fo:color="#000000" fo:font-family="Symbol" style:font-family-complex="Symbol" fo:font-size="10pt"/>
    </style:style>
    <style:style style:parent-style-name="832" style:display-name="T513" style:family="text" style:name="2884">
      <style:paragraph-properties/>
      <style:text-properties fo:color="#000000" fo:font-family="Symbol" style:font-family-complex="Symbol" fo:font-size="10pt"/>
    </style:style>
    <style:style style:parent-style-name="832" style:display-name="T514" style:family="text" style:name="2885">
      <style:paragraph-properties/>
      <style:text-properties fo:font-family="Symbol" style:font-family-complex="Symbol"/>
    </style:style>
    <style:style style:parent-style-name="832" style:display-name="T515" style:family="text" style:name="2886">
      <style:paragraph-properties/>
      <style:text-properties fo:font-family="Symbol" style:font-family-complex="Symbol"/>
    </style:style>
    <style:style style:parent-style-name="832" style:display-name="T516" style:family="text" style:name="2887">
      <style:paragraph-properties/>
      <style:text-properties fo:font-family="Symbol" style:font-family-complex="Symbol"/>
    </style:style>
    <style:style style:parent-style-name="832" style:display-name="T517" style:family="text" style:name="2888">
      <style:paragraph-properties/>
      <style:text-properties fo:font-family="Symbol" style:font-family-complex="Symbol"/>
    </style:style>
    <style:style style:parent-style-name="832" style:display-name="T518" style:family="text" style:name="2889">
      <style:paragraph-properties/>
      <style:text-properties fo:font-family="Symbol" style:font-family-complex="Symbol"/>
    </style:style>
    <style:style style:parent-style-name="832" style:display-name="T519" style:family="text" style:name="2890">
      <style:paragraph-properties/>
      <style:text-properties fo:font-family="Symbol" style:font-family-complex="Symbol"/>
    </style:style>
    <style:style style:parent-style-name="832" style:display-name="T520" style:family="text" style:name="2891">
      <style:paragraph-properties/>
      <style:text-properties fo:font-family="Symbol" style:font-family-complex="Symbol"/>
    </style:style>
    <style:style style:parent-style-name="832" style:display-name="T521" style:family="text" style:name="2892">
      <style:paragraph-properties/>
      <style:text-properties fo:font-family="Symbol" style:font-family-complex="Symbol"/>
    </style:style>
    <style:style style:parent-style-name="832" style:display-name="T522" style:family="text" style:name="2893">
      <style:paragraph-properties/>
      <style:text-properties fo:font-family="Symbol" style:font-family-complex="Symbol"/>
    </style:style>
    <style:style style:parent-style-name="832" style:display-name="T523" style:family="text" style:name="2894">
      <style:paragraph-properties/>
      <style:text-properties fo:color="#000000" fo:font-family="Symbol" style:font-family-complex="Symbol" fo:font-size="10pt"/>
    </style:style>
    <style:style style:parent-style-name="832" style:display-name="T524" style:family="text" style:name="2895">
      <style:paragraph-properties/>
      <style:text-properties fo:color="#000000" fo:font-family="Symbol" style:font-family-complex="Symbol" fo:font-size="10pt"/>
    </style:style>
    <style:style style:parent-style-name="832" style:display-name="T525" style:family="text" style:name="2896">
      <style:paragraph-properties/>
      <style:text-properties fo:color="#000000" fo:font-family="Symbol" style:font-family-complex="Symbol" fo:font-size="10pt"/>
    </style:style>
    <style:style style:parent-style-name="832" style:display-name="T526" style:family="text" style:name="2897">
      <style:paragraph-properties/>
      <style:text-properties fo:color="#000000" fo:font-family="Symbol" style:font-family-complex="Symbol" fo:font-size="10pt"/>
    </style:style>
    <style:style style:parent-style-name="832" style:display-name="T527" style:family="text" style:name="2898">
      <style:paragraph-properties/>
      <style:text-properties fo:color="#000000" fo:font-family="Symbol" style:font-family-complex="Symbol" fo:font-size="10pt"/>
    </style:style>
    <style:style style:parent-style-name="832" style:display-name="T528" style:family="text" style:name="2899">
      <style:paragraph-properties/>
      <style:text-properties fo:color="#000000" fo:font-family="Symbol" style:font-family-complex="Symbol" fo:font-size="10pt"/>
    </style:style>
    <style:style style:parent-style-name="832" style:display-name="T529" style:family="text" style:name="2900">
      <style:paragraph-properties/>
      <style:text-properties fo:color="#000000" fo:font-family="Symbol" style:font-family-complex="Symbol" fo:font-size="10pt"/>
    </style:style>
    <style:style style:parent-style-name="832" style:display-name="T530" style:family="text" style:name="2901">
      <style:paragraph-properties/>
      <style:text-properties fo:color="#000000" fo:font-family="Symbol" style:font-family-complex="Symbol" fo:font-size="10pt"/>
    </style:style>
    <style:style style:parent-style-name="832" style:display-name="T531" style:family="text" style:name="2902">
      <style:paragraph-properties/>
      <style:text-properties fo:color="#000000" fo:font-family="Symbol" style:font-family-complex="Symbol" fo:font-size="10pt"/>
    </style:style>
    <style:style style:parent-style-name="832" style:display-name="T532" style:family="text" style:name="2903">
      <style:paragraph-properties/>
    </style:style>
    <style:style style:parent-style-name="832" style:display-name="T533" style:family="text" style:name="2904">
      <style:paragraph-properties/>
    </style:style>
    <style:style style:parent-style-name="832" style:display-name="T534" style:family="text" style:name="2905">
      <style:paragraph-properties/>
    </style:style>
    <style:style style:parent-style-name="832" style:display-name="T535" style:family="text" style:name="2906">
      <style:paragraph-properties/>
    </style:style>
    <style:style style:parent-style-name="832" style:display-name="T536" style:family="text" style:name="2907">
      <style:paragraph-properties/>
    </style:style>
    <style:style style:parent-style-name="832" style:display-name="T537" style:family="text" style:name="2908">
      <style:paragraph-properties/>
    </style:style>
    <style:style style:parent-style-name="832" style:display-name="T538" style:family="text" style:name="2909">
      <style:paragraph-properties/>
    </style:style>
    <style:style style:parent-style-name="832" style:display-name="T539" style:family="text" style:name="2910">
      <style:paragraph-properties/>
    </style:style>
    <style:style style:parent-style-name="832" style:display-name="T540" style:family="text" style:name="2911">
      <style:paragraph-properties/>
    </style:style>
    <style:style style:parent-style-name="832" style:display-name="T541" style:family="text" style:name="2912">
      <style:paragraph-properties/>
    </style:style>
    <style:style style:parent-style-name="832" style:display-name="T542" style:family="text" style:name="2913">
      <style:paragraph-properties/>
    </style:style>
    <style:style style:parent-style-name="832" style:display-name="T543" style:family="text" style:name="2914">
      <style:paragraph-properties/>
    </style:style>
    <style:style style:parent-style-name="832" style:display-name="T544" style:family="text" style:name="2915">
      <style:paragraph-properties/>
    </style:style>
    <style:style style:parent-style-name="832" style:display-name="T545" style:family="text" style:name="2916">
      <style:paragraph-properties/>
    </style:style>
    <style:style style:parent-style-name="832" style:display-name="T546" style:family="text" style:name="2917">
      <style:paragraph-properties/>
    </style:style>
    <style:style style:parent-style-name="832" style:display-name="T547" style:family="text" style:name="2918">
      <style:paragraph-properties/>
    </style:style>
    <style:style style:parent-style-name="832" style:display-name="T548" style:family="text" style:name="2919">
      <style:paragraph-properties/>
    </style:style>
    <style:style style:parent-style-name="832" style:display-name="T549" style:family="text" style:name="2920">
      <style:paragraph-properties/>
    </style:style>
    <style:style style:parent-style-name="832" style:display-name="T550" style:family="text" style:name="2921">
      <style:paragraph-properties/>
    </style:style>
    <style:style style:parent-style-name="832" style:display-name="T551" style:family="text" style:name="2922">
      <style:paragraph-properties/>
    </style:style>
    <style:style style:parent-style-name="832" style:display-name="T552" style:family="text" style:name="2923">
      <style:paragraph-properties/>
    </style:style>
    <style:style style:parent-style-name="832" style:display-name="T553" style:family="text" style:name="2924">
      <style:paragraph-properties/>
    </style:style>
    <style:style style:parent-style-name="832" style:display-name="T554" style:family="text" style:name="2925">
      <style:paragraph-properties/>
    </style:style>
    <style:style style:parent-style-name="832" style:display-name="T555" style:family="text" style:name="2926">
      <style:paragraph-properties/>
    </style:style>
    <style:style style:parent-style-name="832" style:display-name="T556" style:family="text" style:name="2927">
      <style:paragraph-properties/>
    </style:style>
    <style:style style:parent-style-name="832" style:display-name="T557" style:family="text" style:name="2928">
      <style:paragraph-properties/>
    </style:style>
    <style:style style:parent-style-name="832" style:display-name="T558" style:family="text" style:name="2929">
      <style:paragraph-properties/>
    </style:style>
    <style:style style:parent-style-name="832" style:display-name="T559" style:family="text" style:name="2930">
      <style:paragraph-properties/>
      <style:text-properties fo:font-family="Symbol" style:font-family-complex="Symbol"/>
    </style:style>
    <style:style style:parent-style-name="832" style:display-name="T560" style:family="text" style:name="2931">
      <style:paragraph-properties/>
      <style:text-properties fo:font-family="Symbol" style:font-family-complex="Symbol"/>
    </style:style>
    <style:style style:parent-style-name="832" style:display-name="T561" style:family="text" style:name="2932">
      <style:paragraph-properties/>
      <style:text-properties fo:font-family="Symbol" style:font-family-complex="Symbol"/>
    </style:style>
    <style:style style:parent-style-name="832" style:display-name="T562" style:family="text" style:name="2933">
      <style:paragraph-properties/>
      <style:text-properties fo:font-family="Symbol" style:font-family-complex="Symbol"/>
    </style:style>
    <style:style style:parent-style-name="832" style:display-name="T563" style:family="text" style:name="2934">
      <style:paragraph-properties/>
      <style:text-properties fo:font-family="Symbol" style:font-family-complex="Symbol"/>
    </style:style>
    <style:style style:parent-style-name="832" style:display-name="T564" style:family="text" style:name="2935">
      <style:paragraph-properties/>
      <style:text-properties fo:font-family="Symbol" style:font-family-complex="Symbol"/>
    </style:style>
    <style:style style:parent-style-name="832" style:display-name="T565" style:family="text" style:name="2936">
      <style:paragraph-properties/>
      <style:text-properties fo:font-family="Symbol" style:font-family-complex="Symbol"/>
    </style:style>
    <style:style style:parent-style-name="832" style:display-name="T566" style:family="text" style:name="2937">
      <style:paragraph-properties/>
      <style:text-properties fo:font-family="Symbol" style:font-family-complex="Symbol"/>
    </style:style>
    <style:style style:parent-style-name="832" style:display-name="T567" style:family="text" style:name="2938">
      <style:paragraph-properties/>
      <style:text-properties fo:font-family="Symbol" style:font-family-complex="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Symbol" style:font-family-complex="Symbol"/>
    </style:style>
    <style:style style:family="text" style:name="T12">
      <style:text-properties fo:font-family="Symbol" style:font-family-complex="Symbol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Symbol" style:font-family-complex="Symbol"/>
    </style:style>
    <style:style style:family="text" style:name="T15">
      <style:text-properties fo:font-family="Symbol" style:font-family-complex="Symbol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Symbol" style:font-family-complex="Symbol"/>
    </style:style>
    <style:style style:family="text" style:name="T18">
      <style:text-properties fo:font-family="Symbol" style:font-family-complex="Symbol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Symbol" style:font-family-complex="Symbol"/>
    </style:style>
    <style:style style:family="text" style:name="T21">
      <style:text-properties fo:font-family="Symbol" style:font-family-complex="Symbol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Symbol" style:font-family-complex="Symbol"/>
    </style:style>
    <style:style style:family="text" style:name="T24">
      <style:text-properties fo:font-family="Symbol" style:font-family-complex="Symbol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Symbol" style:font-family-complex="Symbol"/>
    </style:style>
    <style:style style:family="text" style:name="T27">
      <style:text-properties fo:font-family="Symbol" style:font-family-complex="Symbol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OpenSymbol" style:font-family-complex="OpenSymbol"/>
    </style:style>
    <style:style style:family="text" style:name="T39">
      <style:text-properties fo:font-family="OpenSymbol" style:font-family-complex="OpenSymbol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OpenSymbol" style:font-family-complex="OpenSymbol"/>
    </style:style>
    <style:style style:family="text" style:name="T42">
      <style:text-properties fo:font-family="OpenSymbol" style:font-family-complex="OpenSymbol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OpenSymbol" style:font-family-complex="OpenSymbol"/>
    </style:style>
    <style:style style:family="text" style:name="T45">
      <style:text-properties fo:font-family="OpenSymbol" style:font-family-complex="OpenSymbol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Symbol" style:font-family-complex="Symbol"/>
    </style:style>
    <style:style style:family="text" style:name="T48">
      <style:text-properties fo:font-family="Symbol" style:font-family-complex="Symbol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Symbol" style:font-family-complex="Symbol"/>
    </style:style>
    <style:style style:family="text" style:name="T51">
      <style:text-properties fo:font-family="Symbol" style:font-family-complex="Symbol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Symbol" style:font-family-complex="Symbol"/>
    </style:style>
    <style:style style:family="text" style:name="T54">
      <style:text-properties fo:font-family="Symbol" style:font-family-complex="Symbol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Symbol" style:font-family-complex="Symbol"/>
    </style:style>
    <style:style style:family="text" style:name="T57">
      <style:text-properties fo:font-family="Symbol" style:font-family-complex="Symbol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Symbol" style:font-family-complex="Symbol"/>
    </style:style>
    <style:style style:family="text" style:name="T60">
      <style:text-properties fo:font-family="Symbol" style:font-family-complex="Symbol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Symbol" style:font-family-complex="Symbol"/>
    </style:style>
    <style:style style:family="text" style:name="T63">
      <style:text-properties fo:font-family="Symbol" style:font-family-complex="Symbol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Symbol" style:font-family-complex="Symbol"/>
    </style:style>
    <style:style style:family="text" style:name="T66">
      <style:text-properties fo:font-family="Symbol" style:font-family-complex="Symbol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Symbol" style:font-family-complex="Symbol"/>
    </style:style>
    <style:style style:family="text" style:name="T69">
      <style:text-properties fo:font-family="Symbol" style:font-family-complex="Symbol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Symbol" style:font-family-complex="Symbol"/>
    </style:style>
    <style:style style:family="text" style:name="T72">
      <style:text-properties fo:font-family="Symbol" style:font-family-complex="Symbol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OpenSymbol" style:font-family-complex="OpenSymbol"/>
    </style:style>
    <style:style style:family="text" style:name="T75">
      <style:text-properties fo:font-family="OpenSymbol" style:font-family-complex="OpenSymbol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OpenSymbol" style:font-family-complex="OpenSymbol"/>
    </style:style>
    <style:style style:family="text" style:name="T78">
      <style:text-properties fo:font-family="OpenSymbol" style:font-family-complex="OpenSymbol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OpenSymbol" style:font-family-complex="OpenSymbol"/>
    </style:style>
    <style:style style:family="text" style:name="T81">
      <style:text-properties fo:font-family="OpenSymbol" style:font-family-complex="OpenSymbol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Symbol" style:font-family-complex="Symbol"/>
    </style:style>
    <style:style style:family="text" style:name="T84">
      <style:text-properties fo:font-family="Symbol" style:font-family-complex="Symbol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Symbol" style:font-family-complex="Symbol"/>
    </style:style>
    <style:style style:family="text" style:name="T87">
      <style:text-properties fo:font-family="Symbol" style:font-family-complex="Symbol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Symbol" style:font-family-complex="Symbol"/>
    </style:style>
    <style:style style:family="text" style:name="T90">
      <style:text-properties fo:font-family="Symbol" style:font-family-complex="Symbol"/>
    </style:style>
    <style:style style:family="text" style:name="T91">
      <style:text-properties fo:font-family="Symbol" style:font-family-complex="Symbol"/>
    </style:style>
    <style:style style:family="text" style:name="T92">
      <style:text-properties fo:font-family="Symbol" style:font-family-complex="Symbol"/>
    </style:style>
    <style:style style:family="text" style:name="T93">
      <style:text-properties fo:font-family="Symbol" style:font-family-complex="Symbol"/>
    </style:style>
    <style:style style:family="text" style:name="T94">
      <style:text-properties fo:font-family="Symbol" style:font-family-complex="Symbol"/>
    </style:style>
    <style:style style:family="text" style:name="T95">
      <style:text-properties fo:font-family="Symbol" style:font-family-complex="Symbol"/>
    </style:style>
    <style:style style:family="text" style:name="T96">
      <style:text-properties fo:font-family="Symbol" style:font-family-complex="Symbol"/>
    </style:style>
    <style:style style:family="text" style:name="T97">
      <style:text-properties fo:font-family="Symbol" style:font-family-complex="Symbol"/>
    </style:style>
    <style:style style:family="text" style:name="T98">
      <style:text-properties fo:font-family="Symbol" style:font-family-complex="Symbol"/>
    </style:style>
    <style:style style:family="text" style:name="T99">
      <style:text-properties fo:font-family="Symbol" style:font-family-complex="Symbol"/>
    </style:style>
    <style:style style:family="text" style:name="T100">
      <style:text-properties fo:font-family="Symbol" style:font-family-complex="Symbol"/>
    </style:style>
    <style:style style:family="text" style:name="T101">
      <style:text-properties fo:font-family="OpenSymbol" style:font-family-complex="OpenSymbol"/>
    </style:style>
    <style:style style:family="text" style:name="T102">
      <style:text-properties fo:font-family="OpenSymbol" style:font-family-complex="OpenSymbol"/>
    </style:style>
    <style:style style:family="text" style:name="T103">
      <style:text-properties fo:font-family="Symbol" style:font-family-complex="Symbol"/>
    </style:style>
    <style:style style:family="text" style:name="T104">
      <style:text-properties fo:font-family="OpenSymbol" style:font-family-complex="OpenSymbol"/>
    </style:style>
    <style:style style:family="text" style:name="T105">
      <style:text-properties fo:font-family="OpenSymbol" style:font-family-complex="OpenSymbol"/>
    </style:style>
    <style:style style:family="text" style:name="T106">
      <style:text-properties fo:font-family="Symbol" style:font-family-complex="Symbol"/>
    </style:style>
    <style:style style:family="text" style:name="T107">
      <style:text-properties fo:font-family="OpenSymbol" style:font-family-complex="OpenSymbol"/>
    </style:style>
    <style:style style:family="text" style:name="T108">
      <style:text-properties fo:font-family="OpenSymbol" style:font-family-complex="OpenSymbol"/>
    </style:style>
    <style:style style:family="text" style:name="T109">
      <style:text-properties fo:font-family="Symbol" style:font-family-complex="Symbol"/>
    </style:style>
    <style:style style:family="text" style:name="T110">
      <style:text-properties fo:font-family="Symbol" style:font-family-complex="Symbol"/>
    </style:style>
    <style:style style:family="text" style:name="T111">
      <style:text-properties fo:font-family="Symbol" style:font-family-complex="Symbol"/>
    </style:style>
    <style:style style:family="text" style:name="T112">
      <style:text-properties fo:font-family="Symbol" style:font-family-complex="Symbol"/>
    </style:style>
    <style:style style:family="text" style:name="T113">
      <style:text-properties fo:font-family="Symbol" style:font-family-complex="Symbol"/>
    </style:style>
    <style:style style:family="text" style:name="T114">
      <style:text-properties fo:font-family="Symbol" style:font-family-complex="Symbol"/>
    </style:style>
    <style:style style:family="text" style:name="T115">
      <style:text-properties fo:font-family="Symbol" style:font-family-complex="Symbol"/>
    </style:style>
    <style:style style:family="text" style:name="T116">
      <style:text-properties fo:font-family="Symbol" style:font-family-complex="Symbol"/>
    </style:style>
    <style:style style:family="text" style:name="T117">
      <style:text-properties fo:font-family="Symbol" style:font-family-complex="Symbol"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Symbol" style:font-family-complex="Symbol"/>
    </style:style>
    <style:style style:family="text" style:name="T120">
      <style:text-properties fo:font-family="Symbol" style:font-family-complex="Symbol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Symbol" style:font-family-complex="Symbol"/>
    </style:style>
    <style:style style:family="text" style:name="T123">
      <style:text-properties fo:font-family="Symbol" style:font-family-complex="Symbol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Symbol" style:font-family-complex="Symbol"/>
    </style:style>
    <style:style style:family="text" style:name="T126">
      <style:text-properties fo:font-family="Symbol" style:font-family-complex="Symbol"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Symbol" style:font-family-complex="Symbol"/>
    </style:style>
    <style:style style:family="text" style:name="T129">
      <style:text-properties fo:font-family="Symbol" style:font-family-complex="Symbol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Symbol" style:font-family-complex="Symbol"/>
    </style:style>
    <style:style style:family="text" style:name="T132">
      <style:text-properties fo:font-family="Symbol" style:font-family-complex="Symbol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Symbol" style:font-family-complex="Symbol"/>
    </style:style>
    <style:style style:family="text" style:name="T135">
      <style:text-properties fo:font-family="Symbol" style:font-family-complex="Symbol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Symbol" style:font-family-complex="Symbol"/>
    </style:style>
    <style:style style:family="text" style:name="T138">
      <style:text-properties fo:font-family="Symbol" style:font-family-complex="Symbol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Symbol" style:font-family-complex="Symbol"/>
    </style:style>
    <style:style style:family="text" style:name="T141">
      <style:text-properties fo:font-family="Symbol" style:font-family-complex="Symbol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Symbol" style:font-family-complex="Symbol"/>
    </style:style>
    <style:style style:family="text" style:name="T144">
      <style:text-properties fo:font-family="Symbol" style:font-family-complex="Symbol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Symbol" style:font-family-complex="Symbol"/>
    </style:style>
    <style:style style:family="text" style:name="T147">
      <style:text-properties fo:font-family="Symbol" style:font-family-complex="Symbol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Symbol" style:font-family-complex="Symbol"/>
    </style:style>
    <style:style style:family="text" style:name="T150">
      <style:text-properties fo:font-family="Symbol" style:font-family-complex="Symbol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Symbol" style:font-family-complex="Symbol"/>
    </style:style>
    <style:style style:family="text" style:name="T153">
      <style:text-properties fo:font-family="Symbol" style:font-family-complex="Symbol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Symbol" style:font-family-complex="Symbol"/>
    </style:style>
    <style:style style:family="text" style:name="T156">
      <style:text-properties fo:font-family="Symbol" style:font-family-complex="Symbol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Symbol" style:font-family-complex="Symbol"/>
    </style:style>
    <style:style style:family="text" style:name="T159">
      <style:text-properties fo:font-family="Symbol" style:font-family-complex="Symbol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Symbol" style:font-family-complex="Symbol"/>
    </style:style>
    <style:style style:family="text" style:name="T162">
      <style:text-properties fo:font-family="Symbol" style:font-family-complex="Symbol"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Symbol" style:font-family-complex="Symbol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Symbol" style:font-family-complex="Symbol"/>
    </style:style>
    <style:style style:family="text" style:name="T168">
      <style:text-properties fo:font-family="Symbol" style:font-family-complex="Symbol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Symbol" style:font-family-complex="Symbol"/>
    </style:style>
    <style:style style:family="text" style:name="T171">
      <style:text-properties fo:font-family="Symbol" style:font-family-complex="Symbol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Symbol" style:font-family-complex="Symbol"/>
    </style:style>
    <style:style style:family="text" style:name="T174">
      <style:text-properties fo:font-family="Symbol" style:font-family-complex="Symbol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Symbol" style:font-family-complex="Symbol"/>
    </style:style>
    <style:style style:family="text" style:name="T177">
      <style:text-properties fo:font-family="Symbol" style:font-family-complex="Symbol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Symbol" style:font-family-complex="Symbol"/>
    </style:style>
    <style:style style:family="text" style:name="T180">
      <style:text-properties fo:font-family="Symbol" style:font-family-complex="Symbol"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Symbol" style:font-family-complex="Symbol"/>
    </style:style>
    <style:style style:family="text" style:name="T183">
      <style:text-properties fo:font-family="Symbol" style:font-family-complex="Symbol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Symbol" style:font-family-complex="Symbol"/>
    </style:style>
    <style:style style:family="text" style:name="T186">
      <style:text-properties fo:font-family="Symbol" style:font-family-complex="Symbol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Symbol" style:font-family-complex="Symbol"/>
    </style:style>
    <style:style style:family="text" style:name="T189">
      <style:text-properties fo:font-family="Symbol" style:font-family-complex="Symbol"/>
    </style:style>
    <style:style style:family="text" style:name="T190">
      <style:text-properties fo:font-family="Symbol" style:font-family-complex="Symbol"/>
    </style:style>
    <style:style style:family="text" style:name="T191">
      <style:text-properties fo:font-family="Symbol" style:font-family-complex="Symbol"/>
    </style:style>
    <style:style style:family="text" style:name="T192">
      <style:text-properties fo:font-family="Symbol" style:font-family-complex="Symbol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Symbol" style:font-family-complex="Symbol"/>
    </style:style>
    <style:style style:family="text" style:name="T195">
      <style:text-properties fo:font-family="Symbol" style:font-family-complex="Symbol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Symbol" style:font-family-complex="Symbol"/>
    </style:style>
    <style:style style:family="text" style:name="T198">
      <style:text-properties fo:font-family="Symbol" style:font-family-complex="Symbol"/>
    </style:style>
    <style:style style:family="text" style:name="T199">
      <style:text-properties fo:font-family="Symbol" style:font-family-complex="Symbol"/>
    </style:style>
    <style:style style:family="text" style:name="T200">
      <style:text-properties fo:font-family="Symbol" style:font-family-complex="Symbol"/>
    </style:style>
    <style:style style:family="text" style:name="T201">
      <style:text-properties fo:font-family="Symbol" style:font-family-complex="Symbol"/>
    </style:style>
    <style:style style:family="text" style:name="T202">
      <style:text-properties fo:font-family="Symbol" style:font-family-complex="Symbol"/>
    </style:style>
    <style:style style:family="text" style:name="T203">
      <style:text-properties fo:font-family="Symbol" style:font-family-complex="Symbol"/>
    </style:style>
    <style:style style:family="text" style:name="T204">
      <style:text-properties fo:font-family="Symbol" style:font-family-complex="Symbol"/>
    </style:style>
    <style:style style:family="text" style:name="T205">
      <style:text-properties fo:font-family="Symbol" style:font-family-complex="Symbol"/>
    </style:style>
    <style:style style:family="text" style:name="T206">
      <style:text-properties fo:font-family="Symbol" style:font-family-complex="Symbol"/>
    </style:style>
    <style:style style:family="text" style:name="T207">
      <style:text-properties fo:font-family="Symbol" style:font-family-complex="Symbol"/>
    </style:style>
    <style:style style:family="text" style:name="T208">
      <style:text-properties fo:font-family="Symbol" style:font-family-complex="Symbol"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 fo:font-family="Symbol" style:font-family-complex="Symbol"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 fo:font-family="Symbol" style:font-family-complex="Symbol"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 fo:font-family="Symbol" style:font-family-complex="Symbol"/>
    </style:style>
    <style:style style:family="text" style:name="T236">
      <style:text-properties fo:font-family="OpenSymbol" style:font-family-complex="OpenSymbol"/>
    </style:style>
    <style:style style:family="text" style:name="T237">
      <style:text-properties fo:font-family="OpenSymbol" style:font-family-complex="OpenSymbol"/>
    </style:style>
    <style:style style:family="text" style:name="T238">
      <style:text-properties fo:font-family="Symbol" style:font-family-complex="Symbol"/>
    </style:style>
    <style:style style:family="text" style:name="T239">
      <style:text-properties fo:font-family="OpenSymbol" style:font-family-complex="OpenSymbol"/>
    </style:style>
    <style:style style:family="text" style:name="T240">
      <style:text-properties fo:font-family="OpenSymbol" style:font-family-complex="OpenSymbol"/>
    </style:style>
    <style:style style:family="text" style:name="T241">
      <style:text-properties fo:font-family="Symbol" style:font-family-complex="Symbol"/>
    </style:style>
    <style:style style:family="text" style:name="T242">
      <style:text-properties fo:font-family="OpenSymbol" style:font-family-complex="OpenSymbol"/>
    </style:style>
    <style:style style:family="text" style:name="T243">
      <style:text-properties fo:font-family="OpenSymbol" style:font-family-complex="OpenSymbol"/>
    </style:style>
    <style:style style:family="text" style:name="T244">
      <style:text-properties fo:font-family="Symbol" style:font-family-complex="Symbol"/>
    </style:style>
    <style:style style:family="text" style:name="T245">
      <style:text-properties fo:font-family="OpenSymbol" style:font-family-complex="OpenSymbol"/>
    </style:style>
    <style:style style:family="text" style:name="T246">
      <style:text-properties fo:font-family="OpenSymbol" style:font-family-complex="OpenSymbol"/>
    </style:style>
    <style:style style:family="text" style:name="T247">
      <style:text-properties fo:font-family="Symbol" style:font-family-complex="Symbol"/>
    </style:style>
    <style:style style:family="text" style:name="T248">
      <style:text-properties fo:font-family="OpenSymbol" style:font-family-complex="OpenSymbol"/>
    </style:style>
    <style:style style:family="text" style:name="T249">
      <style:text-properties fo:font-family="OpenSymbol" style:font-family-complex="OpenSymbol"/>
    </style:style>
    <style:style style:family="text" style:name="T250">
      <style:text-properties fo:font-family="Symbol" style:font-family-complex="Symbol"/>
    </style:style>
    <style:style style:family="text" style:name="T251">
      <style:text-properties fo:font-family="OpenSymbol" style:font-family-complex="OpenSymbol"/>
    </style:style>
    <style:style style:family="text" style:name="T252">
      <style:text-properties fo:font-family="OpenSymbol" style:font-family-complex="OpenSymbol"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 fo:font-family="Symbol" style:font-family-complex="Symbol"/>
    </style:style>
    <style:style style:family="text" style:name="T299">
      <style:text-properties fo:font-family="Courier New" style:font-family-complex="Courier New"/>
    </style:style>
    <style:style style:family="text" style:name="T300">
      <style:text-properties fo:font-family="Wingdings" style:font-family-complex="Wingdings"/>
    </style:style>
    <style:style style:family="text" style:name="T301">
      <style:text-properties fo:font-family="Symbol" style:font-family-complex="Symbol"/>
    </style:style>
    <style:style style:family="text" style:name="T302">
      <style:text-properties fo:font-family="Courier New" style:font-family-complex="Courier New"/>
    </style:style>
    <style:style style:family="text" style:name="T303">
      <style:text-properties fo:font-family="Wingdings" style:font-family-complex="Wingdings"/>
    </style:style>
    <style:style style:family="text" style:name="T304">
      <style:text-properties fo:font-family="Symbol" style:font-family-complex="Symbol"/>
    </style:style>
    <style:style style:family="text" style:name="T305">
      <style:text-properties fo:font-family="Courier New" style:font-family-complex="Courier New"/>
    </style:style>
    <style:style style:family="text" style:name="T306">
      <style:text-properties fo:font-family="Wingdings" style:font-family-complex="Wingdings"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/>
    </style:style>
    <style:style style:family="text" style:name="T312">
      <style:text-properties/>
    </style:style>
    <style:style style:family="text" style:name="T313">
      <style:text-properties/>
    </style:style>
    <style:style style:family="text" style:name="T314">
      <style:text-properties/>
    </style:style>
    <style:style style:family="text" style:name="T315">
      <style:text-properties/>
    </style:style>
    <style:style style:family="text" style:name="T316">
      <style:text-properties fo:color="#000000" fo:font-family="Symbol" style:font-family-complex="Symbol" fo:font-size="10pt"/>
    </style:style>
    <style:style style:family="text" style:name="T317">
      <style:text-properties fo:color="#000000" fo:font-family="Symbol" style:font-family-complex="Symbol" fo:font-size="10pt"/>
    </style:style>
    <style:style style:family="text" style:name="T318">
      <style:text-properties fo:color="#000000" fo:font-family="Symbol" style:font-family-complex="Symbol" fo:font-size="10pt"/>
    </style:style>
    <style:style style:family="text" style:name="T319">
      <style:text-properties fo:color="#000000" fo:font-family="Symbol" style:font-family-complex="Symbol" fo:font-size="10pt"/>
    </style:style>
    <style:style style:family="text" style:name="T320">
      <style:text-properties fo:color="#000000" fo:font-family="Symbol" style:font-family-complex="Symbol" fo:font-size="10pt"/>
    </style:style>
    <style:style style:family="text" style:name="T321">
      <style:text-properties fo:color="#000000" fo:font-family="Symbol" style:font-family-complex="Symbol" fo:font-size="10pt"/>
    </style:style>
    <style:style style:family="text" style:name="T322">
      <style:text-properties fo:color="#000000" fo:font-family="Symbol" style:font-family-complex="Symbol" fo:font-size="10pt"/>
    </style:style>
    <style:style style:family="text" style:name="T323">
      <style:text-properties fo:color="#000000" fo:font-family="Symbol" style:font-family-complex="Symbol" fo:font-size="10pt"/>
    </style:style>
    <style:style style:family="text" style:name="T324">
      <style:text-properties fo:color="#000000" fo:font-family="Symbol" style:font-family-complex="Symbol" fo:font-size="10pt"/>
    </style:style>
    <style:style style:family="text" style:name="T325">
      <style:text-properties fo:color="#000000" fo:font-family="Symbol" style:font-family-complex="Symbol" fo:font-size="10pt"/>
    </style:style>
    <style:style style:family="text" style:name="T326">
      <style:text-properties fo:color="#000000" fo:font-family="Symbol" style:font-family-complex="Symbol" fo:font-size="10pt"/>
    </style:style>
    <style:style style:family="text" style:name="T327">
      <style:text-properties fo:color="#000000" fo:font-family="Symbol" style:font-family-complex="Symbol" fo:font-size="10pt"/>
    </style:style>
    <style:style style:family="text" style:name="T328">
      <style:text-properties fo:color="#000000" fo:font-family="Symbol" style:font-family-complex="Symbol" fo:font-size="10pt"/>
    </style:style>
    <style:style style:family="text" style:name="T329">
      <style:text-properties fo:color="#000000" fo:font-family="Symbol" style:font-family-complex="Symbol" fo:font-size="10pt"/>
    </style:style>
    <style:style style:family="text" style:name="T330">
      <style:text-properties fo:color="#000000" fo:font-family="Symbol" style:font-family-complex="Symbol" fo:font-size="10pt"/>
    </style:style>
    <style:style style:family="text" style:name="T331">
      <style:text-properties fo:color="#000000" fo:font-family="Symbol" style:font-family-complex="Symbol" fo:font-size="10pt"/>
    </style:style>
    <style:style style:family="text" style:name="T332">
      <style:text-properties fo:color="#000000" fo:font-family="Symbol" style:font-family-complex="Symbol" fo:font-size="10pt"/>
    </style:style>
    <style:style style:family="text" style:name="T333">
      <style:text-properties fo:color="#000000" fo:font-family="Symbol" style:font-family-complex="Symbol" fo:font-size="10pt"/>
    </style:style>
    <style:style style:family="text" style:name="T334">
      <style:text-properties fo:color="#000000" fo:font-family="Symbol" style:font-family-complex="Symbol" fo:font-size="10pt"/>
    </style:style>
    <style:style style:family="text" style:name="T335">
      <style:text-properties fo:color="#000000" fo:font-family="Symbol" style:font-family-complex="Symbol" fo:font-size="10pt"/>
    </style:style>
    <style:style style:family="text" style:name="T336">
      <style:text-properties fo:color="#000000" fo:font-family="Symbol" style:font-family-complex="Symbol" fo:font-size="10pt"/>
    </style:style>
    <style:style style:family="text" style:name="T337">
      <style:text-properties fo:color="#000000" fo:font-family="Symbol" style:font-family-complex="Symbol" fo:font-size="10pt"/>
    </style:style>
    <style:style style:family="text" style:name="T338">
      <style:text-properties fo:color="#000000" fo:font-family="Symbol" style:font-family-complex="Symbol" fo:font-size="10pt"/>
    </style:style>
    <style:style style:family="text" style:name="T339">
      <style:text-properties fo:color="#000000" fo:font-family="Symbol" style:font-family-complex="Symbol" fo:font-size="10pt"/>
    </style:style>
    <style:style style:family="text" style:name="T340">
      <style:text-properties fo:color="#000000" fo:font-family="Symbol" style:font-family-complex="Symbol" fo:font-size="10pt"/>
    </style:style>
    <style:style style:family="text" style:name="T341">
      <style:text-properties fo:color="#000000" fo:font-family="Symbol" style:font-family-complex="Symbol" fo:font-size="10pt"/>
    </style:style>
    <style:style style:family="text" style:name="T342">
      <style:text-properties fo:color="#000000" fo:font-family="Symbol" style:font-family-complex="Symbol" fo:font-size="10pt"/>
    </style:style>
    <style:style style:family="text" style:name="T343">
      <style:text-properties fo:color="#000000" fo:font-family="Symbol" style:font-family-complex="Symbol" fo:font-size="10pt"/>
    </style:style>
    <style:style style:family="text" style:name="T344">
      <style:text-properties fo:color="#000000" fo:font-family="Symbol" style:font-family-complex="Symbol" fo:font-size="10pt"/>
    </style:style>
    <style:style style:family="text" style:name="T345">
      <style:text-properties fo:color="#000000" fo:font-family="Symbol" style:font-family-complex="Symbol" fo:font-size="10pt"/>
    </style:style>
    <style:style style:family="text" style:name="T346">
      <style:text-properties fo:color="#000000" fo:font-family="Symbol" style:font-family-complex="Symbol" fo:font-size="10pt"/>
    </style:style>
    <style:style style:family="text" style:name="T347">
      <style:text-properties fo:color="#000000" fo:font-family="Symbol" style:font-family-complex="Symbol" fo:font-size="10pt"/>
    </style:style>
    <style:style style:family="text" style:name="T348">
      <style:text-properties fo:color="#000000" fo:font-family="Symbol" style:font-family-complex="Symbol" fo:font-size="10pt"/>
    </style:style>
    <style:style style:family="text" style:name="T349">
      <style:text-properties fo:color="#000000" fo:font-family="Symbol" style:font-family-complex="Symbol" fo:font-size="10pt"/>
    </style:style>
    <style:style style:family="text" style:name="T350">
      <style:text-properties fo:color="#000000" fo:font-family="Symbol" style:font-family-complex="Symbol" fo:font-size="10pt"/>
    </style:style>
    <style:style style:family="text" style:name="T351">
      <style:text-properties fo:color="#000000" fo:font-family="Symbol" style:font-family-complex="Symbol" fo:font-size="10pt"/>
    </style:style>
    <style:style style:family="text" style:name="T352">
      <style:text-properties fo:color="#000000" fo:font-family="Symbol" style:font-family-complex="Symbol" fo:font-size="10pt"/>
    </style:style>
    <style:style style:family="text" style:name="T353">
      <style:text-properties fo:color="#000000" fo:font-family="Symbol" style:font-family-complex="Symbol" fo:font-size="10pt"/>
    </style:style>
    <style:style style:family="text" style:name="T354">
      <style:text-properties fo:color="#000000" fo:font-family="Symbol" style:font-family-complex="Symbol" fo:font-size="10pt"/>
    </style:style>
    <style:style style:family="text" style:name="T355">
      <style:text-properties fo:color="#000000" fo:font-family="Symbol" style:font-family-complex="Symbol" fo:font-size="10pt"/>
    </style:style>
    <style:style style:family="text" style:name="T356">
      <style:text-properties fo:color="#000000" fo:font-family="Symbol" style:font-family-complex="Symbol" fo:font-size="10pt"/>
    </style:style>
    <style:style style:family="text" style:name="T357">
      <style:text-properties fo:color="#000000" fo:font-family="Symbol" style:font-family-complex="Symbol" fo:font-size="10pt"/>
    </style:style>
    <style:style style:family="text" style:name="T358">
      <style:text-properties fo:color="#000000" fo:font-family="Symbol" style:font-family-complex="Symbol" fo:font-size="10pt"/>
    </style:style>
    <style:style style:family="text" style:name="T359">
      <style:text-properties fo:color="#000000" fo:font-family="Symbol" style:font-family-complex="Symbol" fo:font-size="10pt"/>
    </style:style>
    <style:style style:family="text" style:name="T360">
      <style:text-properties fo:color="#000000" fo:font-family="Symbol" style:font-family-complex="Symbol" fo:font-size="10pt"/>
    </style:style>
    <style:style style:family="text" style:name="T361">
      <style:text-properties fo:color="#000000" fo:font-family="Symbol" style:font-family-complex="Symbol" fo:font-size="10pt"/>
    </style:style>
    <style:style style:family="text" style:name="T362">
      <style:text-properties fo:color="#000000" fo:font-family="Symbol" style:font-family-complex="Symbol" fo:font-size="10pt"/>
    </style:style>
    <style:style style:family="text" style:name="T363">
      <style:text-properties fo:color="#000000" fo:font-family="Symbol" style:font-family-complex="Symbol" fo:font-size="10pt"/>
    </style:style>
    <style:style style:family="text" style:name="T364">
      <style:text-properties fo:color="#000000" fo:font-family="Symbol" style:font-family-complex="Symbol" fo:font-size="10pt"/>
    </style:style>
    <style:style style:family="text" style:name="T365">
      <style:text-properties fo:color="#000000" fo:font-family="Symbol" style:font-family-complex="Symbol" fo:font-size="10pt"/>
    </style:style>
    <style:style style:family="text" style:name="T366">
      <style:text-properties fo:color="#000000" fo:font-family="Symbol" style:font-family-complex="Symbol" fo:font-size="10pt"/>
    </style:style>
    <style:style style:family="text" style:name="T367">
      <style:text-properties fo:color="#000000" fo:font-family="Symbol" style:font-family-complex="Symbol" fo:font-size="10pt"/>
    </style:style>
    <style:style style:family="text" style:name="T368">
      <style:text-properties fo:color="#000000" fo:font-family="Symbol" style:font-family-complex="Symbol" fo:font-size="10pt"/>
    </style:style>
    <style:style style:family="text" style:name="T369">
      <style:text-properties fo:color="#000000" fo:font-family="Symbol" style:font-family-complex="Symbol" fo:font-size="10pt"/>
    </style:style>
    <style:style style:family="text" style:name="T370">
      <style:text-properties fo:color="#000000" fo:font-family="Symbol" style:font-family-complex="Symbol" fo:font-size="10pt"/>
    </style:style>
    <style:style style:family="text" style:name="T371">
      <style:text-properties fo:color="#000000" fo:font-family="Symbol" style:font-family-complex="Symbol" fo:font-size="10pt"/>
    </style:style>
    <style:style style:family="text" style:name="T372">
      <style:text-properties fo:color="#000000" fo:font-family="Symbol" style:font-family-complex="Symbol" fo:font-size="10pt"/>
    </style:style>
    <style:style style:family="text" style:name="T373">
      <style:text-properties fo:color="#000000" fo:font-family="Symbol" style:font-family-complex="Symbol" fo:font-size="10pt"/>
    </style:style>
    <style:style style:family="text" style:name="T374">
      <style:text-properties fo:color="#000000" fo:font-family="Symbol" style:font-family-complex="Symbol" fo:font-size="10pt"/>
    </style:style>
    <style:style style:family="text" style:name="T375">
      <style:text-properties fo:color="#000000" fo:font-family="Symbol" style:font-family-complex="Symbol" fo:font-size="10pt"/>
    </style:style>
    <style:style style:family="text" style:name="T376">
      <style:text-properties fo:color="#000000" fo:font-family="Symbol" style:font-family-complex="Symbol" fo:font-size="10pt"/>
    </style:style>
    <style:style style:family="text" style:name="T377">
      <style:text-properties fo:color="#000000" fo:font-family="Symbol" style:font-family-complex="Symbol" fo:font-size="10pt"/>
    </style:style>
    <style:style style:family="text" style:name="T378">
      <style:text-properties fo:color="#000000" fo:font-family="Symbol" style:font-family-complex="Symbol" fo:font-size="10pt"/>
    </style:style>
    <style:style style:family="text" style:name="T379">
      <style:text-properties fo:font-family="Symbol" style:font-family-complex="Symbol"/>
    </style:style>
    <style:style style:family="text" style:name="T380">
      <style:text-properties fo:font-family="Symbol" style:font-family-complex="Symbol"/>
    </style:style>
    <style:style style:family="text" style:name="T381">
      <style:text-properties fo:font-family="Symbol" style:font-family-complex="Symbol"/>
    </style:style>
    <style:style style:family="text" style:name="T382">
      <style:text-properties fo:font-family="Symbol" style:font-family-complex="Symbol"/>
    </style:style>
    <style:style style:family="text" style:name="T383">
      <style:text-properties fo:font-family="Symbol" style:font-family-complex="Symbol"/>
    </style:style>
    <style:style style:family="text" style:name="T384">
      <style:text-properties fo:font-family="Symbol" style:font-family-complex="Symbol"/>
    </style:style>
    <style:style style:family="text" style:name="T385">
      <style:text-properties fo:font-family="Symbol" style:font-family-complex="Symbol"/>
    </style:style>
    <style:style style:family="text" style:name="T386">
      <style:text-properties fo:font-family="Symbol" style:font-family-complex="Symbol"/>
    </style:style>
    <style:style style:family="text" style:name="T387">
      <style:text-properties fo:font-family="Symbol" style:font-family-complex="Symbol"/>
    </style:style>
    <style:style style:family="text" style:name="T388">
      <style:text-properties fo:font-family="Symbol" style:font-family-complex="Symbol"/>
    </style:style>
    <style:style style:family="text" style:name="T389">
      <style:text-properties fo:font-family="Symbol" style:font-family-complex="Symbol"/>
    </style:style>
    <style:style style:family="text" style:name="T390">
      <style:text-properties fo:font-family="Symbol" style:font-family-complex="Symbol"/>
    </style:style>
    <style:style style:family="text" style:name="T391">
      <style:text-properties fo:font-family="Symbol" style:font-family-complex="Symbol"/>
    </style:style>
    <style:style style:family="text" style:name="T392">
      <style:text-properties fo:font-family="Symbol" style:font-family-complex="Symbol"/>
    </style:style>
    <style:style style:family="text" style:name="T393">
      <style:text-properties fo:font-family="Symbol" style:font-family-complex="Symbol"/>
    </style:style>
    <style:style style:family="text" style:name="T394">
      <style:text-properties fo:font-family="Symbol" style:font-family-complex="Symbol"/>
    </style:style>
    <style:style style:family="text" style:name="T395">
      <style:text-properties fo:font-family="Symbol" style:font-family-complex="Symbol"/>
    </style:style>
    <style:style style:family="text" style:name="T396">
      <style:text-properties fo:font-family="Symbol" style:font-family-complex="Symbol"/>
    </style:style>
    <style:style style:family="text" style:name="T397">
      <style:text-properties fo:color="#000000" fo:font-family="Times New Roman" style:font-family-complex="Times New Roman" fo:font-size="12pt"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00">
      <style:text-properties/>
    </style:style>
    <style:style style:family="text" style:name="T401">
      <style:text-properties/>
    </style:style>
    <style:style style:family="text" style:name="T402">
      <style:text-properties/>
    </style:style>
    <style:style style:family="text" style:name="T403">
      <style:text-properties/>
    </style:style>
    <style:style style:family="text" style:name="T404">
      <style:text-properties/>
    </style:style>
    <style:style style:family="text" style:name="T405">
      <style:text-properties/>
    </style:style>
    <style:style style:family="text" style:name="T406">
      <style:text-properties fo:color="#000000" fo:font-family="Symbol" style:font-family-complex="Symbol" fo:font-size="10pt"/>
    </style:style>
    <style:style style:family="text" style:name="T407">
      <style:text-properties fo:color="#000000" fo:font-family="Symbol" style:font-family-complex="Symbol" fo:font-size="10pt"/>
    </style:style>
    <style:style style:family="text" style:name="T408">
      <style:text-properties fo:color="#000000" fo:font-family="Symbol" style:font-family-complex="Symbol" fo:font-size="10pt"/>
    </style:style>
    <style:style style:family="text" style:name="T409">
      <style:text-properties fo:color="#000000" fo:font-family="Symbol" style:font-family-complex="Symbol" fo:font-size="10pt"/>
    </style:style>
    <style:style style:family="text" style:name="T410">
      <style:text-properties fo:color="#000000" fo:font-family="Symbol" style:font-family-complex="Symbol" fo:font-size="10pt"/>
    </style:style>
    <style:style style:family="text" style:name="T411">
      <style:text-properties fo:color="#000000" fo:font-family="Symbol" style:font-family-complex="Symbol" fo:font-size="10pt"/>
    </style:style>
    <style:style style:family="text" style:name="T412">
      <style:text-properties fo:color="#000000" fo:font-family="Symbol" style:font-family-complex="Symbol" fo:font-size="10pt"/>
    </style:style>
    <style:style style:family="text" style:name="T413">
      <style:text-properties fo:color="#000000" fo:font-family="Symbol" style:font-family-complex="Symbol" fo:font-size="10pt"/>
    </style:style>
    <style:style style:family="text" style:name="T414">
      <style:text-properties fo:color="#000000" fo:font-family="Symbol" style:font-family-complex="Symbol" fo:font-size="10pt"/>
    </style:style>
    <style:style style:family="text" style:name="T415">
      <style:text-properties fo:color="#000000" fo:font-family="Times New Roman" style:font-family-complex="Times New Roman" fo:font-size="12pt"/>
    </style:style>
    <style:style style:family="text" style:name="T416">
      <style:text-properties/>
    </style:style>
    <style:style style:family="text" style:name="T417">
      <style:text-properties/>
    </style:style>
    <style:style style:family="text" style:name="T418">
      <style:text-properties/>
    </style:style>
    <style:style style:family="text" style:name="T419">
      <style:text-properties/>
    </style:style>
    <style:style style:family="text" style:name="T420">
      <style:text-properties/>
    </style:style>
    <style:style style:family="text" style:name="T421">
      <style:text-properties/>
    </style:style>
    <style:style style:family="text" style:name="T422">
      <style:text-properties/>
    </style:style>
    <style:style style:family="text" style:name="T423">
      <style:text-properties/>
    </style:style>
    <style:style style:family="text" style:name="T424">
      <style:text-properties fo:font-family="Symbol" style:font-family-complex="Symbol"/>
    </style:style>
    <style:style style:family="text" style:name="T425">
      <style:text-properties fo:font-family="Symbol" style:font-family-complex="Symbol"/>
    </style:style>
    <style:style style:family="text" style:name="T426">
      <style:text-properties fo:font-family="Symbol" style:font-family-complex="Symbol"/>
    </style:style>
    <style:style style:family="text" style:name="T427">
      <style:text-properties fo:font-family="Symbol" style:font-family-complex="Symbol"/>
    </style:style>
    <style:style style:family="text" style:name="T428">
      <style:text-properties fo:font-family="Symbol" style:font-family-complex="Symbol"/>
    </style:style>
    <style:style style:family="text" style:name="T429">
      <style:text-properties fo:font-family="Symbol" style:font-family-complex="Symbol"/>
    </style:style>
    <style:style style:family="text" style:name="T430">
      <style:text-properties fo:font-family="Symbol" style:font-family-complex="Symbol"/>
    </style:style>
    <style:style style:family="text" style:name="T431">
      <style:text-properties fo:font-family="Symbol" style:font-family-complex="Symbol"/>
    </style:style>
    <style:style style:family="text" style:name="T432">
      <style:text-properties fo:font-family="Symbol" style:font-family-complex="Symbol"/>
    </style:style>
    <style:style style:family="text" style:name="T433">
      <style:text-properties fo:color="#000000" fo:font-family="Times New Roman" style:font-family-complex="Times New Roman" fo:font-size="12pt"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style:style style:family="text" style:name="T442">
      <style:text-properties fo:font-family="Symbol" style:font-family-complex="Symbol"/>
    </style:style>
    <style:style style:family="text" style:name="T443">
      <style:text-properties fo:font-family="Symbol" style:font-family-complex="Symbol"/>
    </style:style>
    <style:style style:family="text" style:name="T444">
      <style:text-properties fo:font-family="Symbol" style:font-family-complex="Symbol"/>
    </style:style>
    <style:style style:family="text" style:name="T445">
      <style:text-properties fo:font-family="Symbol" style:font-family-complex="Symbol"/>
    </style:style>
    <style:style style:family="text" style:name="T446">
      <style:text-properties fo:font-family="Symbol" style:font-family-complex="Symbol"/>
    </style:style>
    <style:style style:family="text" style:name="T447">
      <style:text-properties fo:font-family="Symbol" style:font-family-complex="Symbol"/>
    </style:style>
    <style:style style:family="text" style:name="T448">
      <style:text-properties fo:font-family="Symbol" style:font-family-complex="Symbol"/>
    </style:style>
    <style:style style:family="text" style:name="T449">
      <style:text-properties fo:font-family="Symbol" style:font-family-complex="Symbol"/>
    </style:style>
    <style:style style:family="text" style:name="T450">
      <style:text-properties fo:font-family="Symbol" style:font-family-complex="Symbol"/>
    </style:style>
    <style:style style:family="text" style:name="T451">
      <style:text-properties fo:color="#000000" fo:font-family="Times New Roman" style:font-family-complex="Times New Roman" fo:font-size="12pt"/>
    </style:style>
    <style:style style:family="text" style:name="T452">
      <style:text-properties/>
    </style:style>
    <style:style style:family="text" style:name="T453">
      <style:text-properties/>
    </style:style>
    <style:style style:family="text" style:name="T454">
      <style:text-properties/>
    </style:style>
    <style:style style:family="text" style:name="T455">
      <style:text-properties/>
    </style:style>
    <style:style style:family="text" style:name="T456">
      <style:text-properties/>
    </style:style>
    <style:style style:family="text" style:name="T457">
      <style:text-properties/>
    </style:style>
    <style:style style:family="text" style:name="T458">
      <style:text-properties/>
    </style:style>
    <style:style style:family="text" style:name="T459">
      <style:text-properties/>
    </style:style>
    <style:style style:family="text" style:name="T460">
      <style:text-properties fo:font-family="Symbol" style:font-family-complex="Symbol"/>
    </style:style>
    <style:style style:family="text" style:name="T461">
      <style:text-properties fo:font-family="Symbol" style:font-family-complex="Symbol"/>
    </style:style>
    <style:style style:family="text" style:name="T462">
      <style:text-properties fo:font-family="Symbol" style:font-family-complex="Symbol"/>
    </style:style>
    <style:style style:family="text" style:name="T463">
      <style:text-properties fo:font-family="Symbol" style:font-family-complex="Symbol"/>
    </style:style>
    <style:style style:family="text" style:name="T464">
      <style:text-properties fo:font-family="Symbol" style:font-family-complex="Symbol"/>
    </style:style>
    <style:style style:family="text" style:name="T465">
      <style:text-properties fo:font-family="Symbol" style:font-family-complex="Symbol"/>
    </style:style>
    <style:style style:family="text" style:name="T466">
      <style:text-properties fo:font-family="Symbol" style:font-family-complex="Symbol"/>
    </style:style>
    <style:style style:family="text" style:name="T467">
      <style:text-properties fo:font-family="Symbol" style:font-family-complex="Symbol"/>
    </style:style>
    <style:style style:family="text" style:name="T468">
      <style:text-properties fo:font-family="Symbol" style:font-family-complex="Symbol"/>
    </style:style>
    <style:style style:family="text" style:name="T469">
      <style:text-properties fo:font-family="Symbol" style:font-family-complex="Symbol"/>
    </style:style>
    <style:style style:family="text" style:name="T470">
      <style:text-properties fo:font-family="Symbol" style:font-family-complex="Symbol"/>
    </style:style>
    <style:style style:family="text" style:name="T471">
      <style:text-properties fo:font-family="Symbol" style:font-family-complex="Symbol"/>
    </style:style>
    <style:style style:family="text" style:name="T472">
      <style:text-properties fo:font-family="Symbol" style:font-family-complex="Symbol"/>
    </style:style>
    <style:style style:family="text" style:name="T473">
      <style:text-properties fo:font-family="Symbol" style:font-family-complex="Symbol"/>
    </style:style>
    <style:style style:family="text" style:name="T474">
      <style:text-properties fo:font-family="Symbol" style:font-family-complex="Symbol"/>
    </style:style>
    <style:style style:family="text" style:name="T475">
      <style:text-properties fo:font-family="Symbol" style:font-family-complex="Symbol"/>
    </style:style>
    <style:style style:family="text" style:name="T476">
      <style:text-properties fo:font-family="Symbol" style:font-family-complex="Symbol"/>
    </style:style>
    <style:style style:family="text" style:name="T477">
      <style:text-properties fo:font-family="Symbol" style:font-family-complex="Symbol"/>
    </style:style>
    <style:style style:family="text" style:name="T478">
      <style:text-properties fo:color="#000000" fo:font-family="Symbol" style:font-family-complex="Symbol" fo:font-size="10pt"/>
    </style:style>
    <style:style style:family="text" style:name="T479">
      <style:text-properties fo:color="#000000" fo:font-family="Symbol" style:font-family-complex="Symbol" fo:font-size="10pt"/>
    </style:style>
    <style:style style:family="text" style:name="T480">
      <style:text-properties fo:color="#000000" fo:font-family="Symbol" style:font-family-complex="Symbol" fo:font-size="10pt"/>
    </style:style>
    <style:style style:family="text" style:name="T481">
      <style:text-properties fo:color="#000000" fo:font-family="Symbol" style:font-family-complex="Symbol" fo:font-size="10pt"/>
    </style:style>
    <style:style style:family="text" style:name="T482">
      <style:text-properties fo:color="#000000" fo:font-family="Symbol" style:font-family-complex="Symbol" fo:font-size="10pt"/>
    </style:style>
    <style:style style:family="text" style:name="T483">
      <style:text-properties fo:color="#000000" fo:font-family="Symbol" style:font-family-complex="Symbol" fo:font-size="10pt"/>
    </style:style>
    <style:style style:family="text" style:name="T484">
      <style:text-properties fo:color="#000000" fo:font-family="Symbol" style:font-family-complex="Symbol" fo:font-size="10pt"/>
    </style:style>
    <style:style style:family="text" style:name="T485">
      <style:text-properties fo:color="#000000" fo:font-family="Symbol" style:font-family-complex="Symbol" fo:font-size="10pt"/>
    </style:style>
    <style:style style:family="text" style:name="T486">
      <style:text-properties fo:color="#000000" fo:font-family="Symbol" style:font-family-complex="Symbol" fo:font-size="10pt"/>
    </style:style>
    <style:style style:family="text" style:name="T487">
      <style:text-properties fo:color="#000000" fo:font-family="Symbol" style:font-family-complex="Symbol" fo:font-size="10pt"/>
    </style:style>
    <style:style style:family="text" style:name="T488">
      <style:text-properties fo:color="#000000" fo:font-family="Symbol" style:font-family-complex="Symbol" fo:font-size="10pt"/>
    </style:style>
    <style:style style:family="text" style:name="T489">
      <style:text-properties fo:color="#000000" fo:font-family="Symbol" style:font-family-complex="Symbol" fo:font-size="10pt"/>
    </style:style>
    <style:style style:family="text" style:name="T490">
      <style:text-properties fo:color="#000000" fo:font-family="Symbol" style:font-family-complex="Symbol" fo:font-size="10pt"/>
    </style:style>
    <style:style style:family="text" style:name="T491">
      <style:text-properties fo:color="#000000" fo:font-family="Symbol" style:font-family-complex="Symbol" fo:font-size="10pt"/>
    </style:style>
    <style:style style:family="text" style:name="T492">
      <style:text-properties fo:color="#000000" fo:font-family="Symbol" style:font-family-complex="Symbol" fo:font-size="10pt"/>
    </style:style>
    <style:style style:family="text" style:name="T493">
      <style:text-properties fo:color="#000000" fo:font-family="Symbol" style:font-family-complex="Symbol" fo:font-size="10pt"/>
    </style:style>
    <style:style style:family="text" style:name="T494">
      <style:text-properties fo:color="#000000" fo:font-family="Symbol" style:font-family-complex="Symbol" fo:font-size="10pt"/>
    </style:style>
    <style:style style:family="text" style:name="T495">
      <style:text-properties fo:color="#000000" fo:font-family="Symbol" style:font-family-complex="Symbol" fo:font-size="10pt"/>
    </style:style>
    <style:style style:family="text" style:name="T496">
      <style:text-properties fo:font-family="Symbol" style:font-family-complex="Symbol"/>
    </style:style>
    <style:style style:family="text" style:name="T497">
      <style:text-properties fo:font-family="Courier New" style:font-family-complex="Courier New"/>
    </style:style>
    <style:style style:family="text" style:name="T498">
      <style:text-properties fo:font-family="Wingdings" style:font-family-complex="Wingdings"/>
    </style:style>
    <style:style style:family="text" style:name="T499">
      <style:text-properties fo:font-family="Symbol" style:font-family-complex="Symbol"/>
    </style:style>
    <style:style style:family="text" style:name="T500">
      <style:text-properties fo:font-family="Courier New" style:font-family-complex="Courier New"/>
    </style:style>
    <style:style style:family="text" style:name="T501">
      <style:text-properties fo:font-family="Wingdings" style:font-family-complex="Wingdings"/>
    </style:style>
    <style:style style:family="text" style:name="T502">
      <style:text-properties fo:font-family="Symbol" style:font-family-complex="Symbol"/>
    </style:style>
    <style:style style:family="text" style:name="T503">
      <style:text-properties fo:font-family="Courier New" style:font-family-complex="Courier New"/>
    </style:style>
    <style:style style:family="text" style:name="T504">
      <style:text-properties fo:font-family="Wingdings" style:font-family-complex="Wingdings"/>
    </style:style>
    <style:style style:family="text" style:name="T505">
      <style:text-properties fo:color="#000000" fo:font-family="Symbol" style:font-family-complex="Symbol" fo:font-size="10pt"/>
    </style:style>
    <style:style style:family="text" style:name="T506">
      <style:text-properties fo:color="#000000" fo:font-family="Symbol" style:font-family-complex="Symbol" fo:font-size="10pt"/>
    </style:style>
    <style:style style:family="text" style:name="T507">
      <style:text-properties fo:color="#000000" fo:font-family="Symbol" style:font-family-complex="Symbol" fo:font-size="10pt"/>
    </style:style>
    <style:style style:family="text" style:name="T508">
      <style:text-properties fo:color="#000000" fo:font-family="Symbol" style:font-family-complex="Symbol" fo:font-size="10pt"/>
    </style:style>
    <style:style style:family="text" style:name="T509">
      <style:text-properties fo:color="#000000" fo:font-family="Symbol" style:font-family-complex="Symbol" fo:font-size="10pt"/>
    </style:style>
    <style:style style:family="text" style:name="T510">
      <style:text-properties fo:color="#000000" fo:font-family="Symbol" style:font-family-complex="Symbol" fo:font-size="10pt"/>
    </style:style>
    <style:style style:family="text" style:name="T511">
      <style:text-properties fo:color="#000000" fo:font-family="Symbol" style:font-family-complex="Symbol" fo:font-size="10pt"/>
    </style:style>
    <style:style style:family="text" style:name="T512">
      <style:text-properties fo:color="#000000" fo:font-family="Symbol" style:font-family-complex="Symbol" fo:font-size="10pt"/>
    </style:style>
    <style:style style:family="text" style:name="T513">
      <style:text-properties fo:color="#000000" fo:font-family="Symbol" style:font-family-complex="Symbol" fo:font-size="10pt"/>
    </style:style>
    <style:style style:family="text" style:name="T514">
      <style:text-properties fo:font-family="Symbol" style:font-family-complex="Symbol"/>
    </style:style>
    <style:style style:family="text" style:name="T515">
      <style:text-properties fo:font-family="Symbol" style:font-family-complex="Symbol"/>
    </style:style>
    <style:style style:family="text" style:name="T516">
      <style:text-properties fo:font-family="Symbol" style:font-family-complex="Symbol"/>
    </style:style>
    <style:style style:family="text" style:name="T517">
      <style:text-properties fo:font-family="Symbol" style:font-family-complex="Symbol"/>
    </style:style>
    <style:style style:family="text" style:name="T518">
      <style:text-properties fo:font-family="Symbol" style:font-family-complex="Symbol"/>
    </style:style>
    <style:style style:family="text" style:name="T519">
      <style:text-properties fo:font-family="Symbol" style:font-family-complex="Symbol"/>
    </style:style>
    <style:style style:family="text" style:name="T520">
      <style:text-properties fo:font-family="Symbol" style:font-family-complex="Symbol"/>
    </style:style>
    <style:style style:family="text" style:name="T521">
      <style:text-properties fo:font-family="Symbol" style:font-family-complex="Symbol"/>
    </style:style>
    <style:style style:family="text" style:name="T522">
      <style:text-properties fo:font-family="Symbol" style:font-family-complex="Symbol"/>
    </style:style>
    <style:style style:family="text" style:name="T523">
      <style:text-properties fo:color="#000000" fo:font-family="Symbol" style:font-family-complex="Symbol" fo:font-size="10pt"/>
    </style:style>
    <style:style style:family="text" style:name="T524">
      <style:text-properties fo:color="#000000" fo:font-family="Symbol" style:font-family-complex="Symbol" fo:font-size="10pt"/>
    </style:style>
    <style:style style:family="text" style:name="T525">
      <style:text-properties fo:color="#000000" fo:font-family="Symbol" style:font-family-complex="Symbol" fo:font-size="10pt"/>
    </style:style>
    <style:style style:family="text" style:name="T526">
      <style:text-properties fo:color="#000000" fo:font-family="Symbol" style:font-family-complex="Symbol" fo:font-size="10pt"/>
    </style:style>
    <style:style style:family="text" style:name="T527">
      <style:text-properties fo:color="#000000" fo:font-family="Symbol" style:font-family-complex="Symbol" fo:font-size="10pt"/>
    </style:style>
    <style:style style:family="text" style:name="T528">
      <style:text-properties fo:color="#000000" fo:font-family="Symbol" style:font-family-complex="Symbol" fo:font-size="10pt"/>
    </style:style>
    <style:style style:family="text" style:name="T529">
      <style:text-properties fo:color="#000000" fo:font-family="Symbol" style:font-family-complex="Symbol" fo:font-size="10pt"/>
    </style:style>
    <style:style style:family="text" style:name="T530">
      <style:text-properties fo:color="#000000" fo:font-family="Symbol" style:font-family-complex="Symbol" fo:font-size="10pt"/>
    </style:style>
    <style:style style:family="text" style:name="T531">
      <style:text-properties fo:color="#000000" fo:font-family="Symbol" style:font-family-complex="Symbol" fo:font-size="10pt"/>
    </style:style>
    <style:style style:family="text" style:name="T532">
      <style:text-properties/>
    </style:style>
    <style:style style:family="text" style:name="T533">
      <style:text-properties/>
    </style:style>
    <style:style style:family="text" style:name="T534">
      <style:text-properties/>
    </style:style>
    <style:style style:family="text" style:name="T535">
      <style:text-properties/>
    </style:style>
    <style:style style:family="text" style:name="T536">
      <style:text-properties/>
    </style:style>
    <style:style style:family="text" style:name="T537">
      <style:text-properties/>
    </style:style>
    <style:style style:family="text" style:name="T538">
      <style:text-properties/>
    </style:style>
    <style:style style:family="text" style:name="T539">
      <style:text-properties/>
    </style:style>
    <style:style style:family="text" style:name="T540">
      <style:text-properties/>
    </style:style>
    <style:style style:family="text" style:name="T541">
      <style:text-properties/>
    </style:style>
    <style:style style:family="text" style:name="T542">
      <style:text-properties/>
    </style:style>
    <style:style style:family="text" style:name="T543">
      <style:text-properties/>
    </style:style>
    <style:style style:family="text" style:name="T544">
      <style:text-properties/>
    </style:style>
    <style:style style:family="text" style:name="T545">
      <style:text-properties/>
    </style:style>
    <style:style style:family="text" style:name="T546">
      <style:text-properties/>
    </style:style>
    <style:style style:family="text" style:name="T547">
      <style:text-properties/>
    </style:style>
    <style:style style:family="text" style:name="T548">
      <style:text-properties/>
    </style:style>
    <style:style style:family="text" style:name="T549">
      <style:text-properties/>
    </style:style>
    <style:style style:family="text" style:name="T550">
      <style:text-properties/>
    </style:style>
    <style:style style:family="text" style:name="T551">
      <style:text-properties/>
    </style:style>
    <style:style style:family="text" style:name="T552">
      <style:text-properties/>
    </style:style>
    <style:style style:family="text" style:name="T553">
      <style:text-properties/>
    </style:style>
    <style:style style:family="text" style:name="T554">
      <style:text-properties/>
    </style:style>
    <style:style style:family="text" style:name="T555">
      <style:text-properties/>
    </style:style>
    <style:style style:family="text" style:name="T556">
      <style:text-properties/>
    </style:style>
    <style:style style:family="text" style:name="T557">
      <style:text-properties/>
    </style:style>
    <style:style style:family="text" style:name="T558">
      <style:text-properties/>
    </style:style>
    <style:style style:family="text" style:name="T559">
      <style:text-properties fo:font-family="Symbol" style:font-family-complex="Symbol"/>
    </style:style>
    <style:style style:family="text" style:name="T560">
      <style:text-properties fo:font-family="Symbol" style:font-family-complex="Symbol"/>
    </style:style>
    <style:style style:family="text" style:name="T561">
      <style:text-properties fo:font-family="Symbol" style:font-family-complex="Symbol"/>
    </style:style>
    <style:style style:family="text" style:name="T562">
      <style:text-properties fo:font-family="Symbol" style:font-family-complex="Symbol"/>
    </style:style>
    <style:style style:family="text" style:name="T563">
      <style:text-properties fo:font-family="Symbol" style:font-family-complex="Symbol"/>
    </style:style>
    <style:style style:family="text" style:name="T564">
      <style:text-properties fo:font-family="Symbol" style:font-family-complex="Symbol"/>
    </style:style>
    <style:style style:family="text" style:name="T565">
      <style:text-properties fo:font-family="Symbol" style:font-family-complex="Symbol"/>
    </style:style>
    <style:style style:family="text" style:name="T566">
      <style:text-properties fo:font-family="Symbol" style:font-family-complex="Symbol"/>
    </style:style>
    <style:style style:family="text" style:name="T567">
      <style:text-properties fo:font-family="Symbol" style:font-family-complex="Symbol"/>
    </style:style>
    <style:style style:family="text" style:name="T568">
      <style:text-properties/>
    </style:style>
    <style:style style:family="text" style:name="T569">
      <style:text-properties/>
    </style:style>
    <style:style style:family="text" style:name="T570">
      <style:text-properties/>
    </style:style>
    <style:style style:family="text" style:name="T571">
      <style:text-properties/>
    </style:style>
    <style:style style:family="text" style:name="T572">
      <style:text-properties/>
    </style:style>
    <style:style style:family="text" style:name="T573">
      <style:text-properties/>
    </style:style>
    <style:style style:family="text" style:name="T574">
      <style:text-properties/>
    </style:style>
    <style:style style:family="text" style:name="T575">
      <style:text-properties/>
    </style:style>
    <style:style style:family="text" style:name="T57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1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2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4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5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7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8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39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complex="Symbol"/>
      </text:list-level-style-bullet>
      <text:list-level-style-bullet text:level="5" text:style-name="T41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42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8" text:style-name="T44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45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47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48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50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51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53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54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7">
      <text:list-level-style-bullet text:level="1" text:style-name="T55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56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57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59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60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62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63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8">
      <text:list-level-style-bullet text:level="1" text:style-name="T64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65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66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68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69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71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72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9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74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75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complex="Symbol"/>
      </text:list-level-style-bullet>
      <text:list-level-style-bullet text:level="5" text:style-name="T77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78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8" text:style-name="T80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81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0">
      <text:list-level-style-bullet text:level="1" text:style-name="T82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83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84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86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87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89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90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1">
      <text:list-level-style-bullet text:level="1" text:style-name="T91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92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93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94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95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96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97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98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99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2">
      <text:list-level-style-bullet text:level="1" text:style-name="T10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0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10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103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complex="Symbol"/>
      </text:list-level-style-bullet>
      <text:list-level-style-bullet text:level="5" text:style-name="T10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10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10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8" text:style-name="T10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10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3">
      <text:list-level-style-bullet text:level="1" text:style-name="T109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10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11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12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13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14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15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16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17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4">
      <text:list-level-style-bullet text:level="1" text:style-name="T118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19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20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21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22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23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24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25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26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5">
      <text:list-level-style-bullet text:level="1" text:style-name="T127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28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29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30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31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32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33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34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35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6">
      <text:list-level-style-bullet text:level="1" text:style-name="T136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37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38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39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40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41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42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43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44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7">
      <text:list-level-style-bullet text:level="1" text:style-name="T145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46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47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49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50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52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53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8">
      <text:list-level-style-bullet text:level="1" text:style-name="T154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56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58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59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61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62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19">
      <text:list-level-style-bullet text:level="1" text:style-name="T163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64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65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67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68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70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71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20">
      <text:list-level-style-bullet text:level="1" text:style-name="T172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74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75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76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77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78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79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80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21">
      <text:list-level-style-bullet text:level="1" text:style-name="T181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82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83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84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85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86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87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88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89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22">
      <text:list-level-style-bullet text:level="1" text:style-name="T190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191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192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193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194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195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196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197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198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23">
      <text:list-level-style-bullet text:level="1" text:style-name="T199" text:bullet-char="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Symbol" style:font-family-complex="Symbol"/>
      </text:list-level-style-bullet>
      <text:list-level-style-bullet text:level="2" text:style-name="T200" text:bullet-char="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Symbol" style:font-family-complex="Symbol"/>
      </text:list-level-style-bullet>
      <text:list-level-style-bullet text:level="3" text:style-name="T201" text:bullet-char="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Symbol" style:font-family-complex="Symbol"/>
      </text:list-level-style-bullet>
      <text:list-level-style-bullet text:level="4" text:style-name="T202" text:bullet-char="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Symbol" style:font-family-complex="Symbol"/>
      </text:list-level-style-bullet>
      <text:list-level-style-bullet text:level="5" text:style-name="T203" text:bullet-char="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Symbol" style:font-family-complex="Symbol"/>
      </text:list-level-style-bullet>
      <text:list-level-style-bullet text:level="6" text:style-name="T204" text:bullet-char="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Symbol" style:font-family-complex="Symbol"/>
      </text:list-level-style-bullet>
      <text:list-level-style-bullet text:level="7" text:style-name="T205" text:bullet-char="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Symbol" style:font-family-complex="Symbol"/>
      </text:list-level-style-bullet>
      <text:list-level-style-bullet text:level="8" text:style-name="T206" text:bullet-char="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Symbol" style:font-family-complex="Symbol"/>
      </text:list-level-style-bullet>
      <text:list-level-style-bullet text:level="9" text:style-name="T207" text:bullet-char="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Symbol" style:font-family-complex="Symbol"/>
      </text:list-level-style-bullet>
    </text:list-style>
    <text:list-style style:name="WWNum24">
      <text:list-level-style-bullet text:level="1" text:style-name="T208" text:bullet-char="">
        <style:list-level-properties text:list-level-position-and-space-mode="label-alignment">
          <style:list-level-label-alignment fo:text-indent="-0.4992cm" fo:margin-left="1.27cm"/>
        </style:list-level-properties>
        <style:text-properties fo:font-family="Symbol" style:font-family-complex="Symbol"/>
      </text:list-level-style-bullet>
      <text:list-level-style-number text:level="2" text:style-name="T20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5">
      <text:list-level-style-bullet text:level="1" text:style-name="T217" text:bullet-char="">
        <style:list-level-properties text:list-level-position-and-space-mode="label-alignment">
          <style:list-level-label-alignment fo:text-indent="-0.4992cm" fo:margin-left="1.27cm"/>
        </style:list-level-properties>
        <style:text-properties fo:font-family="Symbol" style:font-family-complex="Symbol"/>
      </text:list-level-style-bullet>
      <text:list-level-style-number text:level="2" text:style-name="T21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6">
      <text:list-level-style-bullet text:level="1" text:style-name="T226" text:bullet-char="">
        <style:list-level-properties text:list-level-position-and-space-mode="label-alignment">
          <style:list-level-label-alignment fo:text-indent="-0.4992cm" fo:margin-left="1.27cm"/>
        </style:list-level-properties>
        <style:text-properties fo:font-family="Symbol" style:font-family-complex="Symbol"/>
      </text:list-level-style-bullet>
      <text:list-level-style-number text:level="2" text:style-name="T22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7">
      <text:list-level-style-bullet text:level="1" text:style-name="T23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36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37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38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complex="Symbol"/>
      </text:list-level-style-bullet>
      <text:list-level-style-bullet text:level="5" text:style-name="T239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240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24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8" text:style-name="T242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243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28">
      <text:list-level-style-bullet text:level="1" text:style-name="T24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45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46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47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complex="Symbol"/>
      </text:list-level-style-bullet>
      <text:list-level-style-bullet text:level="5" text:style-name="T248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249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25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8" text:style-name="T251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252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29">
      <text:list-level-style-bullet text:level="1" text:style-name="T253" text:bullet-char="%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54" text:bullet-char="%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55" text:bullet-char="%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56" text:bullet-char="%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57" text:bullet-char="%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58" text:bullet-char="%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9" text:bullet-char="%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0" text:bullet-char="%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61" text:bullet-char="%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0">
      <text:list-level-style-bullet text:level="1" text:style-name="T262" text:bullet-char="•   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63" text:bullet-char="•   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64" text:bullet-char="•   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65" text:bullet-char="•   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66" text:bullet-char="•   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67" text:bullet-char="•   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68" text:bullet-char="•   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69" text:bullet-char="•   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70" text:bullet-char="•   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1">
      <text:list-level-style-bullet text:level="1" text:style-name="T271" text:bullet-char="•    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7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73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74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75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7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7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78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79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2">
      <text:list-level-style-bullet text:level="1" text:style-name="T280" text:bullet-char="•    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8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3">
      <text:list-level-style-bullet text:level="1" text:style-name="T289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0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91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92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93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94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95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96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97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35">
      <text:list-level-style-number text:level="1" text:style-name="T30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0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1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1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1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1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1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6">
      <text:list-level-style-bullet text:level="1" text:style-name="T316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17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18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19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20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21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22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23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24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37">
      <text:list-level-style-bullet text:level="1" text:style-name="T325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26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27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28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29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30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31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32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33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38">
      <text:list-level-style-bullet text:level="1" text:style-name="T334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35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36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37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38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39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40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41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42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39">
      <text:list-level-style-bullet text:level="1" text:style-name="T343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44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45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46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47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48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49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50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51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40">
      <text:list-level-style-bullet text:level="1" text:style-name="T352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53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54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55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56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57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58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59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60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41">
      <text:list-level-style-bullet text:level="1" text:style-name="T361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62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63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64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65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66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67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68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69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42">
      <text:list-level-style-bullet text:level="1" text:style-name="T370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371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372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373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374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375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376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377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378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9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9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9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9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9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5">
      <text:list-level-style-number text:level="1" text:style-name="T39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2pt"/>
      </text:list-level-style-number>
      <text:list-level-style-number text:level="2" text:style-name="T398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9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01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02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0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04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05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6">
      <text:list-level-style-bullet text:level="1" text:style-name="T406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407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408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409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410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411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412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413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414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47">
      <text:list-level-style-number text:level="1" text:style-name="T41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2pt"/>
      </text:list-level-style-number>
      <text:list-level-style-number text:level="2" text:style-name="T41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17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18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0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21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2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23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2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2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2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2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3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3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9">
      <text:list-level-style-number text:level="1" text:style-name="T43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2pt"/>
      </text:list-level-style-number>
      <text:list-level-style-number text:level="2" text:style-name="T43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3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3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38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41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4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4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4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5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1">
      <text:list-level-style-number text:level="1" text:style-name="T45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2pt"/>
      </text:list-level-style-number>
      <text:list-level-style-number text:level="2" text:style-name="T45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5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5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5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5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5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5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6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6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6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6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6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6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7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7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7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7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7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4">
      <text:list-level-style-bullet text:level="1" text:style-name="T478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479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480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481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482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483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484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485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486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55">
      <text:list-level-style-bullet text:level="1" text:style-name="T487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488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489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490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491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492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493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494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495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506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507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508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509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510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511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512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513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1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1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1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1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2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2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9">
      <text:list-level-style-bullet text:level="1" text:style-name="T523" text:bullet-char="·">
        <style:list-level-properties fo:width="0.3528cm" fo:height="0.3528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0pt"/>
      </text:list-level-style-bullet>
      <text:list-level-style-bullet text:level="2" text:style-name="T524" text:bullet-char="·">
        <style:list-level-properties fo:width="0.3528cm" fo:height="0.3528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0pt"/>
      </text:list-level-style-bullet>
      <text:list-level-style-bullet text:level="3" text:style-name="T525" text:bullet-char="·">
        <style:list-level-properties fo:width="0.3528cm" fo:height="0.3528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0pt"/>
      </text:list-level-style-bullet>
      <text:list-level-style-bullet text:level="4" text:style-name="T526" text:bullet-char="·">
        <style:list-level-properties fo:width="0.3528cm" fo:height="0.3528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0pt"/>
      </text:list-level-style-bullet>
      <text:list-level-style-bullet text:level="5" text:style-name="T527" text:bullet-char="·">
        <style:list-level-properties fo:width="0.3528cm" fo:height="0.3528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0pt"/>
      </text:list-level-style-bullet>
      <text:list-level-style-bullet text:level="6" text:style-name="T528" text:bullet-char="·">
        <style:list-level-properties fo:width="0.3528cm" fo:height="0.3528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0pt"/>
      </text:list-level-style-bullet>
      <text:list-level-style-bullet text:level="7" text:style-name="T529" text:bullet-char="·">
        <style:list-level-properties fo:width="0.3528cm" fo:height="0.3528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0pt"/>
      </text:list-level-style-bullet>
      <text:list-level-style-bullet text:level="8" text:style-name="T530" text:bullet-char="·">
        <style:list-level-properties fo:width="0.3528cm" fo:height="0.3528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0pt"/>
      </text:list-level-style-bullet>
      <text:list-level-style-bullet text:level="9" text:style-name="T531" text:bullet-char="·">
        <style:list-level-properties fo:width="0.3528cm" fo:height="0.3528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0pt"/>
      </text:list-level-style-bullet>
    </text:list-style>
    <text:list-style style:name="WWNum60">
      <text:list-level-style-number text:level="1" text:style-name="T53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33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534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53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36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37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3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9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0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1">
      <text:list-level-style-number text:level="1" text:style-name="T54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4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4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4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4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54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54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54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54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62">
      <text:list-level-style-number text:level="1" text:style-name="T55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5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5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5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5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55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55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55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55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6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6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6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6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4">
      <text:list-level-style-number text:level="1" text:style-name="T56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7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7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57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57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57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57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.221cm" fo:margin-bottom="1.249cm" fo:margin-left="1.27cm" fo:margin-right="1.27cm"/>
      <style:header-style>
        <style:header-footer-properties svg:height="1.27cm" fo:min-height="1.27cm"/>
      </style:header-style>
      <style:footer-style>
        <style:header-footer-properties fo:min-height="1.249cm"/>
      </style:footer-style>
    </style:page-layout>
    <style:page-layout style:name="Mpm2">
      <style:page-layout-properties fo:page-width="21cm" fo:page-height="29.7cm" style:print-orientation="portrait" fo:margin-top="2.221cm" fo:margin-bottom="1.249cm" fo:margin-left="1.27cm" fo:margin-right="1.27cm"/>
      <style:header-style>
        <style:header-footer-properties svg:height="1.27cm" fo:min-height="1.27cm"/>
      </style:header-style>
      <style:footer-style>
        <style:header-footer-properties fo:min-height="1.249cm"/>
      </style:footer-style>
    </style:page-layout>
    <style:style style:parent-style-name="898" style:family="paragraph" style:name="P50">
      <style:paragraph-properties>
        <style:tab-stops>
          <style:tab-stop style:position="8cm" style:type="center"/>
          <style:tab-stop style:position="16cm" style:type="right"/>
        </style:tab-stops>
      </style:paragraph-properties>
      <style:text-properties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parent-style-name="899" style:family="paragraph" style:name="P51">
      <style:paragraph-properties>
        <style:tab-stops>
          <style:tab-stop style:position="8cm" style:type="center"/>
          <style:tab-stop style:position="16cm" style:type="right"/>
        </style:tab-stops>
      </style:paragraph-properties>
      <style:text-properties/>
    </style:style>
    <style:style style:parent-style-name="899" style:family="paragraph" style:name="P52">
      <style:paragraph-properties>
        <style:tab-stops>
          <style:tab-stop style:position="8cm" style:type="center"/>
          <style:tab-stop style:position="16cm" style:type="right"/>
        </style:tab-stops>
      </style:paragraph-properties>
      <style:text-properties/>
    </style:style>
    <style:style style:parent-style-name="898" style:family="paragraph" style:name="P54">
      <style:paragraph-properties>
        <style:tab-stops>
          <style:tab-stop style:position="8cm" style:type="center"/>
          <style:tab-stop style:position="16cm" style:type="right"/>
        </style:tab-stops>
      </style:paragraph-properties>
      <style:text-properties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parent-style-name="899" style:family="paragraph" style:name="P55">
      <style:paragraph-properties>
        <style:tab-stops>
          <style:tab-stop style:position="8cm" style:type="center"/>
          <style:tab-stop style:position="16cm" style:type="right"/>
        </style:tab-stops>
      </style:paragraph-properties>
      <style:text-properties/>
    </style:style>
    <style:style style:parent-style-name="899" style:family="paragraph" style:name="P56">
      <style:paragraph-properties>
        <style:tab-stops>
          <style:tab-stop style:position="8cm" style:type="center"/>
          <style:tab-stop style:position="16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footer>
        <text:p text:style-name="P51"><text:span><text:tab/><text:tab/>Seite </text:span><text:span/><text:span/><text:span/><text:page-number text:select-page="current"><text:span/></text:page-number><text:span/></text:p>
        <text:p text:style-name="P52"><text:span/><text:span/></text:p>
      </style:footer>
      <style:header>
        <text:p text:style-name="P50"><text:span/><draw:frame draw:name="Grafik 1" draw:style-name="gr3" draw:z-index="24" text:anchor-type="paragraph" svg:width="5.345cm" svg:height="1.046cm" svg:x="13.04cm" svg:y="-0.406cm"><draw:image xlink:href="Pictures/image1.png" xlink:type="simple" xlink:show="embed" xlink:actuate="onLoad"/></draw:frame><text:span/></text:p>
      </style:header>
    </style:master-page>
    <style:master-page style:name="MasterPage2" style:page-layout-name="Mpm2">
      <style:footer>
        <text:p text:style-name="P55"><text:span><text:tab/><text:tab/>Seite </text:span><text:span/><text:span/><text:span/><text:page-number text:select-page="current"><text:span/></text:page-number><text:span/></text:p>
        <text:p text:style-name="P56"><text:span/><text:span/></text:p>
      </style:footer>
      <style:header>
        <text:p text:style-name="P54"><text:span/><draw:frame draw:name="Grafik 1" draw:style-name="gr4" draw:z-index="24" text:anchor-type="paragraph" svg:width="5.345cm" svg:height="1.046cm" svg:x="13.04cm" svg:y="-0.406cm"><draw:image xlink:href="Pictures/image1.png" xlink:type="simple" xlink:show="embed" xlink:actuate="onLoad"/></draw:frame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meta:creation-date>2020-04-14T10:49:00Z</meta:creation-date>
    <dc:language>en-US</dc:language>
    <meta:user-defined meta:name="AppVersion" meta:value-type="string">15.0000</meta:user-defined>
  </office:meta>
</office:document-meta>
</file>